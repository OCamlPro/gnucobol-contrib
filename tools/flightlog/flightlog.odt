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1000002F11D437883.png" manifest:media-type="image/png"/>
  <manifest:file-entry manifest:full-path="Pictures/10000000000002C0000002D464CEF622.png" manifest:media-type="image/png"/>
  <manifest:file-entry manifest:full-path="Pictures/10000000000002C5000002B21C704903.png" manifest:media-type="image/png"/>
  <manifest:file-entry manifest:full-path="Pictures/100000000000034E000002D788DBCF6A.png" manifest:media-type="image/png"/>
  <manifest:file-entry manifest:full-path="Pictures/100000000000034E000002D71D65FC51.png" manifest:media-type="image/png"/>
  <manifest:file-entry manifest:full-path="Pictures/1000000000000351000002D9AC59F35C.png" manifest:media-type="image/png"/>
  <manifest:file-entry manifest:full-path="Pictures/100000000000036800000312203E7489.png" manifest:media-type="image/png"/>
  <manifest:file-entry manifest:full-path="Pictures/100000000000034F000002D819E94858.jpg" manifest:media-type="image/jpeg"/>
  <manifest:file-entry manifest:full-path="Pictures/100000000000030F000002D6B8168F6B.png" manifest:media-type="image/png"/>
  <manifest:file-entry manifest:full-path="Pictures/1000000000000352000002D4501DF2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Table1" style:family="table">
      <style:table-properties style:width="18.002cm" table:align="margins"/>
    </style:style>
    <style:style style:name="Table1.A" style:family="table-column">
      <style:table-column-properties style:column-width="2.388cm" style:rel-column-width="8694*"/>
    </style:style>
    <style:style style:name="Table1.B" style:family="table-column">
      <style:table-column-properties style:column-width="1.522cm" style:rel-column-width="5541*"/>
    </style:style>
    <style:style style:name="Table1.C" style:family="table-column">
      <style:table-column-properties style:column-width="1.6cm" style:rel-column-width="5824*"/>
    </style:style>
    <style:style style:name="Table1.D" style:family="table-column">
      <style:table-column-properties style:column-width="12.492cm" style:rel-column-width="4547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17c7372" officeooo:paragraph-rsid="017c7372"/>
    </style:style>
    <style:style style:name="P2" style:family="paragraph" style:parent-style-name="Text_20_body">
      <style:text-properties style:font-name="Arial1"/>
    </style:style>
    <style:style style:name="P3" style:family="paragraph" style:parent-style-name="Text_20_body">
      <style:text-properties style:font-name="Arial1" officeooo:rsid="00c52114" officeooo:paragraph-rsid="00c586c3"/>
    </style:style>
    <style:style style:name="P4" style:family="paragraph" style:parent-style-name="Text_20_body">
      <style:text-properties style:font-name="Arial1" officeooo:rsid="00c52114" officeooo:paragraph-rsid="00c60346"/>
    </style:style>
    <style:style style:name="P5" style:family="paragraph" style:parent-style-name="Text_20_body">
      <style:text-properties style:font-name="Arial1" officeooo:rsid="00c52114" officeooo:paragraph-rsid="00cb2274"/>
    </style:style>
    <style:style style:name="P6" style:family="paragraph" style:parent-style-name="Text_20_body">
      <style:paragraph-properties fo:text-align="justify" style:justify-single-word="false"/>
      <style:text-properties style:font-name="Arial1" officeooo:rsid="00c52114" officeooo:paragraph-rsid="00cb2274"/>
    </style:style>
    <style:style style:name="P7" style:family="paragraph" style:parent-style-name="Text_20_body">
      <style:paragraph-properties fo:text-align="justify" style:justify-single-word="false"/>
      <style:text-properties style:font-name="Arial1" officeooo:rsid="00c52114" officeooo:paragraph-rsid="00c52114"/>
    </style:style>
    <style:style style:name="P8" style:family="paragraph" style:parent-style-name="Text_20_body">
      <style:text-properties style:font-name="Arial1" officeooo:rsid="00c586c3" officeooo:paragraph-rsid="00c586c3"/>
    </style:style>
    <style:style style:name="P9" style:family="paragraph" style:parent-style-name="Text_20_body">
      <style:paragraph-properties fo:text-align="justify" style:justify-single-word="false"/>
      <style:text-properties style:font-name="Arial1" officeooo:rsid="00c586c3" officeooo:paragraph-rsid="01d4d6a5"/>
    </style:style>
    <style:style style:name="P10" style:family="paragraph" style:parent-style-name="Text_20_body">
      <style:paragraph-properties fo:text-align="justify" style:justify-single-word="false"/>
      <style:text-properties style:font-name="Arial1" officeooo:rsid="00c586c3" officeooo:paragraph-rsid="00c586c3"/>
    </style:style>
    <style:style style:name="P11" style:family="paragraph" style:parent-style-name="Text_20_body">
      <style:paragraph-properties fo:text-align="justify" style:justify-single-word="false"/>
      <style:text-properties style:font-name="Arial1" officeooo:rsid="00c7dbf5" officeooo:paragraph-rsid="00c7dbf5"/>
    </style:style>
    <style:style style:name="P12" style:family="paragraph" style:parent-style-name="Text_20_body">
      <style:paragraph-properties fo:text-align="justify" style:justify-single-word="false"/>
      <style:text-properties style:font-name="Arial1" fo:font-size="12pt" officeooo:rsid="00c94374" officeooo:paragraph-rsid="00c94374" style:font-size-asian="12pt" style:font-size-complex="12pt"/>
    </style:style>
    <style:style style:name="P13" style:family="paragraph" style:parent-style-name="Text_20_body">
      <style:paragraph-properties fo:text-align="start" style:justify-single-word="false"/>
      <style:text-properties style:font-name="Arial1" fo:font-size="12pt" officeooo:rsid="00c94374" officeooo:paragraph-rsid="00c94374" style:font-size-asian="12pt" style:font-size-complex="12pt"/>
    </style:style>
    <style:style style:name="P14" style:family="paragraph" style:parent-style-name="Text_20_body">
      <style:paragraph-properties fo:text-align="justify" style:justify-single-word="false"/>
      <style:text-properties style:font-name="Arial1" fo:font-size="12pt" style:font-size-asian="12pt" style:font-size-complex="12pt"/>
    </style:style>
    <style:style style:name="P15" style:family="paragraph" style:parent-style-name="Standard">
      <style:paragraph-properties fo:text-align="justify" style:justify-single-word="false"/>
      <style:text-properties style:font-name="Arial1" fo:font-size="12pt" officeooo:paragraph-rsid="0015acc5" style:font-size-asian="12pt" style:font-size-complex="12pt"/>
    </style:style>
    <style:style style:name="P16" style:family="paragraph" style:parent-style-name="Standard">
      <style:paragraph-properties fo:text-align="justify" style:justify-single-word="false"/>
      <style:text-properties style:font-name="Arial1" fo:font-size="12pt" officeooo:paragraph-rsid="013e97e9" style:font-size-asian="12pt" style:font-size-complex="12pt"/>
    </style:style>
    <style:style style:name="P17" style:family="paragraph" style:parent-style-name="Text_20_body">
      <style:paragraph-properties fo:text-align="justify" style:justify-single-word="false"/>
      <style:text-properties style:font-name="Arial1" fo:font-size="12pt" officeooo:rsid="00c52114" officeooo:paragraph-rsid="00ccca20" style:font-size-asian="12pt" style:font-size-complex="12pt"/>
    </style:style>
    <style:style style:name="P18" style:family="paragraph" style:parent-style-name="Text_20_body">
      <style:text-properties style:font-name="Arial1" fo:font-size="12pt" officeooo:rsid="00c52114" officeooo:paragraph-rsid="00ccca20" style:font-size-asian="12pt" style:font-size-complex="12pt"/>
    </style:style>
    <style:style style:name="P19" style:family="paragraph" style:parent-style-name="Text_20_body">
      <style:paragraph-properties fo:text-align="justify" style:justify-single-word="false"/>
      <style:text-properties style:font-name="Arial1" fo:font-size="12pt" officeooo:rsid="00ccca20" officeooo:paragraph-rsid="00ccca20" style:font-size-asian="12pt" style:font-size-complex="12pt"/>
    </style:style>
    <style:style style:name="P20" style:family="paragraph" style:parent-style-name="Text_20_body">
      <style:paragraph-properties fo:text-align="justify" style:justify-single-word="false"/>
      <style:text-properties style:font-name="Arial1" fo:font-size="12pt" officeooo:rsid="00ce6c1a" officeooo:paragraph-rsid="00ccca20" style:font-size-asian="12pt" style:font-size-complex="12pt"/>
    </style:style>
    <style:style style:name="P21" style:family="paragraph" style:parent-style-name="Text_20_body">
      <style:paragraph-properties fo:text-align="justify" style:justify-single-word="false"/>
      <style:text-properties style:font-name="Arial1" fo:font-size="12pt" officeooo:rsid="00ce6c1a" officeooo:paragraph-rsid="00ce6c1a" style:font-size-asian="12pt" style:font-size-complex="12pt"/>
    </style:style>
    <style:style style:name="P22" style:family="paragraph" style:parent-style-name="Text_20_body">
      <style:paragraph-properties fo:text-align="justify" style:justify-single-word="false"/>
      <style:text-properties style:font-name="Arial1" fo:font-size="12pt" officeooo:rsid="00ce6c1a" officeooo:paragraph-rsid="019fd217" style:font-size-asian="12pt" style:font-size-complex="12pt"/>
    </style:style>
    <style:style style:name="P23" style:family="paragraph" style:parent-style-name="Text_20_body">
      <style:paragraph-properties fo:text-align="justify" style:justify-single-word="false"/>
      <style:text-properties style:font-name="Arial1" fo:font-size="12pt" officeooo:rsid="00d6056d" officeooo:paragraph-rsid="00d6056d" style:font-size-asian="12pt" style:font-size-complex="12pt"/>
    </style:style>
    <style:style style:name="P24" style:family="paragraph" style:parent-style-name="Text_20_body">
      <style:paragraph-properties fo:text-align="justify" style:justify-single-word="false"/>
      <style:text-properties style:font-name="Arial1" fo:font-size="12pt" officeooo:rsid="015589ea" officeooo:paragraph-rsid="015589ea" style:font-size-asian="12pt" style:font-size-complex="12pt"/>
    </style:style>
    <style:style style:name="P25" style:family="paragraph" style:parent-style-name="Text_20_body">
      <style:paragraph-properties fo:text-align="justify" style:justify-single-word="false"/>
      <style:text-properties style:font-name="Arial1" fo:font-size="12pt" officeooo:rsid="015589ea" officeooo:paragraph-rsid="0155cd72" style:font-size-asian="12pt" style:font-size-complex="12pt"/>
    </style:style>
    <style:style style:name="P26" style:family="paragraph" style:parent-style-name="Text_20_body">
      <style:paragraph-properties fo:text-align="justify" style:justify-single-word="false"/>
      <style:text-properties style:font-name="Arial1" fo:font-size="12pt" officeooo:rsid="015589ea" officeooo:paragraph-rsid="01ef87d9" style:font-size-asian="12pt" style:font-size-complex="12pt"/>
    </style:style>
    <style:style style:name="P27" style:family="paragraph" style:parent-style-name="Text_20_body">
      <style:paragraph-properties fo:text-align="justify" style:justify-single-word="false"/>
      <style:text-properties style:font-name="Arial1" fo:font-size="12pt" officeooo:rsid="01571c7c" officeooo:paragraph-rsid="01571c7c" style:font-size-asian="12pt" style:font-size-complex="12pt"/>
    </style:style>
    <style:style style:name="P28" style:family="paragraph" style:parent-style-name="Text_20_body">
      <style:paragraph-properties fo:text-align="justify" style:justify-single-word="false"/>
      <style:text-properties style:font-name="Arial1" fo:font-size="12pt" officeooo:rsid="01574542" officeooo:paragraph-rsid="019fd78e" style:font-size-asian="12pt" style:font-size-complex="12pt"/>
    </style:style>
    <style:style style:name="P29" style:family="paragraph" style:parent-style-name="Text_20_body">
      <style:paragraph-properties fo:text-align="justify" style:justify-single-word="false"/>
      <style:text-properties style:font-name="Arial1" fo:font-size="12pt" officeooo:rsid="00c60346" officeooo:paragraph-rsid="00ccca20" style:font-size-asian="12pt" style:font-size-complex="12pt"/>
    </style:style>
    <style:style style:name="P30" style:family="paragraph" style:parent-style-name="Text_20_body">
      <style:paragraph-properties fo:text-align="center" style:justify-single-word="false"/>
      <style:text-properties style:font-name="Arial1" fo:font-size="12pt" officeooo:rsid="018a07c7" officeooo:paragraph-rsid="018a07c7" style:font-size-asian="12pt" style:font-size-complex="12pt"/>
    </style:style>
    <style:style style:name="P31" style:family="paragraph" style:parent-style-name="Text_20_body">
      <style:paragraph-properties fo:text-align="justify" style:justify-single-word="false"/>
      <style:text-properties style:font-name="Arial1" fo:font-size="12pt" officeooo:rsid="01809b3c" officeooo:paragraph-rsid="019fd78e" style:font-size-asian="12pt" style:font-size-complex="12pt"/>
    </style:style>
    <style:style style:name="P32" style:family="paragraph" style:parent-style-name="Text_20_body">
      <style:paragraph-properties fo:text-align="justify" style:justify-single-word="false"/>
      <style:text-properties style:font-name="Arial1" fo:font-size="12pt" officeooo:rsid="01ef87d9" officeooo:paragraph-rsid="01ef87d9" style:font-size-asian="12pt" style:font-size-complex="12pt"/>
    </style:style>
    <style:style style:name="P33" style:family="paragraph" style:parent-style-name="Text_20_body">
      <style:paragraph-properties fo:text-align="justify" style:justify-single-word="false"/>
      <style:text-properties style:font-name="Arial1" fo:font-size="12pt" officeooo:rsid="01f0e360" officeooo:paragraph-rsid="01f0e360" style:font-size-asian="12pt" style:font-size-complex="12pt"/>
    </style:style>
    <style:style style:name="P34" style:family="paragraph" style:parent-style-name="Text_20_body">
      <style:paragraph-properties fo:text-align="justify" style:justify-single-word="false"/>
      <style:text-properties style:font-name="Arial1" fo:font-size="12pt" officeooo:rsid="01587fd1" officeooo:paragraph-rsid="01ef87d9" style:font-size-asian="12pt" style:font-size-complex="12pt"/>
    </style:style>
    <style:style style:name="P35" style:family="paragraph" style:parent-style-name="Text_20_body">
      <style:paragraph-properties fo:text-align="justify" style:justify-single-word="false"/>
      <style:text-properties style:font-name="Arial1" fo:font-size="12pt" officeooo:rsid="02652783" officeooo:paragraph-rsid="02652783" style:font-size-asian="12pt" style:font-size-complex="12pt"/>
    </style:style>
    <style:style style:name="P36" style:family="paragraph" style:parent-style-name="Standard">
      <style:paragraph-properties fo:text-align="justify" style:justify-single-word="false"/>
      <style:text-properties style:font-name="Arial1" fo:font-size="12pt" officeooo:rsid="013e97e9" officeooo:paragraph-rsid="013e97e9" style:font-size-asian="12pt" style:font-size-complex="12pt"/>
    </style:style>
    <style:style style:name="P37" style:family="paragraph" style:parent-style-name="Standard">
      <style:paragraph-properties fo:text-align="justify" style:justify-single-word="false"/>
      <style:text-properties style:font-name="Arial1" fo:font-size="12pt" officeooo:rsid="013e97e9" officeooo:paragraph-rsid="013fd7a1" style:font-size-asian="12pt" style:font-size-complex="12pt"/>
    </style:style>
    <style:style style:name="P38" style:family="paragraph" style:parent-style-name="Standard">
      <style:paragraph-properties fo:text-align="justify" style:justify-single-word="false"/>
      <style:text-properties style:font-name="Arial1" fo:font-size="12pt" officeooo:rsid="013e97e9" officeooo:paragraph-rsid="017b3d2f" style:font-size-asian="12pt" style:font-size-complex="12pt"/>
    </style:style>
    <style:style style:name="P39" style:family="paragraph" style:parent-style-name="Standard">
      <style:paragraph-properties fo:text-align="justify" style:justify-single-word="false"/>
      <style:text-properties style:font-name="Arial1" fo:font-size="12pt" officeooo:rsid="013e97e9" officeooo:paragraph-rsid="026f2051" style:font-size-asian="12pt" style:font-size-complex="12pt"/>
    </style:style>
    <style:style style:name="P40" style:family="paragraph" style:parent-style-name="Standard">
      <style:text-properties style:font-name="Arial1" fo:font-size="12pt" officeooo:paragraph-rsid="0015acc5" style:font-size-asian="12pt" style:font-size-complex="12pt"/>
    </style:style>
    <style:style style:name="P41" style:family="paragraph" style:parent-style-name="Standard">
      <style:text-properties style:font-name="Arial1" fo:font-size="12pt" officeooo:rsid="0148b320" officeooo:paragraph-rsid="0148b320" style:font-size-asian="12pt" style:font-size-complex="12pt"/>
    </style:style>
    <style:style style:name="P42" style:family="paragraph" style:parent-style-name="Standard">
      <style:text-properties style:font-name="Arial1" fo:font-size="12pt" officeooo:rsid="00f06419" officeooo:paragraph-rsid="00f06419" style:font-size-asian="12pt" style:font-size-complex="12pt"/>
    </style:style>
    <style:style style:name="P43" style:family="paragraph" style:parent-style-name="Standard">
      <style:paragraph-properties fo:text-align="justify" style:justify-single-word="false"/>
      <style:text-properties style:font-name="Arial1" fo:font-size="12pt" officeooo:rsid="00f06419" officeooo:paragraph-rsid="00f06419" style:font-size-asian="12pt" style:font-size-complex="12pt"/>
    </style:style>
    <style:style style:name="P44" style:family="paragraph" style:parent-style-name="Standard">
      <style:paragraph-properties fo:text-align="justify" style:justify-single-word="false"/>
      <style:text-properties style:font-name="Arial1" fo:font-size="12pt" officeooo:rsid="00f06419" officeooo:paragraph-rsid="02ba626d" style:font-size-asian="12pt" style:font-size-complex="12pt"/>
    </style:style>
    <style:style style:name="P45" style:family="paragraph" style:parent-style-name="Standard">
      <style:paragraph-properties fo:text-align="justify" style:justify-single-word="false"/>
      <style:text-properties style:font-name="Arial1" fo:font-size="12pt" officeooo:rsid="00a7f42a" officeooo:paragraph-rsid="00a7f42a" style:font-size-asian="12pt" style:font-size-complex="12pt"/>
    </style:style>
    <style:style style:name="P46" style:family="paragraph" style:parent-style-name="Standard">
      <style:paragraph-properties fo:text-align="justify" style:justify-single-word="false"/>
      <style:text-properties style:font-name="Arial1" fo:font-size="12pt" officeooo:rsid="0160301c" officeooo:paragraph-rsid="0160301c" style:font-size-asian="12pt" style:font-size-complex="12pt"/>
    </style:style>
    <style:style style:name="P47" style:family="paragraph" style:parent-style-name="Standard">
      <style:text-properties style:font-name="Arial1" fo:font-size="12pt" officeooo:rsid="005f0d7f" officeooo:paragraph-rsid="0015acc5" style:font-size-asian="12pt" style:font-size-complex="12pt"/>
    </style:style>
    <style:style style:name="P48" style:family="paragraph" style:parent-style-name="Standard">
      <style:paragraph-properties fo:text-align="center" style:justify-single-word="false"/>
      <style:text-properties style:font-name="Arial1" fo:font-size="12pt" officeooo:paragraph-rsid="0015acc5" style:font-size-asian="12pt" style:font-size-complex="12pt"/>
    </style:style>
    <style:style style:name="P49" style:family="paragraph" style:parent-style-name="Standard" style:master-page-name="">
      <style:paragraph-properties fo:text-align="center" style:justify-single-word="false" style:page-number="auto" fo:break-before="page"/>
      <style:text-properties style:font-name="Arial1" fo:font-size="12pt" officeooo:paragraph-rsid="0015acc5" style:font-size-asian="12pt" style:font-size-complex="12pt"/>
    </style:style>
    <style:style style:name="P50" style:family="paragraph" style:parent-style-name="Standard">
      <style:paragraph-properties fo:text-align="justify" style:justify-single-word="false"/>
      <style:text-properties style:font-name="Arial1" fo:font-size="12pt" officeooo:rsid="0191c5c5" officeooo:paragraph-rsid="0191c5c5" style:font-size-asian="12pt" style:font-size-complex="12pt"/>
    </style:style>
    <style:style style:name="P51" style:family="paragraph" style:parent-style-name="Standard">
      <style:paragraph-properties fo:text-align="center" style:justify-single-word="false"/>
      <style:text-properties style:font-name="Arial1" fo:font-size="12pt" officeooo:rsid="01cc98aa" officeooo:paragraph-rsid="01cc98aa" style:font-size-asian="12pt" style:font-size-complex="12pt"/>
    </style:style>
    <style:style style:name="P52" style:family="paragraph" style:parent-style-name="Standard">
      <style:text-properties style:font-name="Arial1" fo:font-size="12pt" fo:font-style="normal" officeooo:rsid="01288617" officeooo:paragraph-rsid="013e97e9" style:font-size-asian="12pt" style:font-style-asian="normal" style:font-size-complex="12pt" style:font-style-complex="normal"/>
    </style:style>
    <style:style style:name="P53" style:family="paragraph" style:parent-style-name="Standard">
      <style:paragraph-properties fo:text-align="justify" style:justify-single-word="false"/>
      <style:text-properties style:font-name="Arial1" fo:font-size="12pt" fo:font-style="normal" officeooo:rsid="00f06419" officeooo:paragraph-rsid="013e97e9" style:font-size-asian="12pt" style:font-style-asian="normal" style:font-size-complex="12pt" style:font-style-complex="normal"/>
    </style:style>
    <style:style style:name="P54" style:family="paragraph" style:parent-style-name="Standard">
      <style:paragraph-properties fo:text-align="justify" style:justify-single-word="false"/>
      <style:text-properties style:font-name="Arial1" fo:font-size="12pt" fo:font-style="normal" officeooo:rsid="013e97e9" officeooo:paragraph-rsid="013e97e9" style:font-size-asian="12pt" style:font-style-asian="normal" style:font-size-complex="12pt" style:font-style-complex="normal"/>
    </style:style>
    <style:style style:name="P55" style:family="paragraph" style:parent-style-name="Standard">
      <style:paragraph-properties fo:text-align="justify" style:justify-single-word="false"/>
      <style:text-properties style:font-name="Arial1" fo:font-size="12pt" fo:font-style="normal" officeooo:rsid="013e97e9" officeooo:paragraph-rsid="013fd7a1" style:font-size-asian="12pt" style:font-style-asian="normal" style:font-size-complex="12pt" style:font-style-complex="normal"/>
    </style:style>
    <style:style style:name="P56" style:family="paragraph" style:parent-style-name="Standard">
      <style:paragraph-properties fo:text-align="justify" style:justify-single-word="false"/>
      <style:text-properties style:font-name="Arial1" fo:font-size="12pt" fo:font-style="normal" officeooo:rsid="013fd7a1" officeooo:paragraph-rsid="013fd7a1" style:font-size-asian="12pt" style:font-style-asian="normal" style:font-size-complex="12pt" style:font-style-complex="normal"/>
    </style:style>
    <style:style style:name="P57" style:family="paragraph" style:parent-style-name="Standard">
      <style:paragraph-properties fo:text-align="justify" style:justify-single-word="false"/>
      <style:text-properties style:font-name="Arial1" fo:font-size="12pt" fo:font-style="normal" officeooo:rsid="017a2d63" officeooo:paragraph-rsid="017a2d63" style:font-size-asian="12pt" style:font-style-asian="normal" style:font-size-complex="12pt" style:font-style-complex="normal"/>
    </style:style>
    <style:style style:name="P58" style:family="paragraph" style:parent-style-name="Standard">
      <style:paragraph-properties fo:text-align="justify" style:justify-single-word="false"/>
      <style:text-properties style:font-name="Arial1" fo:font-size="12pt" fo:font-style="normal" officeooo:rsid="017b3d2f" officeooo:paragraph-rsid="017b3d2f" style:font-size-asian="12pt" style:font-style-asian="normal" style:font-size-complex="12pt" style:font-style-complex="normal"/>
    </style:style>
    <style:style style:name="P59" style:family="paragraph" style:parent-style-name="Standard">
      <style:paragraph-properties fo:text-align="justify" style:justify-single-word="false"/>
      <style:text-properties style:font-name="Arial1" fo:font-size="12pt" fo:font-style="normal" officeooo:rsid="017b3d2f" officeooo:paragraph-rsid="01c42ac8" style:font-size-asian="12pt" style:font-style-asian="normal" style:font-size-complex="12pt" style:font-style-complex="normal"/>
    </style:style>
    <style:style style:name="P60" style:family="paragraph" style:parent-style-name="Standard">
      <style:paragraph-properties fo:text-align="justify" style:justify-single-word="false"/>
      <style:text-properties style:font-name="Arial1" fo:font-size="12pt" fo:font-style="normal" officeooo:rsid="01c2ff30" officeooo:paragraph-rsid="01c2ff30"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style:font-name="Arial1" fo:font-size="12pt" fo:font-style="normal" officeooo:rsid="01c42ac8" officeooo:paragraph-rsid="01c42ac8" style:font-size-asian="12pt" style:font-style-asian="normal" style:font-size-complex="12pt" style:font-style-complex="normal"/>
    </style:style>
    <style:style style:name="P62" style:family="paragraph" style:parent-style-name="Text_20_body">
      <style:paragraph-properties fo:margin-left="0cm" fo:margin-right="0cm" fo:margin-top="0cm" fo:margin-bottom="0cm" style:contextual-spacing="false" fo:text-align="center" style:justify-single-word="false" fo:text-indent="0cm" style:auto-text-indent="false" style:shadow="none" style:writing-mode="page">
        <style:tab-stops/>
      </style:paragraph-properties>
      <style:text-properties style:font-name="Arial1" fo:font-size="12pt" fo:font-weight="normal" officeooo:rsid="018a07c7" officeooo:paragraph-rsid="01ef87d9" style:font-name-asian="Microsoft YaHei" style:font-size-asian="12pt" style:font-weight-asian="normal" style:font-name-complex="Lucida Sans1" style:font-size-complex="12pt" style:font-weight-complex="normal"/>
    </style:style>
    <style:style style:name="P63" style:family="paragraph" style:parent-style-name="Text_20_body">
      <style:paragraph-properties fo:text-align="justify" style:justify-single-word="false"/>
      <style:text-properties style:font-name="Arial1"/>
    </style:style>
    <style:style style:name="P64" style:family="paragraph" style:parent-style-name="Text_20_body">
      <style:paragraph-properties fo:text-align="justify" style:justify-single-word="false"/>
      <style:text-properties style:font-name="Arial1" officeooo:paragraph-rsid="00c7dbf5"/>
    </style:style>
    <style:style style:name="P65" style:family="paragraph" style:parent-style-name="Text_20_body">
      <style:paragraph-properties fo:text-align="justify" style:justify-single-word="false"/>
      <style:text-properties style:font-name="Arial1" officeooo:paragraph-rsid="00c52114"/>
    </style:style>
    <style:style style:name="P66" style:family="paragraph" style:parent-style-name="Text_20_body">
      <style:paragraph-properties fo:text-align="justify" style:justify-single-word="false"/>
      <style:text-properties style:font-name="Arial1" officeooo:paragraph-rsid="0136d6af"/>
    </style:style>
    <style:style style:name="P67" style:family="paragraph" style:parent-style-name="Text_20_body">
      <style:paragraph-properties fo:text-align="justify" style:justify-single-word="false"/>
      <style:text-properties style:font-name="Arial1" officeooo:paragraph-rsid="0214eced"/>
    </style:style>
    <style:style style:name="P68" style:family="paragraph" style:parent-style-name="Text_20_body">
      <style:paragraph-properties fo:text-align="justify" style:justify-single-word="false"/>
      <style:text-properties style:font-name="Arial1" officeooo:paragraph-rsid="0216a57e"/>
    </style:style>
    <style:style style:name="P69" style:family="paragraph" style:parent-style-name="Text_20_body">
      <style:paragraph-properties fo:text-align="justify" style:justify-single-word="false"/>
      <style:text-properties style:font-name="Arial1" officeooo:paragraph-rsid="023754ab"/>
    </style:style>
    <style:style style:name="P70" style:family="paragraph" style:parent-style-name="Text_20_body">
      <style:paragraph-properties fo:text-align="justify" style:justify-single-word="false"/>
      <style:text-properties style:font-name="Arial1" officeooo:paragraph-rsid="02624722"/>
    </style:style>
    <style:style style:name="P71" style:family="paragraph" style:parent-style-name="Text_20_body">
      <style:paragraph-properties fo:text-align="justify" style:justify-single-word="false">
        <style:tab-stops/>
      </style:paragraph-properties>
      <style:text-properties style:font-name="Arial1" officeooo:paragraph-rsid="0214eced"/>
    </style:style>
    <style:style style:name="P72" style:family="paragraph" style:parent-style-name="Text_20_body">
      <style:paragraph-properties fo:text-align="justify" style:justify-single-word="false"/>
      <style:text-properties style:font-name="Arial1" officeooo:rsid="00ccca20" officeooo:paragraph-rsid="00ccca20"/>
    </style:style>
    <style:style style:name="P73" style:family="paragraph" style:parent-style-name="Text_20_body">
      <style:paragraph-properties fo:text-align="justify" style:justify-single-word="false"/>
      <style:text-properties style:font-name="Arial1" officeooo:rsid="00ccca20" officeooo:paragraph-rsid="02652783"/>
    </style:style>
    <style:style style:name="P74" style:family="paragraph" style:parent-style-name="Text_20_body">
      <style:paragraph-properties fo:text-align="justify" style:justify-single-word="false"/>
      <style:text-properties style:font-name="Arial1" officeooo:rsid="01154e96" officeooo:paragraph-rsid="01154e96"/>
    </style:style>
    <style:style style:name="P75" style:family="paragraph" style:parent-style-name="Text_20_body">
      <style:text-properties style:font-name="Arial1" officeooo:paragraph-rsid="012d6568"/>
    </style:style>
    <style:style style:name="P76" style:family="paragraph" style:parent-style-name="Text_20_body">
      <style:paragraph-properties fo:text-align="justify" style:justify-single-word="false"/>
      <style:text-properties style:font-name="Arial1" officeooo:rsid="01230c49" officeooo:paragraph-rsid="0216a57e"/>
    </style:style>
    <style:style style:name="P77" style:family="paragraph" style:parent-style-name="Text_20_body">
      <style:text-properties style:font-name="Arial1" fo:font-size="14pt" officeooo:rsid="00ccca20" officeooo:paragraph-rsid="00ccca20" style:font-size-asian="14pt" style:font-size-complex="14pt"/>
    </style:style>
    <style:style style:name="P78" style:family="paragraph" style:parent-style-name="Text_20_body">
      <style:paragraph-properties fo:text-align="justify" style:justify-single-word="false"/>
      <style:text-properties style:font-name="Arial1" officeooo:rsid="012b03a1" officeooo:paragraph-rsid="012d6568"/>
    </style:style>
    <style:style style:name="P79" style:family="paragraph" style:parent-style-name="Text_20_body">
      <style:paragraph-properties fo:text-align="start" style:justify-single-word="false"/>
      <style:text-properties style:font-name="Arial1" officeooo:rsid="012b03a1" officeooo:paragraph-rsid="012d6568"/>
    </style:style>
    <style:style style:name="P80" style:family="paragraph" style:parent-style-name="Text_20_body">
      <style:paragraph-properties fo:text-align="start" style:justify-single-word="false"/>
      <style:text-properties style:font-name="Arial1" officeooo:rsid="012b03a1" officeooo:paragraph-rsid="02070ed5"/>
    </style:style>
    <style:style style:name="P81" style:family="paragraph" style:parent-style-name="Text_20_body">
      <style:paragraph-properties fo:text-align="justify" style:justify-single-word="false"/>
      <style:text-properties style:font-name="Arial1" officeooo:rsid="00795297" officeooo:paragraph-rsid="00795297"/>
    </style:style>
    <style:style style:name="P82" style:family="paragraph" style:parent-style-name="Text_20_body">
      <style:paragraph-properties fo:text-align="justify" style:justify-single-word="false"/>
      <style:text-properties style:font-name="Arial1" officeooo:rsid="00795297" officeooo:paragraph-rsid="009651c8"/>
    </style:style>
    <style:style style:name="P83" style:family="paragraph" style:parent-style-name="Text_20_body">
      <style:paragraph-properties fo:text-align="justify" style:justify-single-word="false"/>
      <style:text-properties style:font-name="Arial1" officeooo:rsid="00795297" officeooo:paragraph-rsid="009867b6"/>
    </style:style>
    <style:style style:name="P84" style:family="paragraph" style:parent-style-name="Text_20_body">
      <style:paragraph-properties fo:text-align="justify" style:justify-single-word="false"/>
      <style:text-properties style:font-name="Arial1" officeooo:rsid="00795297" officeooo:paragraph-rsid="0090e07c"/>
    </style:style>
    <style:style style:name="P85" style:family="paragraph" style:parent-style-name="Text_20_body">
      <style:paragraph-properties fo:text-align="justify" style:justify-single-word="false"/>
      <style:text-properties style:font-name="Arial1" officeooo:rsid="00795297" officeooo:paragraph-rsid="02536a10"/>
    </style:style>
    <style:style style:name="P86" style:family="paragraph" style:parent-style-name="Text_20_body">
      <style:paragraph-properties fo:text-align="justify" style:justify-single-word="false"/>
      <style:text-properties style:font-name="Arial1" officeooo:rsid="009651c8" officeooo:paragraph-rsid="009651c8"/>
    </style:style>
    <style:style style:name="P87" style:family="paragraph" style:parent-style-name="Text_20_body">
      <style:paragraph-properties fo:text-align="justify" style:justify-single-word="false"/>
      <style:text-properties style:font-name="Arial1" officeooo:rsid="0079a39e" officeooo:paragraph-rsid="0079a39e"/>
    </style:style>
    <style:style style:name="P88" style:family="paragraph" style:parent-style-name="Text_20_body">
      <style:paragraph-properties fo:text-align="justify" style:justify-single-word="false"/>
      <style:text-properties style:font-name="Arial1" officeooo:rsid="0079a39e" officeooo:paragraph-rsid="009651c8"/>
    </style:style>
    <style:style style:name="P89" style:family="paragraph" style:parent-style-name="Text_20_body">
      <style:paragraph-properties fo:text-align="justify" style:justify-single-word="false"/>
      <style:text-properties style:font-name="Arial1" officeooo:rsid="00952530" officeooo:paragraph-rsid="02536a10"/>
    </style:style>
    <style:style style:name="P90" style:family="paragraph" style:parent-style-name="Text_20_body">
      <style:paragraph-properties fo:text-align="justify" style:justify-single-word="false"/>
      <style:text-properties style:font-name="Arial1" officeooo:rsid="00952530" officeooo:paragraph-rsid="02c4e25e"/>
    </style:style>
    <style:style style:name="P91" style:family="paragraph" style:parent-style-name="Text_20_body">
      <style:paragraph-properties fo:text-align="center" style:justify-single-word="false"/>
      <style:text-properties style:font-name="Arial1" officeooo:rsid="018833b2" officeooo:paragraph-rsid="018833b2"/>
    </style:style>
    <style:style style:name="P92" style:family="paragraph" style:parent-style-name="Text_20_body">
      <style:paragraph-properties fo:text-align="justify" style:justify-single-word="false"/>
      <style:text-properties style:font-name="Arial1" officeooo:rsid="01b4c67e" officeooo:paragraph-rsid="01b4c67e"/>
    </style:style>
    <style:style style:name="P93" style:family="paragraph" style:parent-style-name="Text_20_body">
      <style:paragraph-properties fo:text-align="center" style:justify-single-word="false"/>
      <style:text-properties style:font-name="Arial1" fo:font-size="11pt" officeooo:rsid="01dd3fd4" officeooo:paragraph-rsid="01dd3fd4" style:font-size-asian="11pt" style:font-size-complex="11pt"/>
    </style:style>
    <style:style style:name="P94" style:family="paragraph" style:parent-style-name="Text_20_body">
      <style:paragraph-properties fo:text-align="justify" style:justify-single-word="false"/>
      <style:text-properties style:font-name="Arial1" officeooo:rsid="01b5e123" officeooo:paragraph-rsid="01b5e123"/>
    </style:style>
    <style:style style:name="P95" style:family="paragraph" style:parent-style-name="Text_20_body">
      <style:paragraph-properties fo:text-align="justify" style:justify-single-word="false"/>
      <style:text-properties style:font-name="Arial1" officeooo:rsid="004618ec" officeooo:paragraph-rsid="01b5e123"/>
    </style:style>
    <style:style style:name="P96" style:family="paragraph" style:parent-style-name="Text_20_body">
      <style:text-properties style:font-name="Arial1" officeooo:rsid="02070ed5" officeooo:paragraph-rsid="02070ed5"/>
    </style:style>
    <style:style style:name="P97" style:family="paragraph" style:parent-style-name="Text_20_body">
      <style:paragraph-properties fo:text-align="justify" style:justify-single-word="false"/>
      <style:text-properties style:font-name="Arial1" officeooo:rsid="014e16a7" officeooo:paragraph-rsid="0216a57e"/>
    </style:style>
    <style:style style:name="P98" style:family="paragraph" style:parent-style-name="Text_20_body">
      <style:paragraph-properties fo:text-align="justify" style:justify-single-word="false"/>
      <style:text-properties style:font-name="Arial1" officeooo:rsid="00f1e4d1" officeooo:paragraph-rsid="0214eced"/>
    </style:style>
    <style:style style:name="P99" style:family="paragraph" style:parent-style-name="Text_20_body">
      <style:paragraph-properties fo:text-align="justify" style:justify-single-word="false"/>
      <style:text-properties style:font-name="Arial1" officeooo:rsid="01c866a9" officeooo:paragraph-rsid="0214eced"/>
    </style:style>
    <style:style style:name="P100" style:family="paragraph" style:parent-style-name="Text_20_body">
      <style:paragraph-properties fo:text-align="justify" style:justify-single-word="false"/>
      <style:text-properties style:font-name="Arial1" officeooo:rsid="00f2e25c" officeooo:paragraph-rsid="0216a57e"/>
    </style:style>
    <style:style style:name="P101" style:family="paragraph" style:parent-style-name="Text_20_body">
      <style:paragraph-properties fo:text-align="justify" style:justify-single-word="false"/>
      <style:text-properties style:font-name="Arial1" officeooo:rsid="01cb60e9" officeooo:paragraph-rsid="0216a57e"/>
    </style:style>
    <style:style style:name="P102" style:family="paragraph" style:parent-style-name="Text_20_body">
      <style:paragraph-properties fo:text-align="justify" style:justify-single-word="false"/>
      <style:text-properties style:font-name="Arial1" officeooo:rsid="01cc2998" officeooo:paragraph-rsid="0216a57e"/>
    </style:style>
    <style:style style:name="P103" style:family="paragraph" style:parent-style-name="Text_20_body">
      <style:paragraph-properties fo:text-align="justify" style:justify-single-word="false"/>
      <style:text-properties style:font-name="Arial1" officeooo:rsid="01cc98aa" officeooo:paragraph-rsid="0216a57e"/>
    </style:style>
    <style:style style:name="P104" style:family="paragraph" style:parent-style-name="Text_20_body">
      <style:paragraph-properties fo:text-align="justify" style:justify-single-word="false"/>
      <style:text-properties style:font-name="Arial1" officeooo:rsid="022471b8" officeooo:paragraph-rsid="022471b8"/>
    </style:style>
    <style:style style:name="P105" style:family="paragraph" style:parent-style-name="Text_20_body">
      <style:paragraph-properties fo:text-align="justify" style:justify-single-word="false"/>
      <style:text-properties style:font-name="Arial1" officeooo:rsid="011178dc" officeooo:paragraph-rsid="023754ab"/>
    </style:style>
    <style:style style:name="P106" style:family="paragraph" style:parent-style-name="Text_20_body">
      <style:paragraph-properties fo:text-align="start" style:justify-single-word="false"/>
      <style:text-properties style:font-name="Arial1" officeooo:rsid="011178dc" officeooo:paragraph-rsid="023754ab"/>
    </style:style>
    <style:style style:name="P107" style:family="paragraph" style:parent-style-name="Text_20_body">
      <style:paragraph-properties fo:text-align="start" style:justify-single-word="false"/>
      <style:text-properties style:font-name="Arial1" officeooo:paragraph-rsid="01330635"/>
    </style:style>
    <style:style style:name="P108" style:family="paragraph" style:parent-style-name="Standard">
      <style:paragraph-properties fo:text-align="start" style:justify-single-word="false"/>
      <style:text-properties style:font-name="Arial1" officeooo:paragraph-rsid="0015acc5"/>
    </style:style>
    <style:style style:name="P109" style:family="paragraph" style:parent-style-name="Text_20_body">
      <style:paragraph-properties fo:text-align="start" style:justify-single-word="false"/>
      <style:text-properties style:font-name="Arial1" officeooo:rsid="022afb76" officeooo:paragraph-rsid="024be79a"/>
    </style:style>
    <style:style style:name="P110" style:family="paragraph" style:parent-style-name="Text_20_body">
      <style:paragraph-properties fo:text-align="justify" style:justify-single-word="false"/>
      <style:text-properties style:font-name="Arial1" officeooo:rsid="0229f51c" officeooo:paragraph-rsid="023754ab"/>
    </style:style>
    <style:style style:name="P111" style:family="paragraph" style:parent-style-name="Text_20_body">
      <style:paragraph-properties fo:text-align="start" style:justify-single-word="false"/>
      <style:text-properties style:font-name="Arial1" fo:font-style="italic" officeooo:paragraph-rsid="02476d03" style:font-style-asian="italic" style:font-style-complex="italic"/>
    </style:style>
    <style:style style:name="P112"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style="italic" fo:font-weight="normal" officeooo:rsid="01571c7c" officeooo:paragraph-rsid="01f1d0a2" style:font-name-asian="Microsoft YaHei" style:font-style-asian="italic" style:font-weight-asian="normal" style:font-name-complex="Lucida Sans1" style:font-style-complex="italic" style:font-weight-complex="normal"/>
    </style:style>
    <style:style style:name="P113" style:family="paragraph" style:parent-style-name="Text_20_body">
      <style:paragraph-properties fo:text-align="start" style:justify-single-word="false"/>
      <style:text-properties style:font-name="Arial1" officeooo:rsid="024a8ee7" officeooo:paragraph-rsid="024a8ee7"/>
    </style:style>
    <style:style style:name="P114" style:family="paragraph" style:parent-style-name="Text_20_body">
      <style:paragraph-properties fo:text-align="justify" style:justify-single-word="false"/>
      <style:text-properties style:font-name="Arial1" officeooo:rsid="02536a10" officeooo:paragraph-rsid="02536a10"/>
    </style:style>
    <style:style style:name="P115" style:family="paragraph" style:parent-style-name="Text_20_body">
      <style:paragraph-properties fo:text-align="justify" style:justify-single-word="false"/>
      <style:text-properties style:font-name="Arial1" officeooo:rsid="00917b6f" officeooo:paragraph-rsid="02536a10"/>
    </style:style>
    <style:style style:name="P116" style:family="paragraph" style:parent-style-name="Text_20_body">
      <style:paragraph-properties fo:text-align="justify" style:justify-single-word="false"/>
      <style:text-properties style:font-name="Arial1" officeooo:rsid="0090e07c" officeooo:paragraph-rsid="0269c1de"/>
    </style:style>
    <style:style style:name="P117" style:family="paragraph" style:parent-style-name="Text_20_body">
      <style:paragraph-properties fo:text-align="justify" style:justify-single-word="false"/>
      <style:text-properties style:font-name="Arial1" officeooo:rsid="02652783" officeooo:paragraph-rsid="02652783"/>
    </style:style>
    <style:style style:name="P118" style:family="paragraph" style:parent-style-name="Text_20_body">
      <style:paragraph-properties fo:text-align="center" style:justify-single-word="false"/>
      <style:text-properties style:font-name="Arial1"/>
    </style:style>
    <style:style style:name="P119" style:family="paragraph" style:parent-style-name="Text_20_body">
      <style:paragraph-properties fo:text-align="justify" style:justify-single-word="false"/>
      <style:text-properties style:font-name="Arial1" officeooo:rsid="02882585" officeooo:paragraph-rsid="02882585"/>
    </style:style>
    <style:style style:name="P120" style:family="paragraph" style:parent-style-name="Text_20_body">
      <style:paragraph-properties fo:text-align="justify" style:justify-single-word="false"/>
      <style:text-properties style:font-name="Arial1" officeooo:rsid="02a5f3fc" officeooo:paragraph-rsid="02a5f3fc"/>
    </style:style>
    <style:style style:name="P121" style:family="paragraph" style:parent-style-name="Text_20_body">
      <style:paragraph-properties fo:text-align="justify" style:justify-single-word="false"/>
      <style:text-properties style:font-name="Arial1" officeooo:rsid="02a72bff" officeooo:paragraph-rsid="02a73c5a"/>
    </style:style>
    <style:style style:name="P122"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bold" officeooo:paragraph-rsid="00d1bf1f" style:font-name-asian="Microsoft YaHei" style:font-weight-asian="bold" style:font-name-complex="Lucida Sans1" style:font-weight-complex="bold"/>
    </style:style>
    <style:style style:name="P123"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89ea" officeooo:paragraph-rsid="015589ea" style:font-name-asian="Microsoft YaHei" style:font-weight-asian="normal" style:font-name-complex="Lucida Sans1" style:font-weight-complex="normal"/>
    </style:style>
    <style:style style:name="P124"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89ea" officeooo:paragraph-rsid="01ee138b" style:font-name-asian="Microsoft YaHei" style:font-weight-asian="normal" style:font-name-complex="Lucida Sans1" style:font-weight-complex="normal"/>
    </style:style>
    <style:style style:name="P125"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89ea" officeooo:paragraph-rsid="01571c7c" style:font-name-asian="Microsoft YaHei" style:font-weight-asian="normal" style:font-name-complex="Lucida Sans1" style:font-weight-complex="normal"/>
    </style:style>
    <style:style style:name="P126"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cd72" officeooo:paragraph-rsid="0155cd72" style:font-name-asian="Microsoft YaHei" style:font-weight-asian="normal" style:font-name-complex="Lucida Sans1" style:font-weight-complex="normal"/>
    </style:style>
    <style:style style:name="P127"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cd72" officeooo:paragraph-rsid="018ad05a" style:font-name-asian="Microsoft YaHei" style:font-weight-asian="normal" style:font-name-complex="Lucida Sans1" style:font-weight-complex="normal"/>
    </style:style>
    <style:style style:name="P128"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cd72" officeooo:paragraph-rsid="01571c7c" style:font-name-asian="Microsoft YaHei" style:font-weight-asian="normal" style:font-name-complex="Lucida Sans1" style:font-weight-complex="normal"/>
    </style:style>
    <style:style style:name="P129"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71c7c" officeooo:paragraph-rsid="01571c7c" style:font-name-asian="Microsoft YaHei" style:font-weight-asian="normal" style:font-name-complex="Lucida Sans1" style:font-weight-complex="normal"/>
    </style:style>
    <style:style style:name="P130"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71c7c" officeooo:paragraph-rsid="01f1d0a2" style:font-name-asian="Microsoft YaHei" style:font-weight-asian="normal" style:font-name-complex="Lucida Sans1" style:font-weight-complex="normal"/>
    </style:style>
    <style:style style:name="P131"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9e426e" officeooo:paragraph-rsid="019e426e" style:font-name-asian="Microsoft YaHei" style:font-weight-asian="normal" style:font-name-complex="Lucida Sans1" style:font-weight-complex="normal"/>
    </style:style>
    <style:style style:name="P132"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9e426e" officeooo:paragraph-rsid="02893f5b" style:font-name-asian="Microsoft YaHei" style:font-weight-asian="normal" style:font-name-complex="Lucida Sans1" style:font-weight-complex="normal"/>
    </style:style>
    <style:style style:name="P133"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f0e360" officeooo:paragraph-rsid="01f1d0a2" style:font-name-asian="Microsoft YaHei" style:font-weight-asian="normal" style:font-name-complex="Lucida Sans1" style:font-weight-complex="normal"/>
    </style:style>
    <style:style style:name="P134"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d4d6a5" officeooo:paragraph-rsid="01ee138b" style:font-name-asian="Microsoft YaHei" style:font-weight-asian="normal" style:font-name-complex="Lucida Sans1" style:font-weight-complex="normal"/>
    </style:style>
    <style:style style:name="P135"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f1d0a2" officeooo:paragraph-rsid="01f1d0a2" style:font-name-asian="Microsoft YaHei" style:font-weight-asian="normal" style:font-name-complex="Lucida Sans1" style:font-weight-complex="normal"/>
    </style:style>
    <style:style style:name="P136"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285503f" officeooo:paragraph-rsid="0285503f" style:font-name-asian="Microsoft YaHei" style:font-weight-asian="normal" style:font-name-complex="Lucida Sans1" style:font-weight-complex="normal"/>
    </style:style>
    <style:style style:name="P137"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2b5fcce" officeooo:paragraph-rsid="02b5fcce" style:font-name-asian="Microsoft YaHei" style:font-weight-asian="normal" style:font-name-complex="Lucida Sans1" style:font-weight-complex="normal"/>
    </style:style>
    <style:style style:name="P138" style:family="paragraph" style:parent-style-name="Text_20_body">
      <style:paragraph-properties fo:text-align="justify" style:justify-single-word="false"/>
      <style:text-properties style:font-name="Arial1" officeooo:rsid="02a73c5a" officeooo:paragraph-rsid="02a73c5a"/>
    </style:style>
    <style:style style:name="P139" style:family="paragraph" style:parent-style-name="Text_20_body">
      <style:paragraph-properties fo:text-align="justify" style:justify-single-word="false"/>
      <style:text-properties style:font-name="Arial1" officeooo:rsid="02b47795" officeooo:paragraph-rsid="02b47795"/>
    </style:style>
    <style:style style:name="P140" style:family="paragraph" style:parent-style-name="Standard">
      <style:text-properties style:font-name="Arial1" officeooo:paragraph-rsid="02c24afc"/>
    </style:style>
    <style:style style:name="P141" style:family="paragraph" style:parent-style-name="Text_20_body">
      <style:paragraph-properties fo:text-align="justify" style:justify-single-word="false">
        <style:tab-stops/>
      </style:paragraph-properties>
      <style:text-properties style:font-name="Arial1" officeooo:rsid="02cb4d34" officeooo:paragraph-rsid="02cb4d34"/>
    </style:style>
    <style:style style:name="P142" style:family="paragraph" style:parent-style-name="Text_20_body">
      <style:text-properties officeooo:rsid="006a3b00" officeooo:paragraph-rsid="00795297"/>
    </style:style>
    <style:style style:name="P143" style:family="paragraph" style:parent-style-name="Text_20_body">
      <style:paragraph-properties fo:text-align="justify" style:justify-single-word="false"/>
      <style:text-properties officeooo:rsid="006a3b00" officeooo:paragraph-rsid="00795297"/>
    </style:style>
    <style:style style:name="P144" style:family="paragraph" style:parent-style-name="Text_20_body">
      <style:paragraph-properties fo:text-align="justify" style:justify-single-word="false"/>
      <style:text-properties officeooo:rsid="006a3b00" officeooo:paragraph-rsid="011a9437"/>
    </style:style>
    <style:style style:name="P145" style:family="paragraph" style:parent-style-name="Text_20_body">
      <style:text-properties officeooo:rsid="006a3b00" officeooo:paragraph-rsid="016a7291"/>
    </style:style>
    <style:style style:name="P146" style:family="paragraph" style:parent-style-name="Text_20_body">
      <style:text-properties officeooo:rsid="006b457e" officeooo:paragraph-rsid="00795297"/>
    </style:style>
    <style:style style:name="P147" style:family="paragraph" style:parent-style-name="Text_20_body">
      <style:paragraph-properties fo:text-align="justify" style:justify-single-word="false"/>
      <style:text-properties officeooo:rsid="006b457e" officeooo:paragraph-rsid="00795297"/>
    </style:style>
    <style:style style:name="P148" style:family="paragraph" style:parent-style-name="Text_20_body">
      <style:text-properties officeooo:rsid="006c211a" officeooo:paragraph-rsid="00795297"/>
    </style:style>
    <style:style style:name="P149" style:family="paragraph" style:parent-style-name="Text_20_body">
      <style:paragraph-properties fo:text-align="justify" style:justify-single-word="false"/>
      <style:text-properties officeooo:rsid="006c211a" officeooo:paragraph-rsid="00795297"/>
    </style:style>
    <style:style style:name="P150" style:family="paragraph" style:parent-style-name="Text_20_body">
      <style:paragraph-properties fo:text-align="justify" style:justify-single-word="false"/>
      <style:text-properties officeooo:rsid="006c211a" officeooo:paragraph-rsid="02cb013b"/>
    </style:style>
    <style:style style:name="P151" style:family="paragraph" style:parent-style-name="Text_20_body">
      <style:text-properties officeooo:paragraph-rsid="00795297"/>
    </style:style>
    <style:style style:name="P152" style:family="paragraph" style:parent-style-name="Text_20_body">
      <style:text-properties officeooo:rsid="00795297" officeooo:paragraph-rsid="00795297"/>
    </style:style>
    <style:style style:name="P153" style:family="paragraph" style:parent-style-name="Text_20_body">
      <style:paragraph-properties fo:break-before="page"/>
      <style:text-properties officeooo:rsid="00795297" officeooo:paragraph-rsid="00795297"/>
    </style:style>
    <style:style style:name="P154" style:family="paragraph" style:parent-style-name="Text_20_body">
      <style:text-properties officeooo:rsid="00795297" officeooo:paragraph-rsid="007e51fa"/>
    </style:style>
    <style:style style:name="P155" style:family="paragraph" style:parent-style-name="Text_20_body">
      <style:text-properties officeooo:rsid="00795297" officeooo:paragraph-rsid="007fffd6"/>
    </style:style>
    <style:style style:name="P156" style:family="paragraph" style:parent-style-name="Text_20_body">
      <style:text-properties officeooo:rsid="00795297" officeooo:paragraph-rsid="008193ab"/>
    </style:style>
    <style:style style:name="P157" style:family="paragraph" style:parent-style-name="Text_20_body">
      <style:paragraph-properties fo:break-before="page"/>
      <style:text-properties officeooo:rsid="00795297" officeooo:paragraph-rsid="008193ab"/>
    </style:style>
    <style:style style:name="P158" style:family="paragraph" style:parent-style-name="Text_20_body">
      <style:text-properties officeooo:rsid="00795297" officeooo:paragraph-rsid="0086bbf9"/>
    </style:style>
    <style:style style:name="P159" style:family="paragraph" style:parent-style-name="Text_20_body">
      <style:text-properties officeooo:rsid="00795297" officeooo:paragraph-rsid="008a4754"/>
    </style:style>
    <style:style style:name="P160" style:family="paragraph" style:parent-style-name="Text_20_body">
      <style:text-properties officeooo:rsid="00795297" officeooo:paragraph-rsid="008b6dac"/>
    </style:style>
    <style:style style:name="P161" style:family="paragraph" style:parent-style-name="Text_20_body">
      <style:text-properties officeooo:rsid="00795297" officeooo:paragraph-rsid="008c80e4"/>
    </style:style>
    <style:style style:name="P162" style:family="paragraph" style:parent-style-name="Text_20_body">
      <style:text-properties officeooo:rsid="00795297" officeooo:paragraph-rsid="008dbfe1"/>
    </style:style>
    <style:style style:name="P163" style:family="paragraph" style:parent-style-name="Text_20_body">
      <style:text-properties officeooo:rsid="00795297" officeooo:paragraph-rsid="008e908a"/>
    </style:style>
    <style:style style:name="P164" style:family="paragraph" style:parent-style-name="Text_20_body">
      <style:paragraph-properties fo:text-align="justify" style:justify-single-word="false"/>
      <style:text-properties officeooo:rsid="00795297" officeooo:paragraph-rsid="0086bbf9"/>
    </style:style>
    <style:style style:name="P165" style:family="paragraph" style:parent-style-name="Text_20_body">
      <style:paragraph-properties fo:text-align="justify" style:justify-single-word="false"/>
      <style:text-properties officeooo:rsid="00795297" officeooo:paragraph-rsid="00795297"/>
    </style:style>
    <style:style style:name="P166" style:family="paragraph" style:parent-style-name="Text_20_body">
      <style:paragraph-properties fo:text-align="justify" style:justify-single-word="false"/>
      <style:text-properties officeooo:rsid="00795297" officeooo:paragraph-rsid="00e23f52"/>
    </style:style>
    <style:style style:name="P167" style:family="paragraph" style:parent-style-name="Text_20_body">
      <style:paragraph-properties fo:text-align="justify" style:justify-single-word="false"/>
      <style:text-properties officeooo:rsid="00795297" officeooo:paragraph-rsid="029b42ef"/>
    </style:style>
    <style:style style:name="P168" style:family="paragraph" style:parent-style-name="Text_20_body">
      <style:paragraph-properties fo:text-align="justify" style:justify-single-word="false" fo:break-before="page"/>
      <style:text-properties officeooo:rsid="00795297" officeooo:paragraph-rsid="029b42ef"/>
    </style:style>
    <style:style style:name="P169" style:family="paragraph" style:parent-style-name="Text_20_body">
      <style:text-properties officeooo:rsid="00795297" officeooo:paragraph-rsid="00df735b"/>
    </style:style>
    <style:style style:name="P170" style:family="paragraph" style:parent-style-name="Text_20_body">
      <style:text-properties officeooo:rsid="00795297" officeooo:paragraph-rsid="00e9f42c"/>
    </style:style>
    <style:style style:name="P171" style:family="paragraph" style:parent-style-name="Text_20_body">
      <style:text-properties officeooo:rsid="00795297" officeooo:paragraph-rsid="0246cbe8"/>
    </style:style>
    <style:style style:name="P172" style:family="paragraph" style:parent-style-name="Text_20_body">
      <style:text-properties officeooo:rsid="00795297" officeooo:paragraph-rsid="02536a10"/>
    </style:style>
    <style:style style:name="P173" style:family="paragraph" style:parent-style-name="Text_20_body">
      <style:text-properties officeooo:rsid="00795297" officeooo:paragraph-rsid="007fb8fb"/>
    </style:style>
    <style:style style:name="P174" style:family="paragraph" style:parent-style-name="Text_20_body">
      <style:text-properties officeooo:rsid="00795297" officeooo:paragraph-rsid="02c4e25e"/>
    </style:style>
    <style:style style:name="P175" style:family="paragraph" style:parent-style-name="Text_20_body">
      <style:text-properties style:font-name="Liberation Mono"/>
    </style:style>
    <style:style style:name="P176" style:family="paragraph" style:parent-style-name="Text_20_body">
      <style:paragraph-properties fo:text-align="justify" style:justify-single-word="false"/>
      <style:text-properties style:font-name="Liberation Mono"/>
    </style:style>
    <style:style style:name="P177" style:family="paragraph" style:parent-style-name="Text_20_body">
      <style:paragraph-properties fo:text-align="justify" style:justify-single-word="false"/>
      <style:text-properties style:font-name="Liberation Mono" officeooo:paragraph-rsid="019c117c"/>
    </style:style>
    <style:style style:name="P178" style:family="paragraph" style:parent-style-name="Text_20_body">
      <style:paragraph-properties fo:text-align="justify" style:justify-single-word="false"/>
      <style:text-properties style:font-name="Liberation Mono" fo:font-size="12pt" officeooo:rsid="01366ff7" officeooo:paragraph-rsid="01366ff7" style:font-size-asian="12pt" style:font-size-complex="12pt"/>
    </style:style>
    <style:style style:name="P179" style:family="paragraph" style:parent-style-name="Text_20_body">
      <style:paragraph-properties fo:text-align="justify" style:justify-single-word="false"/>
      <style:text-properties style:font-name="Liberation Mono" fo:font-size="12pt" officeooo:rsid="0231f929" officeooo:paragraph-rsid="0231f929" style:font-size-asian="12pt" style:font-size-complex="12pt"/>
    </style:style>
    <style:style style:name="P180" style:family="paragraph" style:parent-style-name="Text_20_body">
      <style:paragraph-properties fo:text-align="justify" style:justify-single-word="false"/>
      <style:text-properties style:font-name="Liberation Mono" fo:font-size="12pt" style:font-size-asian="12pt" style:font-size-complex="12pt"/>
    </style:style>
    <style:style style:name="P181" style:family="paragraph" style:parent-style-name="Text_20_body">
      <style:paragraph-properties fo:text-align="start" style:justify-single-word="false"/>
      <style:text-properties style:font-name="Liberation Mono" fo:font-size="12pt" officeooo:rsid="00c7dbf5" officeooo:paragraph-rsid="02b5fcce" style:font-size-asian="12pt" style:font-size-complex="12pt"/>
    </style:style>
    <style:style style:name="P182" style:family="paragraph" style:parent-style-name="Text_20_body">
      <style:paragraph-properties fo:text-align="justify" style:justify-single-word="false"/>
      <style:text-properties style:font-name="Liberation Mono" officeooo:rsid="00b30817" officeooo:paragraph-rsid="01127369"/>
    </style:style>
    <style:style style:name="P183" style:family="paragraph" style:parent-style-name="Text_20_body">
      <style:paragraph-properties fo:text-align="start" style:justify-single-word="false"/>
      <style:text-properties style:font-name="Liberation Mono" officeooo:rsid="0087e748" officeooo:paragraph-rsid="016c8ab2"/>
    </style:style>
    <style:style style:name="P184" style:family="paragraph" style:parent-style-name="Text_20_body">
      <style:paragraph-properties fo:text-align="start" style:justify-single-word="false"/>
      <style:text-properties style:font-name="Liberation Mono" officeooo:rsid="015a55a8" officeooo:paragraph-rsid="015c580a"/>
    </style:style>
    <style:style style:name="P185" style:family="paragraph" style:parent-style-name="Text_20_body">
      <style:text-properties style:font-name="Liberation Mono" officeooo:rsid="0164eb53" officeooo:paragraph-rsid="0164eb53"/>
    </style:style>
    <style:style style:name="P186" style:family="paragraph" style:parent-style-name="Text_20_body">
      <style:paragraph-properties fo:text-align="start" style:justify-single-word="false"/>
      <style:text-properties style:font-name="Liberation Mono" officeooo:rsid="009346cc" officeooo:paragraph-rsid="0177cdba"/>
    </style:style>
    <style:style style:name="P187" style:family="paragraph" style:parent-style-name="Text_20_body">
      <style:text-properties style:font-name="Liberation Mono" officeooo:paragraph-rsid="019c117c"/>
    </style:style>
    <style:style style:name="P188" style:family="paragraph" style:parent-style-name="Text_20_body">
      <style:paragraph-properties fo:text-align="justify" style:justify-single-word="false"/>
      <style:text-properties style:font-name="Liberation Mono" officeooo:rsid="01bd353c" officeooo:paragraph-rsid="01bd353c"/>
    </style:style>
    <style:style style:name="P189" style:family="paragraph" style:parent-style-name="Text_20_body">
      <style:paragraph-properties fo:text-align="start" style:justify-single-word="false"/>
      <style:text-properties style:font-name="Liberation Mono" fo:font-size="6.40000009536743pt" officeooo:rsid="00c7dbf5" officeooo:paragraph-rsid="00cb2274" style:font-size-asian="6.40000009536743pt" style:font-size-complex="6.40000009536743pt"/>
    </style:style>
    <style:style style:name="P190" style:family="paragraph" style:parent-style-name="Text_20_body">
      <style:paragraph-properties fo:text-align="start" style:justify-single-word="false"/>
      <style:text-properties style:font-name="Liberation Mono" fo:font-size="6.40000009536743pt" officeooo:rsid="00c7dbf5" officeooo:paragraph-rsid="01f3744c" style:font-size-asian="6.40000009536743pt" style:font-size-complex="6.40000009536743pt"/>
    </style:style>
    <style:style style:name="P191" style:family="paragraph" style:parent-style-name="Text_20_body">
      <style:paragraph-properties fo:text-align="justify" style:justify-single-word="false"/>
      <style:text-properties style:font-name="Liberation Mono" officeooo:rsid="01db06e6" officeooo:paragraph-rsid="01db06e6"/>
    </style:style>
    <style:style style:name="P192" style:family="paragraph" style:parent-style-name="Text_20_body">
      <style:text-properties style:font-name="Liberation Mono" fo:font-size="10.5pt" style:font-size-asian="10.5pt" style:font-size-complex="10.5pt"/>
    </style:style>
    <style:style style:name="P193" style:family="paragraph" style:parent-style-name="Text_20_body">
      <style:paragraph-properties fo:text-align="start" style:justify-single-word="false"/>
      <style:text-properties style:font-name="Liberation Mono" fo:font-size="10.5pt" style:font-size-asian="10.5pt" style:font-size-complex="10.5pt"/>
    </style:style>
    <style:style style:name="P194" style:family="paragraph" style:parent-style-name="Text_20_body">
      <style:text-properties style:font-name="Liberation Mono" officeooo:paragraph-rsid="01e29f1f"/>
    </style:style>
    <style:style style:name="P195" style:family="paragraph" style:parent-style-name="Text_20_body">
      <style:paragraph-properties fo:text-align="start" style:justify-single-word="false"/>
      <style:text-properties style:font-name="Liberation Mono" officeooo:paragraph-rsid="0214eced"/>
    </style:style>
    <style:style style:name="P196" style:family="paragraph" style:parent-style-name="Text_20_body">
      <style:paragraph-properties fo:text-align="start" style:justify-single-word="false"/>
      <style:text-properties style:font-name="Liberation Mono" officeooo:rsid="00f1e4d1" officeooo:paragraph-rsid="0214eced"/>
    </style:style>
    <style:style style:name="P197" style:family="paragraph" style:parent-style-name="Text_20_body">
      <style:paragraph-properties fo:text-align="justify" style:justify-single-word="false"/>
      <style:text-properties style:font-name="Liberation Mono" officeooo:rsid="00fa351f" officeooo:paragraph-rsid="022471b8"/>
    </style:style>
    <style:style style:name="P198" style:family="paragraph" style:parent-style-name="Text_20_body">
      <style:paragraph-properties fo:text-align="start" style:justify-single-word="false"/>
      <style:text-properties style:font-name="Liberation Mono" officeooo:rsid="011178dc" officeooo:paragraph-rsid="023754ab"/>
    </style:style>
    <style:style style:name="P199" style:family="paragraph" style:parent-style-name="Text_20_body">
      <style:paragraph-properties fo:text-align="justify" style:justify-single-word="false"/>
      <style:text-properties style:font-name="Liberation Mono" officeooo:rsid="02b47795" officeooo:paragraph-rsid="02b47795"/>
    </style:style>
    <style:style style:name="P200" style:family="paragraph" style:parent-style-name="Text_20_body">
      <style:paragraph-properties fo:text-align="justify" style:justify-single-word="false"/>
      <style:text-properties style:font-name="Liberation Sans" officeooo:rsid="00795297" officeooo:paragraph-rsid="016be5bf"/>
    </style:style>
    <style:style style:name="P201" style:family="paragraph" style:parent-style-name="Text_20_body">
      <style:paragraph-properties fo:text-align="justify" style:justify-single-word="false"/>
      <style:text-properties style:font-name="Liberation Sans" officeooo:rsid="0089bde5" officeooo:paragraph-rsid="016c8ab2"/>
    </style:style>
    <style:style style:name="P202" style:family="paragraph" style:parent-style-name="Text_20_body">
      <style:paragraph-properties fo:text-align="start" style:justify-single-word="false"/>
      <style:text-properties style:font-name="Liberation Sans" officeooo:rsid="0087e748" officeooo:paragraph-rsid="016c8ab2"/>
    </style:style>
    <style:style style:name="P203" style:family="paragraph" style:parent-style-name="Text_20_body">
      <style:paragraph-properties fo:text-align="justify" style:justify-single-word="false"/>
      <style:text-properties style:font-name="Liberation Sans" officeooo:rsid="009346cc" officeooo:paragraph-rsid="0177cdba"/>
    </style:style>
    <style:style style:name="P204" style:family="paragraph" style:parent-style-name="Text_20_body">
      <style:paragraph-properties fo:text-align="start" style:justify-single-word="false"/>
      <style:text-properties style:font-name="Liberation Sans" officeooo:rsid="009346cc" officeooo:paragraph-rsid="0177cdba"/>
    </style:style>
    <style:style style:name="P205" style:family="paragraph" style:parent-style-name="Text_20_body">
      <style:paragraph-properties fo:text-align="justify" style:justify-single-word="false"/>
      <style:text-properties style:font-name="Liberation Sans" officeooo:rsid="0093ee9e" officeooo:paragraph-rsid="0177cdba"/>
    </style:style>
    <style:style style:name="P206" style:family="paragraph" style:parent-style-name="Text_20_body">
      <style:paragraph-properties fo:text-align="justify" style:justify-single-word="false"/>
      <style:text-properties style:font-name="Liberation Sans" officeooo:rsid="00917b6f" officeooo:paragraph-rsid="016be5bf"/>
    </style:style>
    <style:style style:name="P207" style:family="paragraph" style:parent-style-name="Text_20_body">
      <style:paragraph-properties fo:text-align="justify" style:justify-single-word="false"/>
      <style:text-properties style:font-name="Liberation Sans" officeooo:rsid="00917b6f" officeooo:paragraph-rsid="02c4e25e"/>
    </style:style>
    <style:style style:name="P208" style:family="paragraph" style:parent-style-name="Text_20_body">
      <style:text-properties officeooo:rsid="007e51fa" officeooo:paragraph-rsid="007e51fa"/>
    </style:style>
    <style:style style:name="P209" style:family="paragraph" style:parent-style-name="Text_20_body">
      <style:text-properties officeooo:rsid="007e51fa" officeooo:paragraph-rsid="02536a10"/>
    </style:style>
    <style:style style:name="P210" style:family="paragraph" style:parent-style-name="Text_20_body">
      <style:text-properties officeooo:rsid="008338bc" officeooo:paragraph-rsid="008338bc"/>
    </style:style>
    <style:style style:name="P211" style:family="paragraph" style:parent-style-name="Text_20_body">
      <style:paragraph-properties fo:text-align="justify" style:justify-single-word="false"/>
      <style:text-properties officeooo:rsid="008338bc" officeooo:paragraph-rsid="008338bc"/>
    </style:style>
    <style:style style:name="P212" style:family="paragraph" style:parent-style-name="Text_20_body">
      <style:text-properties officeooo:rsid="008338bc" officeooo:paragraph-rsid="0246cbe8"/>
    </style:style>
    <style:style style:name="P213" style:family="paragraph" style:parent-style-name="Text_20_body">
      <style:paragraph-properties fo:text-align="justify" style:justify-single-word="false"/>
      <style:text-properties officeooo:rsid="0086bbf9" officeooo:paragraph-rsid="0086bbf9"/>
    </style:style>
    <style:style style:name="P214" style:family="paragraph" style:parent-style-name="Text_20_body">
      <style:text-properties officeooo:rsid="0086bbf9" officeooo:paragraph-rsid="00eb6764"/>
    </style:style>
    <style:style style:name="P215" style:family="paragraph" style:parent-style-name="Text_20_body">
      <style:text-properties officeooo:rsid="008c80e4" officeooo:paragraph-rsid="008c80e4"/>
    </style:style>
    <style:style style:name="P216" style:family="paragraph" style:parent-style-name="Text_20_body">
      <style:text-properties officeooo:rsid="008c80e4" officeooo:paragraph-rsid="02536a10"/>
    </style:style>
    <style:style style:name="P217" style:family="paragraph" style:parent-style-name="Text_20_body">
      <style:paragraph-properties fo:text-align="justify" style:justify-single-word="false"/>
      <style:text-properties officeooo:rsid="009651c8" officeooo:paragraph-rsid="009651c8"/>
    </style:style>
    <style:style style:name="P218" style:family="paragraph" style:parent-style-name="Text_20_body">
      <style:paragraph-properties fo:text-align="justify" style:justify-single-word="false"/>
      <style:text-properties officeooo:rsid="009651c8" officeooo:paragraph-rsid="00e09b4d"/>
    </style:style>
    <style:style style:name="P219" style:family="paragraph" style:parent-style-name="Text_20_body">
      <style:paragraph-properties fo:text-align="justify" style:justify-single-word="false"/>
      <style:text-properties fo:font-size="12pt" style:font-size-asian="12pt" style:font-size-complex="12pt"/>
    </style:style>
    <style:style style:name="P220" style:family="paragraph" style:parent-style-name="Text_20_body">
      <style:paragraph-properties fo:text-align="justify" style:justify-single-word="false"/>
      <style:text-properties fo:font-size="12pt" officeooo:paragraph-rsid="01384537" style:font-size-asian="12pt" style:font-size-complex="12pt"/>
    </style:style>
    <style:style style:name="P221" style:family="paragraph" style:parent-style-name="Text_20_body">
      <style:paragraph-properties fo:text-align="justify" style:justify-single-word="false"/>
      <style:text-properties fo:font-size="12pt" officeooo:paragraph-rsid="013b130e" style:font-size-asian="12pt" style:font-size-complex="12pt"/>
    </style:style>
    <style:style style:name="P222" style:family="paragraph" style:parent-style-name="Text_20_body">
      <style:paragraph-properties fo:text-align="justify" style:justify-single-word="false"/>
      <style:text-properties fo:font-size="12pt" officeooo:paragraph-rsid="013c1462" style:font-size-asian="12pt" style:font-size-complex="12pt"/>
    </style:style>
    <style:style style:name="P223" style:family="paragraph" style:parent-style-name="Text_20_body">
      <style:paragraph-properties fo:text-align="justify" style:justify-single-word="false"/>
      <style:text-properties fo:font-size="12pt" officeooo:paragraph-rsid="01e72eda" style:font-size-asian="12pt" style:font-size-complex="12pt"/>
    </style:style>
    <style:style style:name="P224" style:family="paragraph" style:parent-style-name="Text_20_body">
      <style:paragraph-properties fo:text-align="justify" style:justify-single-word="false"/>
      <style:text-properties fo:font-size="12pt" officeooo:paragraph-rsid="01e78945" style:font-size-asian="12pt" style:font-size-complex="12pt"/>
    </style:style>
    <style:style style:name="P225" style:family="paragraph" style:parent-style-name="Text_20_body">
      <style:paragraph-properties fo:text-align="justify" style:justify-single-word="false"/>
      <style:text-properties fo:font-size="12pt" officeooo:rsid="00a0104c" officeooo:paragraph-rsid="013c1462" style:font-size-asian="12pt" style:font-size-complex="12pt"/>
    </style:style>
    <style:style style:name="P226" style:family="paragraph" style:parent-style-name="Text_20_body">
      <style:paragraph-properties fo:text-align="justify" style:justify-single-word="false"/>
      <style:text-properties fo:font-size="12pt" officeooo:rsid="00a0104c" officeooo:paragraph-rsid="01e72eda" style:font-size-asian="12pt" style:font-size-complex="12pt"/>
    </style:style>
    <style:style style:name="P227" style:family="paragraph" style:parent-style-name="Text_20_body">
      <style:paragraph-properties fo:text-align="justify" style:justify-single-word="false"/>
      <style:text-properties fo:font-size="12pt" officeooo:rsid="00a23bd7" officeooo:paragraph-rsid="00a23bd7" style:font-size-asian="12pt" style:font-size-complex="12pt"/>
    </style:style>
    <style:style style:name="P228" style:family="paragraph" style:parent-style-name="Text_20_body">
      <style:paragraph-properties fo:text-align="justify" style:justify-single-word="false"/>
      <style:text-properties fo:font-size="12pt" officeooo:rsid="00a23bd7" officeooo:paragraph-rsid="013946b2" style:font-size-asian="12pt" style:font-size-complex="12pt"/>
    </style:style>
    <style:style style:name="P229" style:family="paragraph" style:parent-style-name="Text_20_body">
      <style:paragraph-properties fo:text-align="justify" style:justify-single-word="false"/>
      <style:text-properties fo:font-size="12pt" officeooo:rsid="00a42761" officeooo:paragraph-rsid="00a42761" style:font-size-asian="12pt" style:font-size-complex="12pt"/>
    </style:style>
    <style:style style:name="P230" style:family="paragraph" style:parent-style-name="Text_20_body">
      <style:paragraph-properties fo:text-align="justify" style:justify-single-word="false"/>
      <style:text-properties fo:font-size="12pt" officeooo:rsid="01356ae1" officeooo:paragraph-rsid="01356ae1" style:font-size-asian="12pt" style:font-size-complex="12pt"/>
    </style:style>
    <style:style style:name="P231" style:family="paragraph" style:parent-style-name="Text_20_body">
      <style:paragraph-properties fo:text-align="justify" style:justify-single-word="false"/>
      <style:text-properties fo:font-size="12pt" officeooo:rsid="01366ff7" officeooo:paragraph-rsid="01366ff7" style:font-size-asian="12pt" style:font-size-complex="12pt"/>
    </style:style>
    <style:style style:name="P232" style:family="paragraph" style:parent-style-name="Text_20_body">
      <style:paragraph-properties fo:text-align="justify" style:justify-single-word="false"/>
      <style:text-properties fo:font-size="12pt" officeooo:rsid="0136d6af" officeooo:paragraph-rsid="0136d6af" style:font-size-asian="12pt" style:font-size-complex="12pt"/>
    </style:style>
    <style:style style:name="P233" style:family="paragraph" style:parent-style-name="Text_20_body">
      <style:paragraph-properties fo:text-align="justify" style:justify-single-word="false"/>
      <style:text-properties fo:font-size="12pt" officeooo:rsid="0136d6af" officeooo:paragraph-rsid="013b130e" style:font-size-asian="12pt" style:font-size-complex="12pt"/>
    </style:style>
    <style:style style:name="P234" style:family="paragraph" style:parent-style-name="Text_20_body">
      <style:paragraph-properties fo:text-align="justify" style:justify-single-word="false"/>
      <style:text-properties fo:font-size="12pt" officeooo:rsid="013b130e" officeooo:paragraph-rsid="013b130e" style:font-size-asian="12pt" style:font-size-complex="12pt"/>
    </style:style>
    <style:style style:name="P235" style:family="paragraph" style:parent-style-name="Text_20_body">
      <style:paragraph-properties fo:text-align="justify" style:justify-single-word="false"/>
      <style:text-properties fo:font-size="12pt" officeooo:rsid="01bef21c" officeooo:paragraph-rsid="01bef21c" style:font-size-asian="12pt" style:font-size-complex="12pt"/>
    </style:style>
    <style:style style:name="P236" style:family="paragraph" style:parent-style-name="Text_20_body">
      <style:paragraph-properties fo:text-align="justify" style:justify-single-word="false"/>
      <style:text-properties fo:font-size="12pt" officeooo:rsid="013c1462" officeooo:paragraph-rsid="01e72eda" style:font-size-asian="12pt" style:font-size-complex="12pt"/>
    </style:style>
    <style:style style:name="P237" style:family="paragraph" style:parent-style-name="Text_20_body">
      <style:paragraph-properties fo:text-align="justify" style:justify-single-word="false"/>
      <style:text-properties fo:font-size="12pt" officeooo:rsid="009befff" officeooo:paragraph-rsid="01e72eda" style:font-size-asian="12pt" style:font-size-complex="12pt"/>
    </style:style>
    <style:style style:name="P238" style:family="paragraph" style:parent-style-name="Text_20_body">
      <style:paragraph-properties fo:text-align="justify" style:justify-single-word="false"/>
      <style:text-properties fo:font-size="12pt" officeooo:rsid="01c0a3eb" officeooo:paragraph-rsid="01e72eda" style:font-size-asian="12pt" style:font-size-complex="12pt"/>
    </style:style>
    <style:style style:name="P239" style:family="paragraph" style:parent-style-name="Text_20_body">
      <style:paragraph-properties fo:text-align="justify" style:justify-single-word="false"/>
      <style:text-properties fo:font-size="12pt" officeooo:rsid="009de595" officeooo:paragraph-rsid="01e78945" style:font-size-asian="12pt" style:font-size-complex="12pt"/>
    </style:style>
    <style:style style:name="P240" style:family="paragraph" style:parent-style-name="Text_20_body">
      <style:paragraph-properties fo:text-align="justify" style:justify-single-word="false"/>
      <style:text-properties fo:font-size="12pt" officeooo:rsid="01e72eda" officeooo:paragraph-rsid="01e72eda" style:font-size-asian="12pt" style:font-size-complex="12pt"/>
    </style:style>
    <style:style style:name="P241" style:family="paragraph" style:parent-style-name="Standard">
      <style:text-properties fo:font-size="12pt" officeooo:paragraph-rsid="0015acc5" style:font-size-asian="12pt" style:font-size-complex="12pt"/>
    </style:style>
    <style:style style:name="P242" style:family="paragraph" style:parent-style-name="Standard">
      <style:paragraph-properties fo:break-before="page"/>
      <style:text-properties fo:font-size="12pt" officeooo:paragraph-rsid="0015acc5" style:font-size-asian="12pt" style:font-size-complex="12pt"/>
    </style:style>
    <style:style style:name="P243" style:family="paragraph" style:parent-style-name="Standard">
      <style:paragraph-properties fo:text-align="justify" style:justify-single-word="false"/>
      <style:text-properties fo:font-size="12pt" officeooo:rsid="00367657" officeooo:paragraph-rsid="018dd386" style:font-size-asian="12pt" style:font-size-complex="12pt"/>
    </style:style>
    <style:style style:name="P244" style:family="paragraph" style:parent-style-name="Standard">
      <style:paragraph-properties fo:text-align="justify" style:justify-single-word="false"/>
      <style:text-properties fo:font-size="12pt" officeooo:rsid="01bd807f" officeooo:paragraph-rsid="01bd807f" style:font-size-asian="12pt" style:font-size-complex="12pt"/>
    </style:style>
    <style:style style:name="P245" style:family="paragraph" style:parent-style-name="Standard">
      <style:text-properties fo:font-size="12pt" officeooo:paragraph-rsid="02c24afc" style:font-size-asian="12pt" style:font-size-complex="12pt"/>
    </style:style>
    <style:style style:name="P246" style:family="paragraph" style:parent-style-name="Text_20_body">
      <style:paragraph-properties fo:text-align="justify" style:justify-single-word="false"/>
      <style:text-properties fo:font-size="12pt" fo:font-style="normal" officeooo:rsid="01bef21c" officeooo:paragraph-rsid="01bef21c" style:font-size-asian="12pt" style:font-style-asian="normal" style:font-size-complex="12pt" style:font-style-complex="normal"/>
    </style:style>
    <style:style style:name="P247" style:family="paragraph" style:parent-style-name="Text_20_body">
      <style:paragraph-properties fo:text-align="justify" style:justify-single-word="false"/>
      <style:text-properties fo:font-size="12pt" fo:font-style="italic" officeooo:rsid="00a0104c" officeooo:paragraph-rsid="01e72eda" style:font-size-asian="12pt" style:font-style-asian="italic" style:font-size-complex="12pt" style:font-style-complex="italic"/>
    </style:style>
    <style:style style:name="P248" style:family="paragraph" style:parent-style-name="Text_20_body">
      <style:paragraph-properties fo:text-align="justify" style:justify-single-word="false"/>
    </style:style>
    <style:style style:name="P249" style:family="paragraph" style:parent-style-name="Text_20_body">
      <style:paragraph-properties fo:text-align="justify" style:justify-single-word="false"/>
      <style:text-properties officeooo:paragraph-rsid="00b750f1"/>
    </style:style>
    <style:style style:name="P250" style:family="paragraph" style:parent-style-name="Text_20_body">
      <style:paragraph-properties fo:text-align="justify" style:justify-single-word="false"/>
      <style:text-properties officeooo:paragraph-rsid="00c60346"/>
    </style:style>
    <style:style style:name="P251" style:family="paragraph" style:parent-style-name="Text_20_body">
      <style:paragraph-properties fo:text-align="justify" style:justify-single-word="false"/>
      <style:text-properties officeooo:paragraph-rsid="00d4a178"/>
    </style:style>
    <style:style style:name="P252" style:family="paragraph" style:parent-style-name="Text_20_body">
      <style:paragraph-properties fo:text-align="justify" style:justify-single-word="false"/>
      <style:text-properties officeooo:paragraph-rsid="00dbc470"/>
    </style:style>
    <style:style style:name="P253" style:family="paragraph" style:parent-style-name="Text_20_body">
      <style:paragraph-properties fo:text-align="justify" style:justify-single-word="false"/>
      <style:text-properties officeooo:paragraph-rsid="00ee4a51"/>
    </style:style>
    <style:style style:name="P254" style:family="paragraph" style:parent-style-name="Text_20_body">
      <style:paragraph-properties fo:text-align="justify" style:justify-single-word="false"/>
      <style:text-properties officeooo:paragraph-rsid="00f301e7"/>
    </style:style>
    <style:style style:name="P255" style:family="paragraph" style:parent-style-name="Text_20_body">
      <style:paragraph-properties fo:text-align="justify" style:justify-single-word="false"/>
      <style:text-properties officeooo:paragraph-rsid="00fa351f"/>
    </style:style>
    <style:style style:name="P256" style:family="paragraph" style:parent-style-name="Text_20_body">
      <style:paragraph-properties fo:text-align="justify" style:justify-single-word="false"/>
      <style:text-properties officeooo:paragraph-rsid="00c3bf51"/>
    </style:style>
    <style:style style:name="P257" style:family="paragraph" style:parent-style-name="Text_20_body">
      <style:paragraph-properties fo:text-align="justify" style:justify-single-word="false"/>
      <style:text-properties officeooo:paragraph-rsid="011a9437"/>
    </style:style>
    <style:style style:name="P258" style:family="paragraph" style:parent-style-name="Text_20_body">
      <style:paragraph-properties fo:text-align="justify" style:justify-single-word="false"/>
      <style:text-properties officeooo:paragraph-rsid="011fb655"/>
    </style:style>
    <style:style style:name="P259" style:family="paragraph" style:parent-style-name="Text_20_body">
      <style:paragraph-properties fo:text-align="justify" style:justify-single-word="false"/>
      <style:text-properties officeooo:paragraph-rsid="012b03a1"/>
    </style:style>
    <style:style style:name="P260" style:family="paragraph" style:parent-style-name="Text_20_body">
      <style:paragraph-properties fo:text-align="justify" style:justify-single-word="false"/>
      <style:text-properties officeooo:paragraph-rsid="012c8ab3"/>
    </style:style>
    <style:style style:name="P261" style:family="paragraph" style:parent-style-name="Text_20_body">
      <style:paragraph-properties fo:text-align="justify" style:justify-single-word="false"/>
      <style:text-properties officeooo:paragraph-rsid="01353978"/>
    </style:style>
    <style:style style:name="P262" style:family="paragraph" style:parent-style-name="Text_20_body">
      <style:paragraph-properties fo:text-align="justify" style:justify-single-word="false"/>
      <style:text-properties officeooo:paragraph-rsid="013db025"/>
    </style:style>
    <style:style style:name="P263" style:family="paragraph" style:parent-style-name="Text_20_body">
      <style:paragraph-properties fo:text-align="justify" style:justify-single-word="false"/>
      <style:text-properties officeooo:paragraph-rsid="0147a710"/>
    </style:style>
    <style:style style:name="P264" style:family="paragraph" style:parent-style-name="Text_20_body">
      <style:paragraph-properties fo:text-align="justify" style:justify-single-word="false"/>
      <style:text-properties officeooo:paragraph-rsid="015c580a"/>
    </style:style>
    <style:style style:name="P265" style:family="paragraph" style:parent-style-name="Text_20_body">
      <style:paragraph-properties fo:text-align="justify" style:justify-single-word="false"/>
      <style:text-properties officeooo:paragraph-rsid="015d2012"/>
    </style:style>
    <style:style style:name="P266" style:family="paragraph" style:parent-style-name="Text_20_body">
      <style:paragraph-properties fo:text-align="justify" style:justify-single-word="false"/>
      <style:text-properties officeooo:paragraph-rsid="01709f06"/>
    </style:style>
    <style:style style:name="P267" style:family="paragraph" style:parent-style-name="Text_20_body">
      <style:paragraph-properties fo:text-align="justify" style:justify-single-word="false"/>
      <style:text-properties officeooo:paragraph-rsid="018af4c2"/>
    </style:style>
    <style:style style:name="P268" style:family="paragraph" style:parent-style-name="Text_20_body">
      <style:paragraph-properties fo:text-align="justify" style:justify-single-word="false"/>
      <style:text-properties officeooo:paragraph-rsid="0191e7a4"/>
    </style:style>
    <style:style style:name="P269" style:family="paragraph" style:parent-style-name="Text_20_body">
      <style:paragraph-properties fo:text-align="justify" style:justify-single-word="false"/>
      <style:text-properties officeooo:paragraph-rsid="01938924"/>
    </style:style>
    <style:style style:name="P270" style:family="paragraph" style:parent-style-name="Text_20_body">
      <style:paragraph-properties fo:text-align="justify" style:justify-single-word="false"/>
      <style:text-properties officeooo:paragraph-rsid="016a7291"/>
    </style:style>
    <style:style style:name="P271" style:family="paragraph" style:parent-style-name="Text_20_body">
      <style:paragraph-properties fo:text-align="justify" style:justify-single-word="false"/>
      <style:text-properties officeooo:paragraph-rsid="0196d72a"/>
    </style:style>
    <style:style style:name="P272" style:family="paragraph" style:parent-style-name="Text_20_body">
      <style:paragraph-properties fo:text-align="justify" style:justify-single-word="false"/>
      <style:text-properties officeooo:paragraph-rsid="01a5fafe"/>
    </style:style>
    <style:style style:name="P273" style:family="paragraph" style:parent-style-name="Text_20_body">
      <style:paragraph-properties fo:text-align="justify" style:justify-single-word="false"/>
      <style:text-properties officeooo:paragraph-rsid="01a9d45f"/>
    </style:style>
    <style:style style:name="P274" style:family="paragraph" style:parent-style-name="Text_20_body">
      <style:paragraph-properties fo:text-align="justify" style:justify-single-word="false"/>
      <style:text-properties officeooo:paragraph-rsid="01ab787c"/>
    </style:style>
    <style:style style:name="P275" style:family="paragraph" style:parent-style-name="Text_20_body">
      <style:paragraph-properties fo:text-align="justify" style:justify-single-word="false"/>
      <style:text-properties officeooo:paragraph-rsid="0197ac42"/>
    </style:style>
    <style:style style:name="P276" style:family="paragraph" style:parent-style-name="Text_20_body">
      <style:paragraph-properties fo:text-align="justify" style:justify-single-word="false"/>
      <style:text-properties officeooo:paragraph-rsid="01b0e11a"/>
    </style:style>
    <style:style style:name="P277" style:family="paragraph" style:parent-style-name="Text_20_body">
      <style:paragraph-properties fo:text-align="justify" style:justify-single-word="false"/>
      <style:text-properties officeooo:paragraph-rsid="01dc851b"/>
    </style:style>
    <style:style style:name="P278" style:family="paragraph" style:parent-style-name="Text_20_body">
      <style:paragraph-properties fo:text-align="justify" style:justify-single-word="false"/>
      <style:text-properties officeooo:paragraph-rsid="013b130e"/>
    </style:style>
    <style:style style:name="P279" style:family="paragraph" style:parent-style-name="Text_20_body">
      <style:paragraph-properties fo:text-align="justify" style:justify-single-word="false"/>
      <style:text-properties officeooo:paragraph-rsid="01e72eda"/>
    </style:style>
    <style:style style:name="P280" style:family="paragraph" style:parent-style-name="Text_20_body">
      <style:paragraph-properties fo:text-align="justify" style:justify-single-word="false"/>
      <style:text-properties officeooo:paragraph-rsid="00c94374"/>
    </style:style>
    <style:style style:name="P281" style:family="paragraph" style:parent-style-name="Text_20_body">
      <style:paragraph-properties fo:text-align="justify" style:justify-single-word="false"/>
      <style:text-properties officeooo:paragraph-rsid="020048cc"/>
    </style:style>
    <style:style style:name="P282" style:family="paragraph" style:parent-style-name="Text_20_body">
      <style:paragraph-properties fo:text-align="justify" style:justify-single-word="false"/>
      <style:text-properties officeooo:paragraph-rsid="0200ecff"/>
    </style:style>
    <style:style style:name="P283" style:family="paragraph" style:parent-style-name="Text_20_body">
      <style:paragraph-properties fo:text-align="justify" style:justify-single-word="false"/>
      <style:text-properties officeooo:paragraph-rsid="02013b58"/>
    </style:style>
    <style:style style:name="P284" style:family="paragraph" style:parent-style-name="Text_20_body">
      <style:paragraph-properties fo:text-align="justify" style:justify-single-word="false"/>
      <style:text-properties officeooo:paragraph-rsid="02053e65"/>
    </style:style>
    <style:style style:name="P285" style:family="paragraph" style:parent-style-name="Text_20_body">
      <style:paragraph-properties fo:text-align="justify" style:justify-single-word="false"/>
      <style:text-properties officeooo:paragraph-rsid="020b690a"/>
    </style:style>
    <style:style style:name="P286" style:family="paragraph" style:parent-style-name="Text_20_body">
      <style:paragraph-properties fo:text-align="justify" style:justify-single-word="false"/>
      <style:text-properties officeooo:paragraph-rsid="021210e4"/>
    </style:style>
    <style:style style:name="P287" style:family="paragraph" style:parent-style-name="Text_20_body">
      <style:paragraph-properties fo:text-align="justify" style:justify-single-word="false"/>
      <style:text-properties officeooo:paragraph-rsid="0214eced"/>
    </style:style>
    <style:style style:name="P288" style:family="paragraph" style:parent-style-name="Text_20_body">
      <style:paragraph-properties fo:text-align="justify" style:justify-single-word="false"/>
      <style:text-properties officeooo:paragraph-rsid="0216a57e"/>
    </style:style>
    <style:style style:name="P289" style:family="paragraph" style:parent-style-name="Text_20_body">
      <style:paragraph-properties fo:text-align="justify" style:justify-single-word="false"/>
      <style:text-properties officeooo:paragraph-rsid="021cd37d"/>
    </style:style>
    <style:style style:name="P290" style:family="paragraph" style:parent-style-name="Text_20_body">
      <style:paragraph-properties fo:text-align="justify" style:justify-single-word="false"/>
      <style:text-properties officeooo:paragraph-rsid="022091ab"/>
    </style:style>
    <style:style style:name="P291" style:family="paragraph" style:parent-style-name="Text_20_body">
      <style:paragraph-properties fo:text-align="justify" style:justify-single-word="false"/>
      <style:text-properties officeooo:paragraph-rsid="0221558b"/>
    </style:style>
    <style:style style:name="P292" style:family="paragraph" style:parent-style-name="Text_20_body">
      <style:paragraph-properties fo:text-align="justify" style:justify-single-word="false"/>
      <style:text-properties officeooo:paragraph-rsid="0174a334"/>
    </style:style>
    <style:style style:name="P293" style:family="paragraph" style:parent-style-name="Text_20_body">
      <style:paragraph-properties fo:text-align="justify" style:justify-single-word="false"/>
      <style:text-properties officeooo:paragraph-rsid="0122bc96"/>
    </style:style>
    <style:style style:name="P294" style:family="paragraph" style:parent-style-name="Text_20_body">
      <style:paragraph-properties fo:text-align="justify" style:justify-single-word="false"/>
      <style:text-properties officeooo:paragraph-rsid="02290621"/>
    </style:style>
    <style:style style:name="P295" style:family="paragraph" style:parent-style-name="Text_20_body">
      <style:paragraph-properties fo:text-align="justify" style:justify-single-word="false"/>
      <style:text-properties officeooo:paragraph-rsid="024be79a"/>
    </style:style>
    <style:style style:name="P296" style:family="paragraph" style:parent-style-name="Text_20_body">
      <style:paragraph-properties fo:text-align="justify" style:justify-single-word="false"/>
      <style:text-properties officeooo:paragraph-rsid="027922da"/>
    </style:style>
    <style:style style:name="P297" style:family="paragraph" style:parent-style-name="Text_20_body">
      <style:paragraph-properties fo:text-align="justify" style:justify-single-word="false"/>
      <style:text-properties officeooo:paragraph-rsid="02882585"/>
    </style:style>
    <style:style style:name="P298" style:family="paragraph" style:parent-style-name="Text_20_body">
      <style:paragraph-properties fo:text-align="justify" style:justify-single-word="false"/>
      <style:text-properties officeooo:paragraph-rsid="0289b66f"/>
    </style:style>
    <style:style style:name="P299" style:family="paragraph" style:parent-style-name="Text_20_body">
      <style:paragraph-properties fo:text-align="justify" style:justify-single-word="false"/>
      <style:text-properties officeooo:paragraph-rsid="028a2d1b"/>
    </style:style>
    <style:style style:name="P300" style:family="paragraph" style:parent-style-name="Text_20_body">
      <style:paragraph-properties fo:text-align="justify" style:justify-single-word="false"/>
      <style:text-properties officeooo:paragraph-rsid="028a5d60"/>
    </style:style>
    <style:style style:name="P301" style:family="paragraph" style:parent-style-name="Text_20_body">
      <style:paragraph-properties fo:text-align="justify" style:justify-single-word="false"/>
      <style:text-properties officeooo:paragraph-rsid="02624722"/>
    </style:style>
    <style:style style:name="P302" style:family="paragraph" style:parent-style-name="Standard">
      <style:paragraph-properties fo:text-align="justify" style:justify-single-word="false"/>
      <style:text-properties officeooo:paragraph-rsid="017a2d63"/>
    </style:style>
    <style:style style:name="P303" style:family="paragraph" style:parent-style-name="Text_20_body">
      <style:paragraph-properties fo:text-align="justify" style:justify-single-word="false" fo:break-before="page"/>
    </style:style>
    <style:style style:name="P304" style:family="paragraph" style:parent-style-name="Text_20_body">
      <style:paragraph-properties fo:text-align="justify" style:justify-single-word="false"/>
      <style:text-properties officeooo:paragraph-rsid="02b289ea"/>
    </style:style>
    <style:style style:name="P305" style:family="paragraph" style:parent-style-name="Text_20_body">
      <style:paragraph-properties fo:text-align="justify" style:justify-single-word="false"/>
      <style:text-properties officeooo:paragraph-rsid="02ba626d"/>
    </style:style>
    <style:style style:name="P306" style:family="paragraph" style:parent-style-name="Text_20_body">
      <style:paragraph-properties fo:text-align="justify" style:justify-single-word="false"/>
      <style:text-properties officeooo:paragraph-rsid="016f0976"/>
    </style:style>
    <style:style style:name="P307" style:family="paragraph" style:parent-style-name="Text_20_body">
      <style:paragraph-properties fo:text-align="justify" style:justify-single-word="false"/>
      <style:text-properties officeooo:paragraph-rsid="01347634"/>
    </style:style>
    <style:style style:name="P308" style:family="paragraph" style:parent-style-name="Standard">
      <style:paragraph-properties fo:text-align="justify" style:justify-single-word="false"/>
      <style:text-properties officeooo:paragraph-rsid="0140361b"/>
    </style:style>
    <style:style style:name="P309" style:family="paragraph" style:parent-style-name="Text_20_body">
      <style:paragraph-properties fo:text-align="justify" style:justify-single-word="false"/>
      <style:text-properties officeooo:paragraph-rsid="02c42c1c"/>
    </style:style>
    <style:style style:name="P310" style:family="paragraph" style:parent-style-name="Text_20_body">
      <style:paragraph-properties fo:text-align="justify" style:justify-single-word="false"/>
      <style:text-properties officeooo:paragraph-rsid="012894fd"/>
    </style:style>
    <style:style style:name="P311" style:family="paragraph" style:parent-style-name="Text_20_body">
      <style:text-properties officeooo:paragraph-rsid="001718b7"/>
    </style:style>
    <style:style style:name="P312" style:family="paragraph" style:parent-style-name="Text_20_body">
      <style:paragraph-properties fo:text-align="center" style:justify-single-word="false"/>
    </style:style>
    <style:style style:name="P313" style:family="paragraph" style:parent-style-name="Text_20_body">
      <style:paragraph-properties fo:text-align="justify" style:justify-single-word="false"/>
      <style:text-properties officeooo:rsid="00b30817" officeooo:paragraph-rsid="00b30817"/>
    </style:style>
    <style:style style:name="P314" style:family="paragraph" style:parent-style-name="Text_20_body">
      <style:paragraph-properties fo:text-align="justify" style:justify-single-word="false"/>
      <style:text-properties officeooo:rsid="00b30817" officeooo:paragraph-rsid="01127369"/>
    </style:style>
    <style:style style:name="P315" style:family="paragraph" style:parent-style-name="Text_20_body">
      <style:paragraph-properties fo:text-align="justify" style:justify-single-word="false"/>
      <style:text-properties officeooo:rsid="00b30817" officeooo:paragraph-rsid="01132c0c"/>
    </style:style>
    <style:style style:name="P316" style:family="paragraph" style:parent-style-name="Text_20_body">
      <style:paragraph-properties fo:text-align="justify" style:justify-single-word="false"/>
      <style:text-properties officeooo:rsid="00b30817" officeooo:paragraph-rsid="00b185a9"/>
    </style:style>
    <style:style style:name="P317" style:family="paragraph" style:parent-style-name="Text_20_body">
      <style:paragraph-properties fo:text-align="justify" style:justify-single-word="false"/>
      <style:text-properties officeooo:rsid="00b43067" officeooo:paragraph-rsid="00b43067"/>
    </style:style>
    <style:style style:name="P318" style:family="paragraph" style:parent-style-name="Text_20_body">
      <style:paragraph-properties fo:text-align="justify" style:justify-single-word="false"/>
      <style:text-properties officeooo:rsid="00b43067" officeooo:paragraph-rsid="00b4eabe"/>
    </style:style>
    <style:style style:name="P319" style:family="paragraph" style:parent-style-name="Text_20_body">
      <style:paragraph-properties fo:text-align="justify" style:justify-single-word="false"/>
      <style:text-properties officeooo:rsid="00b43067" officeooo:paragraph-rsid="00b58e56"/>
    </style:style>
    <style:style style:name="P320" style:family="paragraph" style:parent-style-name="Text_20_body">
      <style:paragraph-properties fo:text-align="justify" style:justify-single-word="false"/>
      <style:text-properties officeooo:rsid="00b4eabe" officeooo:paragraph-rsid="00b4eabe"/>
    </style:style>
    <style:style style:name="P321" style:family="paragraph" style:parent-style-name="Text_20_body">
      <style:paragraph-properties fo:text-align="justify" style:justify-single-word="false"/>
      <style:text-properties officeooo:rsid="00b4eabe" officeooo:paragraph-rsid="01ec689e"/>
    </style:style>
    <style:style style:name="P322" style:family="paragraph" style:parent-style-name="Text_20_body">
      <style:paragraph-properties fo:text-align="justify" style:justify-single-word="false"/>
      <style:text-properties officeooo:rsid="00b55992" officeooo:paragraph-rsid="00b55992"/>
    </style:style>
    <style:style style:name="P323" style:family="paragraph" style:parent-style-name="Text_20_body">
      <style:paragraph-properties fo:text-align="justify" style:justify-single-word="false"/>
      <style:text-properties officeooo:rsid="00b58e56" officeooo:paragraph-rsid="00b58e56"/>
    </style:style>
    <style:style style:name="P324" style:family="paragraph" style:parent-style-name="Text_20_body">
      <style:paragraph-properties fo:text-align="justify" style:justify-single-word="false"/>
      <style:text-properties officeooo:rsid="00b750f1" officeooo:paragraph-rsid="00b750f1"/>
    </style:style>
    <style:style style:name="P325" style:family="paragraph" style:parent-style-name="Text_20_body">
      <style:paragraph-properties fo:text-align="justify" style:justify-single-word="false"/>
      <style:text-properties officeooo:rsid="00b750f1" officeooo:paragraph-rsid="0154b916"/>
    </style:style>
    <style:style style:name="P326" style:family="paragraph" style:parent-style-name="Text_20_body">
      <style:paragraph-properties fo:text-align="justify" style:justify-single-word="false"/>
      <style:text-properties officeooo:rsid="00b77f06" officeooo:paragraph-rsid="00b77f06"/>
    </style:style>
    <style:style style:name="P327" style:family="paragraph" style:parent-style-name="Text_20_body">
      <style:paragraph-properties fo:text-align="justify" style:justify-single-word="false"/>
      <style:text-properties officeooo:rsid="00bf92fb" officeooo:paragraph-rsid="00bf92fb"/>
    </style:style>
    <style:style style:name="P328" style:family="paragraph" style:parent-style-name="Text_20_body">
      <style:paragraph-properties fo:text-align="justify" style:justify-single-word="false"/>
      <style:text-properties officeooo:rsid="00c1849a" officeooo:paragraph-rsid="00c1849a"/>
    </style:style>
    <style:style style:name="P329" style:family="paragraph" style:parent-style-name="Text_20_body">
      <style:paragraph-properties fo:text-align="justify" style:justify-single-word="false"/>
      <style:text-properties officeooo:rsid="00c3bf51" officeooo:paragraph-rsid="00c3bf51"/>
    </style:style>
    <style:style style:name="P330" style:family="paragraph" style:parent-style-name="Text_20_body">
      <style:text-properties officeooo:paragraph-rsid="00c3bf51"/>
    </style:style>
    <style:style style:name="P331" style:family="paragraph" style:parent-style-name="Text_20_body">
      <style:paragraph-properties fo:text-align="justify" style:justify-single-word="false"/>
      <style:text-properties officeooo:rsid="00c41ae9" officeooo:paragraph-rsid="00c41ae9"/>
    </style:style>
    <style:style style:name="P332" style:family="paragraph" style:parent-style-name="Text_20_body">
      <style:paragraph-properties fo:text-align="justify" style:justify-single-word="false"/>
      <style:text-properties officeooo:rsid="00c52114" officeooo:paragraph-rsid="00c52114"/>
    </style:style>
    <style:style style:name="P333" style:family="paragraph" style:parent-style-name="Text_20_body">
      <style:paragraph-properties fo:text-align="justify" style:justify-single-word="false"/>
      <style:text-properties style:font-name="monospace" officeooo:rsid="012b03a1" officeooo:paragraph-rsid="012d6568"/>
    </style:style>
    <style:style style:name="P334" style:family="paragraph" style:parent-style-name="Text_20_body">
      <style:paragraph-properties fo:text-align="justify" style:justify-single-word="false"/>
      <style:text-properties officeooo:rsid="00cb2274" officeooo:paragraph-rsid="00ccca20"/>
    </style:style>
    <style:style style:name="P335" style:family="paragraph" style:parent-style-name="Text_20_body">
      <style:paragraph-properties fo:text-align="justify" style:justify-single-word="false"/>
      <style:text-properties officeooo:rsid="00cb2274" officeooo:paragraph-rsid="0115b6a5"/>
    </style:style>
    <style:style style:name="P336" style:family="paragraph" style:parent-style-name="Text_20_body">
      <style:paragraph-properties fo:text-align="justify" style:justify-single-word="false"/>
      <style:text-properties officeooo:rsid="00ccca20" officeooo:paragraph-rsid="00ccca20"/>
    </style:style>
    <style:style style:name="P337" style:family="paragraph" style:parent-style-name="Text_20_body">
      <style:paragraph-properties fo:text-align="justify" style:justify-single-word="false"/>
      <style:text-properties officeooo:rsid="00ce6c1a" officeooo:paragraph-rsid="00d2265d"/>
    </style:style>
    <style:style style:name="P338" style:family="paragraph" style:parent-style-name="Text_20_body">
      <style:paragraph-properties fo:text-align="justify" style:justify-single-word="false"/>
      <style:text-properties officeooo:rsid="00ce6c1a" officeooo:paragraph-rsid="01571c7c"/>
    </style:style>
    <style:style style:name="P339" style:family="paragraph" style:parent-style-name="Text_20_body">
      <style:paragraph-properties fo:text-align="justify" style:justify-single-word="false"/>
      <style:text-properties officeooo:rsid="00d4a178" officeooo:paragraph-rsid="00d4a178"/>
    </style:style>
    <style:style style:name="P340" style:family="paragraph" style:parent-style-name="Text_20_body">
      <style:paragraph-properties fo:text-align="justify" style:justify-single-word="false"/>
      <style:text-properties officeooo:rsid="00d4a178" officeooo:paragraph-rsid="0136d6af"/>
    </style:style>
    <style:style style:name="P341" style:family="paragraph" style:parent-style-name="Text_20_body">
      <style:paragraph-properties fo:text-align="justify" style:justify-single-word="false"/>
      <style:text-properties officeooo:rsid="00d4a952" officeooo:paragraph-rsid="00d4a952"/>
    </style:style>
    <style:style style:name="P342" style:family="paragraph" style:parent-style-name="Text_20_body">
      <style:paragraph-properties fo:text-align="justify" style:justify-single-word="false"/>
      <style:text-properties officeooo:rsid="00d4a952" officeooo:paragraph-rsid="01028b9e"/>
    </style:style>
    <style:style style:name="P343" style:family="paragraph" style:parent-style-name="Text_20_body">
      <style:paragraph-properties fo:text-align="justify" style:justify-single-word="false"/>
      <style:text-properties officeooo:rsid="00d4a952" officeooo:paragraph-rsid="010ec03e"/>
    </style:style>
    <style:style style:name="P344" style:family="paragraph" style:parent-style-name="Text_20_body">
      <style:paragraph-properties fo:text-align="justify" style:justify-single-word="false"/>
      <style:text-properties officeooo:rsid="00d4a952" officeooo:paragraph-rsid="010ebe58"/>
    </style:style>
    <style:style style:name="P345" style:family="paragraph" style:parent-style-name="Text_20_body">
      <style:paragraph-properties fo:text-align="justify" style:justify-single-word="false"/>
      <style:text-properties officeooo:rsid="00d6056d" officeooo:paragraph-rsid="00d6056d"/>
    </style:style>
    <style:style style:name="P346" style:family="paragraph" style:parent-style-name="Text_20_body">
      <style:paragraph-properties fo:text-align="justify" style:justify-single-word="false"/>
      <style:text-properties officeooo:rsid="00d6056d" officeooo:paragraph-rsid="02c4e25e"/>
    </style:style>
    <style:style style:name="P347" style:family="paragraph" style:parent-style-name="Text_20_body">
      <style:text-properties officeooo:rsid="00df77cf" officeooo:paragraph-rsid="00df77cf"/>
    </style:style>
    <style:style style:name="P348" style:family="paragraph" style:parent-style-name="Text_20_body">
      <style:text-properties officeooo:rsid="00df77cf" officeooo:paragraph-rsid="011aac0f"/>
    </style:style>
    <style:style style:name="P349" style:family="paragraph" style:parent-style-name="Text_20_body">
      <style:text-properties officeooo:rsid="00df77cf" officeooo:paragraph-rsid="02536a10"/>
    </style:style>
    <style:style style:name="P350" style:family="paragraph" style:parent-style-name="Text_20_body">
      <style:text-properties fo:font-style="italic" style:font-style-asian="italic" style:font-style-complex="italic"/>
    </style:style>
    <style:style style:name="P351" style:family="paragraph" style:parent-style-name="Text_20_body">
      <style:text-properties fo:font-style="italic" officeooo:rsid="00df735b" officeooo:paragraph-rsid="00df735b" style:font-style-asian="italic" style:font-style-complex="italic"/>
    </style:style>
    <style:style style:name="P352" style:family="paragraph" style:parent-style-name="Text_20_body">
      <style:text-properties fo:font-style="italic" officeooo:rsid="01a9d3f3" officeooo:paragraph-rsid="01a9d3f3" style:font-style-asian="italic" style:font-style-complex="italic"/>
    </style:style>
    <style:style style:name="P353" style:family="paragraph" style:parent-style-name="Text_20_body">
      <style:paragraph-properties fo:text-align="start" style:justify-single-word="false"/>
      <style:text-properties fo:font-style="italic" officeooo:rsid="020e6dd3" officeooo:paragraph-rsid="020e6dd3" style:font-style-asian="italic" style:font-style-complex="italic"/>
    </style:style>
    <style:style style:name="P354" style:family="paragraph" style:parent-style-name="Text_20_body">
      <style:paragraph-properties fo:text-align="justify" style:justify-single-word="false"/>
      <style:text-properties fo:font-style="italic" style:font-style-asian="italic" style:font-style-complex="italic"/>
    </style:style>
    <style:style style:name="P355" style:family="paragraph" style:parent-style-name="Text_20_body">
      <style:text-properties fo:font-style="italic" officeooo:paragraph-rsid="02476d03" style:font-style-asian="italic" style:font-style-complex="italic"/>
    </style:style>
    <style:style style:name="P356" style:family="paragraph" style:parent-style-name="Text_20_body">
      <style:paragraph-properties fo:text-align="justify" style:justify-single-word="false"/>
      <style:text-properties fo:font-style="italic" fo:font-weight="bold" officeooo:rsid="00e2e9ac" officeooo:paragraph-rsid="016c8ab2" style:font-style-asian="italic" style:font-weight-asian="bold" style:font-style-complex="italic" style:font-weight-complex="bold"/>
    </style:style>
    <style:style style:name="P357" style:family="paragraph" style:parent-style-name="Text_20_body">
      <style:paragraph-properties fo:text-align="justify" style:justify-single-word="false"/>
      <style:text-properties fo:font-style="italic" fo:font-weight="bold" officeooo:rsid="00351111" officeooo:paragraph-rsid="02013b58" style:font-style-asian="italic" style:font-weight-asian="bold" style:font-style-complex="italic" style:font-weight-complex="bold"/>
    </style:style>
    <style:style style:name="P358" style:family="paragraph" style:parent-style-name="Text_20_body">
      <style:paragraph-properties fo:text-align="justify" style:justify-single-word="false"/>
      <style:text-properties fo:font-weight="bold" officeooo:rsid="01bd7ee4" officeooo:paragraph-rsid="01bd7ee4" style:font-weight-asian="bold" style:font-weight-complex="bold"/>
    </style:style>
    <style:style style:name="P359" style:family="paragraph" style:parent-style-name="Text_20_body">
      <style:paragraph-properties fo:text-align="justify" style:justify-single-word="false"/>
      <style:text-properties officeooo:rsid="00e91e91" officeooo:paragraph-rsid="00e91e91"/>
    </style:style>
    <style:style style:name="P360" style:family="paragraph" style:parent-style-name="Text_20_body">
      <style:paragraph-properties fo:text-align="start" style:justify-single-word="false"/>
    </style:style>
    <style:style style:name="P361" style:family="paragraph" style:parent-style-name="Text_20_body">
      <style:paragraph-properties fo:text-align="start" style:justify-single-word="false"/>
      <style:text-properties officeooo:paragraph-rsid="0160b24f"/>
    </style:style>
    <style:style style:name="P362" style:family="paragraph" style:parent-style-name="Text_20_body">
      <style:paragraph-properties fo:text-align="start" style:justify-single-word="false">
        <style:tab-stops/>
      </style:paragraph-properties>
    </style:style>
    <style:style style:name="P363" style:family="paragraph" style:parent-style-name="Text_20_body">
      <style:paragraph-properties fo:text-align="start" style:justify-single-word="false">
        <style:tab-stops/>
      </style:paragraph-properties>
      <style:text-properties officeooo:paragraph-rsid="001718b7"/>
    </style:style>
    <style:style style:name="P364" style:family="paragraph" style:parent-style-name="Text_20_body">
      <style:paragraph-properties fo:text-align="start" style:justify-single-word="false"/>
      <style:text-properties officeooo:paragraph-rsid="01ad6aae"/>
    </style:style>
    <style:style style:name="P365" style:family="paragraph" style:parent-style-name="Text_20_body">
      <style:paragraph-properties fo:text-align="start" style:justify-single-word="false"/>
      <style:text-properties officeooo:paragraph-rsid="012b03a1"/>
    </style:style>
    <style:style style:name="P366" style:family="paragraph" style:parent-style-name="Text_20_body">
      <style:paragraph-properties fo:text-align="start" style:justify-single-word="false"/>
      <style:text-properties officeooo:paragraph-rsid="0214eced"/>
    </style:style>
    <style:style style:name="P367" style:family="paragraph" style:parent-style-name="Text_20_body">
      <style:paragraph-properties fo:text-align="start" style:justify-single-word="false"/>
      <style:text-properties officeooo:paragraph-rsid="0221558b"/>
    </style:style>
    <style:style style:name="P368" style:family="paragraph" style:parent-style-name="Text_20_body">
      <style:paragraph-properties fo:text-align="start" style:justify-single-word="false"/>
      <style:text-properties officeooo:paragraph-rsid="014a20fc"/>
    </style:style>
    <style:style style:name="P369" style:family="paragraph" style:parent-style-name="Text_20_body">
      <style:paragraph-properties fo:text-align="start" style:justify-single-word="false"/>
      <style:text-properties officeooo:paragraph-rsid="02bfcec6"/>
    </style:style>
    <style:style style:name="P370" style:family="paragraph" style:parent-style-name="Text_20_body">
      <style:paragraph-properties fo:text-align="justify" style:justify-single-word="false"/>
      <style:text-properties officeooo:rsid="00f1e4d1" officeooo:paragraph-rsid="00f1e4d1"/>
    </style:style>
    <style:style style:name="P371" style:family="paragraph" style:parent-style-name="Text_20_body">
      <style:paragraph-properties fo:text-align="justify" style:justify-single-word="false"/>
      <style:text-properties officeooo:rsid="00f301e7" officeooo:paragraph-rsid="00f301e7"/>
    </style:style>
    <style:style style:name="P372" style:family="paragraph" style:parent-style-name="Text_20_body">
      <style:paragraph-properties fo:text-align="justify" style:justify-single-word="false"/>
      <style:text-properties officeooo:rsid="00f301e7" officeooo:paragraph-rsid="022091ab"/>
    </style:style>
    <style:style style:name="P373" style:family="paragraph" style:parent-style-name="Text_20_body">
      <style:paragraph-properties fo:text-align="justify" style:justify-single-word="false"/>
      <style:text-properties officeooo:rsid="00f38132" officeooo:paragraph-rsid="0221558b"/>
    </style:style>
    <style:style style:name="P374" style:family="paragraph" style:parent-style-name="Text_20_body">
      <style:paragraph-properties fo:text-align="justify" style:justify-single-word="false"/>
      <style:text-properties officeooo:rsid="00f38132" officeooo:paragraph-rsid="00f38132"/>
    </style:style>
    <style:style style:name="P375" style:family="paragraph" style:parent-style-name="Text_20_body">
      <style:paragraph-properties fo:text-align="start" style:justify-single-word="false"/>
      <style:text-properties officeooo:rsid="00f38132" officeooo:paragraph-rsid="0221558b"/>
    </style:style>
    <style:style style:name="P376" style:family="paragraph" style:parent-style-name="Text_20_body">
      <style:paragraph-properties fo:text-align="start" style:justify-single-word="false"/>
      <style:text-properties officeooo:rsid="00351111" officeooo:paragraph-rsid="00f48725"/>
    </style:style>
    <style:style style:name="P377" style:family="paragraph" style:parent-style-name="Standard">
      <style:text-properties officeooo:rsid="00351111" officeooo:paragraph-rsid="00351111"/>
    </style:style>
    <style:style style:name="P378" style:family="paragraph" style:parent-style-name="Text_20_body">
      <style:paragraph-properties fo:text-align="justify" style:justify-single-word="false"/>
      <style:text-properties officeooo:rsid="00f9aa71" officeooo:paragraph-rsid="0136d6af"/>
    </style:style>
    <style:style style:name="P379" style:family="paragraph" style:parent-style-name="Text_20_body">
      <style:paragraph-properties fo:text-align="justify" style:justify-single-word="false"/>
      <style:text-properties officeooo:rsid="00fa351f" officeooo:paragraph-rsid="00fa351f"/>
    </style:style>
    <style:style style:name="P380" style:family="paragraph" style:parent-style-name="Text_20_body">
      <style:paragraph-properties fo:text-align="justify" style:justify-single-word="false"/>
      <style:text-properties officeooo:rsid="00fbb65c" officeooo:paragraph-rsid="0136d6af"/>
    </style:style>
    <style:style style:name="P381" style:family="paragraph" style:parent-style-name="Text_20_body">
      <style:paragraph-properties fo:text-align="justify" style:justify-single-word="false"/>
      <style:text-properties officeooo:rsid="00fd1f9f" officeooo:paragraph-rsid="0136d6af"/>
    </style:style>
    <style:style style:name="P382" style:family="paragraph" style:parent-style-name="Text_20_body">
      <style:paragraph-properties fo:text-align="justify" style:justify-single-word="false"/>
      <style:text-properties officeooo:rsid="00fdbfbd" officeooo:paragraph-rsid="0136d6af"/>
    </style:style>
    <style:style style:name="P383" style:family="paragraph" style:parent-style-name="Text_20_body">
      <style:paragraph-properties fo:text-align="justify" style:justify-single-word="false"/>
      <style:text-properties officeooo:rsid="00fe124c" officeooo:paragraph-rsid="0136d6af"/>
    </style:style>
    <style:style style:name="P384" style:family="paragraph" style:parent-style-name="Text_20_body">
      <style:paragraph-properties fo:text-align="justify" style:justify-single-word="false"/>
      <style:text-properties officeooo:rsid="00fffd4a" officeooo:paragraph-rsid="0136d6af"/>
    </style:style>
    <style:style style:name="P385" style:family="paragraph" style:parent-style-name="Text_20_body">
      <style:paragraph-properties fo:text-align="justify" style:justify-single-word="false"/>
      <style:text-properties officeooo:rsid="01012faa" officeooo:paragraph-rsid="0136d6af"/>
    </style:style>
    <style:style style:name="P386" style:family="paragraph" style:parent-style-name="Text_20_body">
      <style:paragraph-properties fo:text-align="justify" style:justify-single-word="false"/>
      <style:text-properties officeooo:rsid="01022773" officeooo:paragraph-rsid="013b130e"/>
    </style:style>
    <style:style style:name="P387" style:family="paragraph" style:parent-style-name="Text_20_body">
      <style:paragraph-properties fo:text-align="justify" style:justify-single-word="false"/>
      <style:text-properties officeooo:rsid="01022773" officeooo:paragraph-rsid="013c1462"/>
    </style:style>
    <style:style style:name="P388" style:family="paragraph" style:parent-style-name="Text_20_body">
      <style:paragraph-properties fo:text-align="start" style:justify-single-word="false"/>
      <style:text-properties fo:color="#000000" loext:opacity="100%" style:font-name="Liberation Mono" officeooo:rsid="01022773" officeooo:paragraph-rsid="013b130e" fo:background-color="#ffffff"/>
    </style:style>
    <style:style style:name="P389" style:family="paragraph" style:parent-style-name="Text_20_body">
      <style:paragraph-properties fo:text-align="start" style:justify-single-word="false"/>
      <style:text-properties fo:color="#000000" loext:opacity="100%" style:font-name="Liberation Mono" officeooo:paragraph-rsid="0214eced" fo:background-color="#ffffff"/>
    </style:style>
    <style:style style:name="P390" style:family="paragraph" style:parent-style-name="Text_20_body">
      <style:paragraph-properties fo:text-align="start" style:justify-single-word="false"/>
      <style:text-properties fo:color="#000000" loext:opacity="100%" style:font-name="Liberation Mono" officeooo:rsid="011178dc" officeooo:paragraph-rsid="023754ab" fo:background-color="#ffffff"/>
    </style:style>
    <style:style style:name="P391" style:family="paragraph" style:parent-style-name="Text_20_body">
      <style:paragraph-properties fo:text-align="justify" style:justify-single-word="false"/>
      <style:text-properties fo:color="#000000" loext:opacity="100%" style:font-name="Liberation Mono" fo:font-size="12pt" officeooo:rsid="01366ff7" officeooo:paragraph-rsid="01366ff7" fo:background-color="#ffffff" style:font-size-asian="12pt" style:font-size-complex="12pt"/>
    </style:style>
    <style:style style:name="P392" style:family="paragraph" style:parent-style-name="Text_20_body">
      <style:paragraph-properties fo:text-align="start" style:justify-single-word="false"/>
      <style:text-properties fo:color="#000000" loext:opacity="100%" style:font-name="Liberation Mono" fo:font-size="6.40000009536743pt" officeooo:rsid="00c7dbf5" officeooo:paragraph-rsid="01f3744c" fo:background-color="#ffffff" style:font-size-asian="6.40000009536743pt" style:font-size-complex="6.40000009536743pt"/>
    </style:style>
    <style:style style:name="P393" style:family="paragraph" style:parent-style-name="Text_20_body">
      <style:paragraph-properties fo:text-align="start" style:justify-single-word="false"/>
      <style:text-properties fo:color="#000000" loext:opacity="100%" style:font-name="Arial1" officeooo:rsid="01028b9e" officeooo:paragraph-rsid="013b130e" fo:background-color="#ffffff"/>
    </style:style>
    <style:style style:name="P394" style:family="paragraph" style:parent-style-name="Text_20_body">
      <style:text-properties fo:color="#000000" loext:opacity="100%" style:font-name="Arial1" officeooo:paragraph-rsid="012d6568" fo:background-color="#ffffff"/>
    </style:style>
    <style:style style:name="P395" style:family="paragraph" style:parent-style-name="Text_20_body">
      <style:paragraph-properties fo:text-align="justify" style:justify-single-word="false"/>
      <style:text-properties fo:color="#000000" loext:opacity="100%" style:font-name="Arial1" officeooo:rsid="00f1e4d1" officeooo:paragraph-rsid="0214eced" fo:background-color="#ffffff"/>
    </style:style>
    <style:style style:name="P396" style:family="paragraph" style:parent-style-name="Text_20_body">
      <style:paragraph-properties fo:text-align="justify" style:justify-single-word="false"/>
      <style:text-properties fo:color="#000000" loext:opacity="100%" style:font-name="Arial1" fo:font-style="italic" officeooo:rsid="010484fc" officeooo:paragraph-rsid="013b130e" fo:background-color="#ffffff" style:font-style-asian="italic" style:font-style-complex="italic"/>
    </style:style>
    <style:style style:name="P397" style:family="paragraph" style:parent-style-name="Text_20_body">
      <style:paragraph-properties fo:text-align="start" style:justify-single-word="false"/>
      <style:text-properties fo:color="#000000" loext:opacity="100%" style:font-name="Arial1" fo:font-weight="normal" officeooo:rsid="014a1c05" officeooo:paragraph-rsid="014a1c05" fo:background-color="#ffffff" style:font-weight-asian="normal" style:font-weight-complex="normal"/>
    </style:style>
    <style:style style:name="P398" style:family="paragraph" style:parent-style-name="Text_20_body">
      <style:paragraph-properties fo:text-align="start" style:justify-single-word="false"/>
      <style:text-properties fo:color="#000000" loext:opacity="100%" style:font-name="Arial1" fo:font-weight="normal" officeooo:rsid="01bd807f" officeooo:paragraph-rsid="01bd807f" fo:background-color="#ffffff" style:font-weight-asian="normal" style:font-weight-complex="normal"/>
    </style:style>
    <style:style style:name="P399" style:family="paragraph" style:parent-style-name="Text_20_body">
      <style:paragraph-properties fo:text-align="start" style:justify-single-word="false"/>
      <style:text-properties fo:color="#000000" loext:opacity="100%" style:font-name="Arial1" fo:font-weight="normal" officeooo:rsid="01c141a9" officeooo:paragraph-rsid="01c141a9" fo:background-color="#ffffff" style:font-weight-asian="normal" style:font-weight-complex="normal"/>
    </style:style>
    <style:style style:name="P400" style:family="paragraph" style:parent-style-name="Text_20_body">
      <style:paragraph-properties fo:text-align="start" style:justify-single-word="false"/>
      <style:text-properties fo:color="#000000" loext:opacity="100%" style:font-name="Arial1" fo:font-weight="normal" officeooo:rsid="014a1c05" officeooo:paragraph-rsid="014a1c05" style:font-weight-asian="normal" style:font-weight-complex="normal"/>
    </style:style>
    <style:style style:name="P401" style:family="paragraph" style:parent-style-name="Text_20_body">
      <style:paragraph-properties fo:text-align="start" style:justify-single-word="false"/>
      <style:text-properties fo:color="#000000" loext:opacity="100%" style:font-name="Arial1" fo:font-weight="normal" officeooo:rsid="014a1c05" officeooo:paragraph-rsid="024be79a" style:font-weight-asian="normal" style:font-weight-complex="normal"/>
    </style:style>
    <style:style style:name="P402" style:family="paragraph" style:parent-style-name="Text_20_body">
      <style:paragraph-properties fo:text-align="justify"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3" style:family="paragraph" style:parent-style-name="Text_20_body">
      <style:paragraph-properties fo:text-align="justify"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0a945c1"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0c1849a"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0d8ddbf"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230c49"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230c49"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44c9b1"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1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4c1c50"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1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9da731"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77077"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81eb1"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6d60e1" officeooo:paragraph-rsid="026d60e1" style:font-size-asian="11pt" style:font-style-asian="normal" style:font-weight-asian="normal" style:font-size-complex="11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6f2051" officeooo:paragraph-rsid="026f2051" style:font-size-asian="11pt" style:font-style-asian="normal" style:font-weight-asian="normal" style:font-size-complex="11pt" style:font-style-complex="normal" style:font-weight-complex="normal" style:text-overline-style="none" style:text-overline-color="font-color"/>
    </style:style>
    <style:style style:name="P4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abafb7" officeooo:paragraph-rsid="02abafb7" style:font-size-asian="11pt" style:font-style-asian="normal" style:font-weight-asian="normal" style:font-size-complex="11pt" style:font-style-complex="normal" style:font-weight-complex="normal" style:text-overline-style="none" style:text-overline-color="font-color"/>
    </style:style>
    <style:style style:name="P4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c0fdbe" officeooo:paragraph-rsid="02c0fdbe" style:font-size-asian="11pt" style:font-style-asian="normal" style:font-weight-asian="normal" style:font-size-complex="11pt" style:font-style-complex="normal" style:font-weight-complex="normal" style:text-overline-style="none" style:text-overline-color="font-color"/>
    </style:style>
    <style:style style:name="P4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c42c1c" officeooo:paragraph-rsid="02c42c1c" style:font-size-asian="11pt" style:font-style-asian="normal" style:font-weight-asian="normal" style:font-size-complex="11pt" style:font-style-complex="normal" style:font-weight-complex="normal" style:text-overline-style="none" style:text-overline-color="font-color"/>
    </style:style>
    <style:style style:name="P4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c660b1" officeooo:paragraph-rsid="02c660b1" style:font-size-asian="11pt" style:font-style-asian="normal" style:font-weight-asian="normal" style:font-size-complex="11pt" style:font-style-complex="normal" style:font-weight-complex="normal" style:text-overline-style="none" style:text-overline-color="font-color"/>
    </style:style>
    <style:style style:name="P42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e5e5b1"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2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03de82"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2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08ff7d"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2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0e71d"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2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4df29"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26" style:family="paragraph" style:parent-style-name="Text_20_body">
      <style:paragraph-properties fo:text-align="justify" style:justify-single-word="false"/>
      <style:text-properties fo:color="#000000" loext:opacity="100%" style:font-name="Times New Roman" fo:font-size="11pt" officeooo:rsid="0254df29" fo:background-color="#ffffff" style:font-size-asian="11pt" style:font-size-complex="11pt"/>
    </style:style>
    <style:style style:name="P427" style:family="paragraph" style:parent-style-name="Text_20_body">
      <style:paragraph-properties fo:text-align="justify" style:justify-single-word="false"/>
      <style:text-properties officeooo:rsid="01028b9e" officeooo:paragraph-rsid="01028b9e"/>
    </style:style>
    <style:style style:name="P428" style:family="paragraph" style:parent-style-name="Text_20_body">
      <style:paragraph-properties fo:text-align="justify" style:justify-single-word="false"/>
      <style:text-properties officeooo:rsid="010964fd" officeooo:paragraph-rsid="010964fd"/>
    </style:style>
    <style:style style:name="P429" style:family="paragraph" style:parent-style-name="Text_20_body">
      <style:paragraph-properties fo:text-align="center" style:justify-single-word="false"/>
      <style:text-properties officeooo:rsid="010ba017" officeooo:paragraph-rsid="010ba017"/>
    </style:style>
    <style:style style:name="P430" style:family="paragraph" style:parent-style-name="Text_20_body">
      <style:paragraph-properties fo:text-align="justify" style:justify-single-word="false"/>
      <style:text-properties officeooo:rsid="010cab97" officeooo:paragraph-rsid="010cab97"/>
    </style:style>
    <style:style style:name="P431" style:family="paragraph" style:parent-style-name="Text_20_body">
      <style:paragraph-properties fo:text-align="justify" style:justify-single-word="false"/>
      <style:text-properties officeooo:rsid="010cd3a1" officeooo:paragraph-rsid="010ebe58"/>
    </style:style>
    <style:style style:name="P432" style:family="paragraph" style:parent-style-name="Text_20_body">
      <style:paragraph-properties fo:text-align="justify" style:justify-single-word="false"/>
      <style:text-properties officeooo:rsid="01132c0c" officeooo:paragraph-rsid="01132c0c"/>
    </style:style>
    <style:style style:name="P433" style:family="paragraph" style:parent-style-name="Text_20_body">
      <style:text-properties officeooo:paragraph-rsid="011a9437"/>
    </style:style>
    <style:style style:name="P434" style:family="paragraph" style:parent-style-name="Text_20_body">
      <style:paragraph-properties fo:text-align="justify" style:justify-single-word="false"/>
      <style:text-properties officeooo:rsid="012b03a1" officeooo:paragraph-rsid="012b03a1"/>
    </style:style>
    <style:style style:name="P435" style:family="paragraph" style:parent-style-name="Text_20_body">
      <style:paragraph-properties fo:text-align="justify" style:justify-single-word="false"/>
      <style:text-properties fo:color="#000080" loext:opacity="100%" officeooo:paragraph-rsid="013db025"/>
    </style:style>
    <style:style style:name="P436" style:family="paragraph" style:parent-style-name="Text_20_body">
      <style:text-properties officeooo:rsid="012c8ab3" officeooo:paragraph-rsid="012c8ab3"/>
    </style:style>
    <style:style style:name="P437" style:family="paragraph" style:parent-style-name="Text_20_body">
      <style:paragraph-properties fo:text-align="justify" style:justify-single-word="false"/>
      <style:text-properties officeooo:rsid="012d827c" officeooo:paragraph-rsid="012d827c"/>
    </style:style>
    <style:style style:name="P438" style:family="paragraph" style:parent-style-name="Text_20_body">
      <style:text-properties officeooo:paragraph-rsid="012f3225"/>
    </style:style>
    <style:style style:name="P439" style:family="paragraph" style:parent-style-name="Text_20_body">
      <style:text-properties officeooo:rsid="012ff265" officeooo:paragraph-rsid="012ff265"/>
    </style:style>
    <style:style style:name="P440" style:family="paragraph" style:parent-style-name="Text_20_body">
      <style:text-properties officeooo:rsid="012ff265" officeooo:paragraph-rsid="02413201"/>
    </style:style>
    <style:style style:name="P441" style:family="paragraph" style:parent-style-name="Text_20_body">
      <style:text-properties officeooo:rsid="01330635" officeooo:paragraph-rsid="01330635"/>
    </style:style>
    <style:style style:name="P442" style:family="paragraph" style:parent-style-name="Text_20_body">
      <style:paragraph-properties fo:text-align="justify" style:justify-single-word="false"/>
      <style:text-properties officeooo:rsid="0136d6af" officeooo:paragraph-rsid="0136d6af"/>
    </style:style>
    <style:style style:name="P443" style:family="paragraph" style:parent-style-name="Text_20_body">
      <style:paragraph-properties fo:text-align="justify" style:justify-single-word="false"/>
      <style:text-properties officeooo:rsid="013b130e" officeooo:paragraph-rsid="013b130e"/>
    </style:style>
    <style:style style:name="P444" style:family="paragraph" style:parent-style-name="Text_20_body">
      <style:paragraph-properties fo:text-align="justify" style:justify-single-word="false"/>
      <style:text-properties officeooo:rsid="013c1462" officeooo:paragraph-rsid="013c1462"/>
    </style:style>
    <style:style style:name="P445" style:family="paragraph" style:parent-style-name="Text_20_body">
      <style:paragraph-properties fo:text-align="justify" style:justify-single-word="false"/>
      <style:text-properties officeooo:rsid="013c5ca8" officeooo:paragraph-rsid="013c5ca8"/>
    </style:style>
    <style:style style:name="P446" style:family="paragraph" style:parent-style-name="Standard">
      <style:paragraph-properties fo:text-align="justify" style:justify-single-word="false"/>
      <style:text-properties officeooo:rsid="013c5ca8" officeooo:paragraph-rsid="013c5ca8"/>
    </style:style>
    <style:style style:name="P447" style:family="paragraph" style:parent-style-name="Text_20_body">
      <style:paragraph-properties fo:text-align="justify" style:justify-single-word="false"/>
      <style:text-properties officeooo:rsid="013db025" officeooo:paragraph-rsid="013db025"/>
    </style:style>
    <style:style style:name="P448" style:family="paragraph" style:parent-style-name="Text_20_body">
      <style:text-properties officeooo:paragraph-rsid="0140361b"/>
    </style:style>
    <style:style style:name="P449" style:family="paragraph" style:parent-style-name="Text_20_body">
      <style:paragraph-properties fo:text-align="justify" style:justify-single-word="false"/>
      <style:text-properties officeooo:rsid="0144c9b1" officeooo:paragraph-rsid="0144c9b1"/>
    </style:style>
    <style:style style:name="P450" style:family="paragraph" style:parent-style-name="Text_20_body">
      <style:paragraph-properties fo:text-align="justify" style:justify-single-word="false"/>
      <style:text-properties officeooo:rsid="0144c9b1" officeooo:paragraph-rsid="022e9a76"/>
    </style:style>
    <style:style style:name="P451" style:family="paragraph" style:parent-style-name="Text_20_body">
      <style:paragraph-properties fo:text-align="justify" style:justify-single-word="false"/>
      <style:text-properties officeooo:rsid="0146a904" officeooo:paragraph-rsid="0146a904"/>
    </style:style>
    <style:style style:name="P452" style:family="paragraph" style:parent-style-name="Text_20_body">
      <style:paragraph-properties fo:text-align="justify" style:justify-single-word="false"/>
      <style:text-properties officeooo:rsid="0146a904" officeooo:paragraph-rsid="022e9a76"/>
    </style:style>
    <style:style style:name="P453" style:family="paragraph" style:parent-style-name="Text_20_body">
      <style:paragraph-properties fo:text-align="justify" style:justify-single-word="false"/>
      <style:text-properties officeooo:rsid="014a1c05" officeooo:paragraph-rsid="014a1c05"/>
    </style:style>
    <style:style style:name="P454" style:family="paragraph" style:parent-style-name="Text_20_body">
      <style:paragraph-properties fo:text-align="justify" style:justify-single-word="false"/>
      <style:text-properties officeooo:rsid="00176274" officeooo:paragraph-rsid="0147a710"/>
    </style:style>
    <style:style style:name="P455" style:family="paragraph" style:parent-style-name="Text_20_body">
      <style:paragraph-properties fo:text-align="justify" style:justify-single-word="false"/>
      <style:text-properties officeooo:rsid="00176274" officeooo:paragraph-rsid="021cd37d"/>
    </style:style>
    <style:style style:name="P456" style:family="paragraph" style:parent-style-name="Text_20_body">
      <style:paragraph-properties fo:text-align="justify" style:justify-single-word="false"/>
      <style:text-properties officeooo:rsid="011a9437" officeooo:paragraph-rsid="011a9437"/>
    </style:style>
    <style:style style:name="P457" style:family="paragraph" style:parent-style-name="Text_20_body">
      <style:paragraph-properties fo:text-align="justify" style:justify-single-word="false"/>
      <style:text-properties officeooo:rsid="00e09b4d" officeooo:paragraph-rsid="00795297"/>
    </style:style>
    <style:style style:name="P458" style:family="paragraph" style:parent-style-name="Text_20_body">
      <style:paragraph-properties fo:text-align="justify" style:justify-single-word="false"/>
      <style:text-properties officeooo:rsid="00981e45" officeooo:paragraph-rsid="00e09b4d"/>
    </style:style>
    <style:style style:name="P459" style:family="paragraph" style:parent-style-name="Text_20_body">
      <style:text-properties officeooo:rsid="008e908a" officeooo:paragraph-rsid="008e908a"/>
    </style:style>
    <style:style style:name="P460" style:family="paragraph" style:parent-style-name="Text_20_body">
      <style:text-properties officeooo:rsid="011aac0f" officeooo:paragraph-rsid="011aac0f"/>
    </style:style>
    <style:style style:name="P461" style:family="paragraph" style:parent-style-name="Text_20_body">
      <style:text-properties officeooo:rsid="011aac0f" officeooo:paragraph-rsid="02c4e25e"/>
    </style:style>
    <style:style style:name="P462" style:family="paragraph" style:parent-style-name="Text_20_body">
      <style:text-properties officeooo:rsid="008b6dac" officeooo:paragraph-rsid="008b6dac"/>
    </style:style>
    <style:style style:name="P463" style:family="paragraph" style:parent-style-name="Text_20_body">
      <style:paragraph-properties fo:text-align="justify" style:justify-single-word="false"/>
      <style:text-properties style:text-line-through-style="none" style:text-line-through-type="none" officeooo:rsid="015b160f" officeooo:paragraph-rsid="015c580a"/>
    </style:style>
    <style:style style:name="P464" style:family="paragraph" style:parent-style-name="Text_20_body">
      <style:text-properties officeooo:rsid="007fffd6" officeooo:paragraph-rsid="007fffd6"/>
    </style:style>
    <style:style style:name="P465" style:family="paragraph" style:parent-style-name="Text_20_body">
      <style:paragraph-properties fo:text-align="justify" style:justify-single-word="false"/>
      <style:text-properties officeooo:rsid="008cc4e2" officeooo:paragraph-rsid="012894fd"/>
    </style:style>
    <style:style style:name="P466" style:family="paragraph" style:parent-style-name="Text_20_body">
      <style:paragraph-properties fo:text-align="justify" style:justify-single-word="false"/>
      <style:text-properties fo:font-style="normal" officeooo:rsid="00a1da37" officeooo:paragraph-rsid="0136d6af" style:font-style-asian="normal" style:font-style-complex="normal"/>
    </style:style>
    <style:style style:name="P467" style:family="paragraph" style:parent-style-name="Standard">
      <style:paragraph-properties fo:text-align="justify" style:justify-single-word="false"/>
      <style:text-properties fo:font-style="normal" officeooo:rsid="00a1da37" officeooo:paragraph-rsid="013c5ca8" style:font-style-asian="normal" style:font-style-complex="normal"/>
    </style:style>
    <style:style style:name="P468" style:family="paragraph" style:parent-style-name="Text_20_body">
      <style:paragraph-properties fo:text-align="justify" style:justify-single-word="false"/>
      <style:text-properties fo:font-style="normal" officeooo:rsid="01c1d233" officeooo:paragraph-rsid="013c5ca8" style:font-style-asian="normal" style:font-style-complex="normal"/>
    </style:style>
    <style:style style:name="P469" style:family="paragraph" style:parent-style-name="Standard">
      <style:paragraph-properties fo:text-align="justify" style:justify-single-word="false"/>
      <style:text-properties fo:font-style="normal" officeooo:rsid="013c5ca8" officeooo:paragraph-rsid="013c5ca8" style:font-style-asian="normal" style:font-style-complex="normal"/>
    </style:style>
    <style:style style:name="P470" style:family="paragraph" style:parent-style-name="Standard">
      <style:paragraph-properties fo:text-align="justify" style:justify-single-word="false"/>
      <style:text-properties fo:font-style="normal" officeooo:rsid="013e97e9" officeooo:paragraph-rsid="013e97e9" style:font-style-asian="normal" style:font-style-complex="normal"/>
    </style:style>
    <style:style style:name="P471" style:family="paragraph" style:parent-style-name="Standard">
      <style:paragraph-properties fo:text-align="justify" style:justify-single-word="false"/>
      <style:text-properties fo:font-style="normal" officeooo:rsid="017a2d63" officeooo:paragraph-rsid="017a2d63" style:font-style-asian="normal" style:font-style-complex="normal"/>
    </style:style>
    <style:style style:name="P472" style:family="paragraph" style:parent-style-name="Standard">
      <style:paragraph-properties fo:text-align="justify" style:justify-single-word="false"/>
      <style:text-properties fo:font-style="normal" officeooo:rsid="01e8b619" officeooo:paragraph-rsid="01e8b619" style:font-style-asian="normal" style:font-style-complex="normal"/>
    </style:style>
    <style:style style:name="P473" style:family="paragraph" style:parent-style-name="Standard">
      <style:paragraph-properties fo:text-align="justify" style:justify-single-word="false"/>
      <style:text-properties fo:font-style="normal" officeooo:rsid="02c68408" officeooo:paragraph-rsid="02c68408" style:font-style-asian="normal" style:font-style-complex="normal"/>
    </style:style>
    <style:style style:name="P474" style:family="paragraph" style:parent-style-name="Text_20_body">
      <style:text-properties fo:font-style="normal" fo:font-weight="normal" style:font-style-asian="normal" style:font-weight-asian="normal" style:font-style-complex="normal" style:font-weight-complex="normal"/>
    </style:style>
    <style:style style:name="P475" style:family="paragraph" style:parent-style-name="Text_20_body">
      <style:paragraph-properties fo:text-align="justify" style:justify-single-word="false"/>
      <style:text-properties officeooo:rsid="00f48725" officeooo:paragraph-rsid="015c580a"/>
    </style:style>
    <style:style style:name="P476" style:family="paragraph" style:parent-style-name="Text_20_body">
      <style:paragraph-properties fo:text-align="start" style:justify-single-word="false"/>
      <style:text-properties officeooo:rsid="015a55a8" officeooo:paragraph-rsid="015c580a"/>
    </style:style>
    <style:style style:name="P477" style:family="paragraph" style:parent-style-name="Text_20_body">
      <style:paragraph-properties fo:text-align="justify" style:justify-single-word="false"/>
      <style:text-properties officeooo:rsid="015a55a8" officeooo:paragraph-rsid="015c580a"/>
    </style:style>
    <style:style style:name="P478" style:family="paragraph" style:parent-style-name="Text_20_body">
      <style:paragraph-properties fo:text-align="start" style:justify-single-word="false"/>
      <style:text-properties officeooo:rsid="015ac27b" officeooo:paragraph-rsid="015c580a"/>
    </style:style>
    <style:style style:name="P479" style:family="paragraph" style:parent-style-name="Text_20_body">
      <style:paragraph-properties fo:text-align="justify" style:justify-single-word="false"/>
      <style:text-properties officeooo:rsid="015ac27b" officeooo:paragraph-rsid="015c580a"/>
    </style:style>
    <style:style style:name="P480" style:family="paragraph" style:parent-style-name="Text_20_body">
      <style:paragraph-properties fo:text-align="justify" style:justify-single-word="false"/>
      <style:text-properties officeooo:rsid="015ac27b" officeooo:paragraph-rsid="00f48725"/>
    </style:style>
    <style:style style:name="P481" style:family="paragraph" style:parent-style-name="Text_20_body">
      <style:paragraph-properties fo:text-align="justify" style:justify-single-word="false"/>
      <style:text-properties officeooo:rsid="015b160f" officeooo:paragraph-rsid="015c580a"/>
    </style:style>
    <style:style style:name="P482" style:family="paragraph" style:parent-style-name="Text_20_body">
      <style:text-properties officeooo:paragraph-rsid="015d2012"/>
    </style:style>
    <style:style style:name="P483" style:family="paragraph" style:parent-style-name="Text_20_body">
      <style:text-properties officeooo:paragraph-rsid="0160b24f"/>
    </style:style>
    <style:style style:name="P484" style:family="paragraph" style:parent-style-name="Text_20_body">
      <style:text-properties officeooo:rsid="0160b24f" officeooo:paragraph-rsid="0160b24f"/>
    </style:style>
    <style:style style:name="P485" style:family="paragraph" style:parent-style-name="Text_20_body">
      <style:text-properties officeooo:rsid="0162607a" officeooo:paragraph-rsid="0162607a"/>
    </style:style>
    <style:style style:name="P486" style:family="paragraph" style:parent-style-name="Text_20_body">
      <style:paragraph-properties fo:text-align="justify" style:justify-single-word="false"/>
      <style:text-properties officeooo:rsid="0162607a" officeooo:paragraph-rsid="02461945"/>
    </style:style>
    <style:style style:name="P487" style:family="paragraph" style:parent-style-name="Text_20_body">
      <style:paragraph-properties fo:text-align="justify" style:justify-single-word="false"/>
      <style:text-properties officeooo:rsid="0166ee9b" officeooo:paragraph-rsid="0166ee9b"/>
    </style:style>
    <style:style style:name="P488" style:family="paragraph" style:parent-style-name="Text_20_body">
      <style:paragraph-properties fo:text-align="justify" style:justify-single-word="false"/>
      <style:text-properties officeooo:rsid="0167c4a5" officeooo:paragraph-rsid="0167c4a5"/>
    </style:style>
    <style:style style:name="P489" style:family="paragraph" style:parent-style-name="Text_20_body">
      <style:paragraph-properties fo:text-align="justify" style:justify-single-word="false"/>
      <style:text-properties officeooo:rsid="0089bde5" officeooo:paragraph-rsid="008a4754"/>
    </style:style>
    <style:style style:name="P490" style:family="paragraph" style:parent-style-name="Text_20_body">
      <style:paragraph-properties fo:text-align="justify" style:justify-single-word="false"/>
      <style:text-properties officeooo:rsid="0089bde5" officeooo:paragraph-rsid="016c8ab2"/>
    </style:style>
    <style:style style:name="P491" style:family="paragraph" style:parent-style-name="Text_20_body">
      <style:paragraph-properties fo:text-align="justify" style:justify-single-word="false"/>
      <style:text-properties officeooo:rsid="0087e748" officeooo:paragraph-rsid="016c8ab2"/>
    </style:style>
    <style:style style:name="P492" style:family="paragraph" style:parent-style-name="Text_20_body">
      <style:paragraph-properties fo:text-align="justify" style:justify-single-word="false"/>
      <style:text-properties officeooo:rsid="0087e748" officeooo:paragraph-rsid="01bd7ee4"/>
    </style:style>
    <style:style style:name="P493" style:family="paragraph" style:parent-style-name="Text_20_body">
      <style:paragraph-properties fo:text-align="justify" style:justify-single-word="false"/>
      <style:text-properties officeooo:rsid="00e2e9ac" officeooo:paragraph-rsid="016c8ab2"/>
    </style:style>
    <style:style style:name="P494" style:family="paragraph" style:parent-style-name="Text_20_body">
      <style:paragraph-properties fo:text-align="justify" style:justify-single-word="false"/>
      <style:text-properties officeooo:rsid="0088d318" officeooo:paragraph-rsid="016c8ab2"/>
    </style:style>
    <style:style style:name="P495" style:family="paragraph" style:parent-style-name="Text_20_body">
      <style:paragraph-properties fo:text-align="justify" style:justify-single-word="false"/>
      <style:text-properties officeooo:rsid="016c8ab2" officeooo:paragraph-rsid="016c8ab2"/>
    </style:style>
    <style:style style:name="P496" style:family="paragraph" style:parent-style-name="Text_20_body">
      <style:text-properties fo:color="#0000ff" loext:opacity="100%" fo:font-size="10.5pt" officeooo:rsid="012c8ab3" officeooo:paragraph-rsid="012c8ab3" style:font-size-asian="10.5pt" style:font-size-complex="10.5pt"/>
    </style:style>
    <style:style style:name="P497" style:family="paragraph" style:parent-style-name="Text_20_body">
      <style:paragraph-properties fo:text-align="justify" style:justify-single-word="false"/>
      <style:text-properties officeooo:rsid="00af3204"/>
    </style:style>
    <style:style style:name="P498" style:family="paragraph" style:parent-style-name="Text_20_body">
      <style:paragraph-properties fo:text-align="justify" style:justify-single-word="false"/>
      <style:text-properties officeooo:rsid="00af3204" officeooo:paragraph-rsid="015d2012"/>
    </style:style>
    <style:style style:name="P499" style:family="paragraph" style:parent-style-name="Text_20_body">
      <style:paragraph-properties fo:text-align="justify" style:justify-single-word="false"/>
      <style:text-properties fo:font-weight="normal" style:font-weight-asian="normal" style:font-weight-complex="normal"/>
    </style:style>
    <style:style style:name="P500" style:family="paragraph" style:parent-style-name="Text_20_body">
      <style:paragraph-properties fo:text-align="justify" style:justify-single-word="false"/>
      <style:text-properties fo:font-weight="normal" officeooo:rsid="01bd7ee4" officeooo:paragraph-rsid="01bd7ee4" style:font-weight-asian="normal" style:font-weight-complex="normal"/>
    </style:style>
    <style:style style:name="P501" style:family="paragraph" style:parent-style-name="Text_20_body">
      <style:paragraph-properties fo:text-align="justify" style:justify-single-word="false"/>
      <style:text-properties fo:font-weight="normal" officeooo:rsid="008a4754" officeooo:paragraph-rsid="016c8ab2" style:font-weight-asian="normal" style:font-weight-complex="normal"/>
    </style:style>
    <style:style style:name="P502" style:family="paragraph" style:parent-style-name="Text_20_body">
      <style:paragraph-properties fo:text-align="justify" style:justify-single-word="false"/>
      <style:text-properties fo:font-weight="normal" officeooo:rsid="005bcc00" style:font-weight-asian="normal" style:font-weight-complex="normal"/>
    </style:style>
    <style:style style:name="P503" style:family="paragraph" style:parent-style-name="Text_20_body">
      <style:paragraph-properties fo:text-align="justify" style:justify-single-word="false"/>
      <style:text-properties fo:font-weight="normal" officeooo:rsid="00571c41" officeooo:paragraph-rsid="0200ecff" style:font-weight-asian="normal" style:font-weight-complex="normal"/>
    </style:style>
    <style:style style:name="P504" style:family="paragraph" style:parent-style-name="Text_20_body">
      <style:paragraph-properties fo:text-align="justify" style:justify-single-word="false"/>
      <style:text-properties fo:font-weight="normal" officeooo:rsid="02c4e25e" officeooo:paragraph-rsid="02c4e25e" style:font-weight-asian="normal" style:font-weight-complex="normal"/>
    </style:style>
    <style:style style:name="P505" style:family="paragraph" style:parent-style-name="Text_20_body">
      <style:text-properties fo:font-weight="normal" officeooo:rsid="02c4e25e" officeooo:paragraph-rsid="02c4e25e" style:font-weight-asian="normal" style:font-weight-complex="normal"/>
    </style:style>
    <style:style style:name="P506" style:family="paragraph" style:parent-style-name="Text_20_body">
      <style:paragraph-properties fo:text-align="justify" style:justify-single-word="false"/>
      <style:text-properties officeooo:rsid="01709f06" officeooo:paragraph-rsid="01709f06"/>
    </style:style>
    <style:style style:name="P507" style:family="paragraph" style:parent-style-name="Text_20_body">
      <style:paragraph-properties fo:text-align="justify" style:justify-single-word="false"/>
      <style:text-properties officeooo:rsid="0171b90e" officeooo:paragraph-rsid="0171b90e"/>
    </style:style>
    <style:style style:name="P508" style:family="paragraph" style:parent-style-name="Text_20_body">
      <loext:graphic-properties draw:fill="none"/>
      <style:paragraph-properties fo:text-align="center" style:justify-single-word="false" fo:background-color="transparent" style:vertical-align="middle"/>
      <style:text-properties fo:font-size="16pt" officeooo:rsid="0015acc5" officeooo:paragraph-rsid="0015acc5" style:font-size-asian="16pt" style:font-size-complex="16pt"/>
    </style:style>
    <style:style style:name="P509" style:family="paragraph" style:parent-style-name="Text_20_body">
      <loext:graphic-properties draw:fill="none"/>
      <style:paragraph-properties fo:text-align="center" style:justify-single-word="false" fo:background-color="transparent" style:vertical-align="middle"/>
      <style:text-properties fo:color="#ff0000" loext:opacity="100%" fo:font-size="16pt" fo:font-weight="bold" officeooo:rsid="01288617" officeooo:paragraph-rsid="01288617" style:font-size-asian="16pt" style:font-weight-asian="bold" style:font-size-complex="16pt" style:font-weight-complex="bold" style:font-relief="embossed"/>
    </style:style>
    <style:style style:name="P510" style:family="paragraph" style:parent-style-name="Text_20_body">
      <loext:graphic-properties draw:fill="none"/>
      <style:paragraph-properties fo:background-color="transparent" style:vertical-align="middle"/>
    </style:style>
    <style:style style:name="P511" style:family="paragraph" style:parent-style-name="Text_20_body">
      <style:text-properties officeooo:rsid="01773187" officeooo:paragraph-rsid="01773187"/>
    </style:style>
    <style:style style:name="P512" style:family="paragraph" style:parent-style-name="Text_20_body">
      <style:paragraph-properties fo:text-align="justify" style:justify-single-word="false"/>
      <style:text-properties officeooo:rsid="008a4754" officeooo:paragraph-rsid="01773187"/>
    </style:style>
    <style:style style:name="P513" style:family="paragraph" style:parent-style-name="Text_20_body">
      <style:paragraph-properties fo:text-align="center" style:justify-single-word="false"/>
      <style:text-properties officeooo:rsid="0185d219" officeooo:paragraph-rsid="0185d219"/>
    </style:style>
    <style:style style:name="P514" style:family="paragraph" style:parent-style-name="Text_20_body">
      <style:paragraph-properties fo:text-align="justify" style:justify-single-word="false"/>
      <style:text-properties officeooo:rsid="018ad05a" officeooo:paragraph-rsid="018ad05a"/>
    </style:style>
    <style:style style:name="P515" style:family="paragraph" style:parent-style-name="Text_20_body">
      <style:paragraph-properties fo:text-align="justify" style:justify-single-word="false"/>
      <style:text-properties officeooo:rsid="00280832" officeooo:paragraph-rsid="01709f06"/>
    </style:style>
    <style:style style:name="P516" style:family="paragraph" style:parent-style-name="Text_20_body">
      <style:text-properties officeooo:rsid="01939b43" officeooo:paragraph-rsid="01939b43"/>
    </style:style>
    <style:style style:name="P517" style:family="paragraph" style:parent-style-name="Text_20_body">
      <style:paragraph-properties fo:text-align="justify" style:justify-single-word="false"/>
      <style:text-properties officeooo:rsid="0060cf7a" officeooo:paragraph-rsid="0191e7a4"/>
    </style:style>
    <style:style style:name="P518" style:family="paragraph" style:parent-style-name="Text_20_body">
      <style:paragraph-properties fo:text-align="justify" style:justify-single-word="false"/>
      <style:text-properties officeooo:rsid="0196d72a" officeooo:paragraph-rsid="0196d72a"/>
    </style:style>
    <style:style style:name="P519" style:family="paragraph" style:parent-style-name="Text_20_body">
      <style:paragraph-properties fo:text-align="justify" style:justify-single-word="false"/>
      <style:text-properties officeooo:rsid="0163624e" officeooo:paragraph-rsid="0196d72a"/>
    </style:style>
    <style:style style:name="P520" style:family="paragraph" style:parent-style-name="Text_20_body">
      <style:paragraph-properties fo:text-align="justify" style:justify-single-word="false"/>
      <style:text-properties officeooo:rsid="0163624e" officeooo:paragraph-rsid="0294b903"/>
    </style:style>
    <style:style style:name="P521" style:family="paragraph" style:parent-style-name="Text_20_body">
      <style:text-properties officeooo:paragraph-rsid="0197ac42"/>
    </style:style>
    <style:style style:name="P522" style:family="paragraph" style:parent-style-name="Text_20_body">
      <style:text-properties officeooo:paragraph-rsid="0198da60"/>
    </style:style>
    <style:style style:name="P523" style:family="paragraph" style:parent-style-name="Text_20_body">
      <style:text-properties officeooo:paragraph-rsid="019c117c"/>
    </style:style>
    <style:style style:name="P524" style:family="paragraph" style:parent-style-name="Text_20_body">
      <style:paragraph-properties fo:text-align="justify" style:justify-single-word="false"/>
      <style:text-properties officeooo:rsid="01938924" officeooo:paragraph-rsid="0197ac42"/>
    </style:style>
    <style:style style:name="P525" style:family="paragraph" style:parent-style-name="Text_20_body">
      <style:paragraph-properties fo:text-align="justify" style:justify-single-word="false"/>
      <style:text-properties officeooo:rsid="015eaf5f" officeooo:paragraph-rsid="019fd78e"/>
    </style:style>
    <style:style style:name="P526" style:family="paragraph" style:parent-style-name="Text_20_body">
      <style:paragraph-properties fo:text-align="start" style:justify-single-word="false"/>
      <style:text-properties officeooo:rsid="01a03e8a" officeooo:paragraph-rsid="01a03e8a"/>
    </style:style>
    <style:style style:name="P527" style:family="paragraph" style:parent-style-name="Text_20_body">
      <style:paragraph-properties fo:text-align="justify" style:justify-single-word="false"/>
      <style:text-properties officeooo:rsid="01a1ae4f" officeooo:paragraph-rsid="01a1ae4f"/>
    </style:style>
    <style:style style:name="P528" style:family="paragraph" style:parent-style-name="Text_20_body">
      <style:paragraph-properties fo:text-align="justify" style:justify-single-word="false"/>
      <style:text-properties officeooo:rsid="01a1ae4f" officeooo:paragraph-rsid="0209b73a"/>
    </style:style>
    <style:style style:name="P529" style:family="paragraph" style:parent-style-name="Text_20_body">
      <style:text-properties officeooo:paragraph-rsid="01a9d3f3"/>
    </style:style>
    <style:style style:name="P530" style:family="paragraph" style:parent-style-name="Text_20_body">
      <style:paragraph-properties fo:text-align="justify" style:justify-single-word="false"/>
      <style:text-properties officeooo:rsid="01a9d45f" officeooo:paragraph-rsid="01a9d45f"/>
    </style:style>
    <style:style style:name="P531" style:family="paragraph" style:parent-style-name="Text_20_body">
      <style:text-properties officeooo:paragraph-rsid="01aae81d"/>
    </style:style>
    <style:style style:name="P532" style:family="paragraph" style:parent-style-name="Text_20_body">
      <style:text-properties officeooo:paragraph-rsid="01ab787c"/>
    </style:style>
    <style:style style:name="P533" style:family="paragraph" style:parent-style-name="Text_20_body">
      <style:paragraph-properties fo:text-align="justify" style:justify-single-word="false"/>
      <style:text-properties officeooo:rsid="01ad6aae" officeooo:paragraph-rsid="01ad6aae"/>
    </style:style>
    <style:style style:name="P534" style:family="paragraph" style:parent-style-name="Text_20_body">
      <style:paragraph-properties fo:text-align="justify" style:justify-single-word="false"/>
      <style:text-properties officeooo:rsid="0140361b" officeooo:paragraph-rsid="0140361b"/>
    </style:style>
    <style:style style:name="P535" style:family="paragraph" style:parent-style-name="Text_20_body">
      <style:paragraph-properties fo:text-align="justify" style:justify-single-word="false"/>
      <style:text-properties officeooo:rsid="01bd353c" officeooo:paragraph-rsid="01bd353c"/>
    </style:style>
    <style:style style:name="P536" style:family="paragraph" style:parent-style-name="Text_20_body">
      <style:paragraph-properties fo:text-align="justify" style:justify-single-word="false"/>
      <style:text-properties officeooo:rsid="01be2f5f" officeooo:paragraph-rsid="01be2f5f"/>
    </style:style>
    <style:style style:name="P537" style:family="paragraph" style:parent-style-name="Text_20_body">
      <style:paragraph-properties fo:text-align="justify" style:justify-single-word="false"/>
      <style:text-properties officeooo:rsid="01c1d233" officeooo:paragraph-rsid="01c1d233"/>
    </style:style>
    <style:style style:name="P538" style:family="paragraph" style:parent-style-name="Text_20_body">
      <style:paragraph-properties fo:text-align="justify" style:justify-single-word="false"/>
      <style:text-properties officeooo:rsid="01a124a9" officeooo:paragraph-rsid="01a1ae4f"/>
    </style:style>
    <style:style style:name="P539" style:family="paragraph" style:parent-style-name="Text_20_body">
      <style:paragraph-properties fo:text-align="justify" style:justify-single-word="false"/>
      <style:text-properties officeooo:rsid="0049e974" officeooo:paragraph-rsid="01a5fafe"/>
    </style:style>
    <style:style style:name="P540" style:family="paragraph" style:parent-style-name="Text_20_body">
      <style:text-properties officeooo:rsid="01ab787c" officeooo:paragraph-rsid="01ab787c"/>
    </style:style>
    <style:style style:name="P541" style:family="paragraph" style:parent-style-name="Text_20_body">
      <style:paragraph-properties fo:text-align="justify" style:justify-single-word="false"/>
      <style:text-properties officeooo:rsid="01ab787c" officeooo:paragraph-rsid="01ab787c"/>
    </style:style>
    <style:style style:name="P542" style:family="paragraph" style:parent-style-name="Text_20_body">
      <style:paragraph-properties fo:text-align="start" style:justify-single-word="false"/>
      <style:text-properties officeooo:rsid="01ab787c" officeooo:paragraph-rsid="01ab787c"/>
    </style:style>
    <style:style style:name="P543" style:family="paragraph" style:parent-style-name="Text_20_body">
      <style:paragraph-properties fo:text-align="justify" style:justify-single-word="false"/>
      <style:text-properties officeooo:rsid="0039bea8" officeooo:paragraph-rsid="01ab787c"/>
    </style:style>
    <style:style style:name="P544" style:family="paragraph" style:parent-style-name="Text_20_body">
      <style:paragraph-properties fo:text-align="justify" style:justify-single-word="false"/>
      <style:text-properties officeooo:rsid="01db06e6" officeooo:paragraph-rsid="01db06e6"/>
    </style:style>
    <style:style style:name="P545" style:family="paragraph" style:parent-style-name="Text_20_body">
      <style:paragraph-properties fo:text-align="justify" style:justify-single-word="false"/>
      <style:text-properties officeooo:rsid="01dc851b" officeooo:paragraph-rsid="01dc851b"/>
    </style:style>
    <style:style style:name="P546" style:family="paragraph" style:parent-style-name="Text_20_body">
      <style:paragraph-properties fo:text-align="justify" style:justify-single-word="false"/>
      <style:text-properties officeooo:rsid="01e72eda" officeooo:paragraph-rsid="01e72eda"/>
    </style:style>
    <style:style style:name="P547" style:family="paragraph" style:parent-style-name="Text_20_body">
      <style:paragraph-properties fo:text-align="justify" style:justify-single-word="false"/>
      <style:text-properties officeooo:rsid="01e78945" officeooo:paragraph-rsid="01e78945"/>
    </style:style>
    <style:style style:name="P548" style:family="paragraph" style:parent-style-name="Standard">
      <style:paragraph-properties fo:text-align="justify" style:justify-single-word="false"/>
      <style:text-properties officeooo:rsid="01e78945" officeooo:paragraph-rsid="01e78945"/>
    </style:style>
    <style:style style:name="P549" style:family="paragraph" style:parent-style-name="Text_20_body">
      <style:text-properties officeooo:paragraph-rsid="013b130e"/>
    </style:style>
    <style:style style:name="P550" style:family="paragraph" style:parent-style-name="Text_20_body">
      <style:paragraph-properties fo:text-align="justify" style:justify-single-word="false"/>
      <style:text-properties officeooo:rsid="01f3744c" officeooo:paragraph-rsid="01f3744c"/>
    </style:style>
    <style:style style:name="P551" style:family="paragraph" style:parent-style-name="Text_20_body">
      <style:paragraph-properties fo:text-align="justify" style:justify-single-word="false"/>
      <style:text-properties officeooo:rsid="015bf483" officeooo:paragraph-rsid="01fde5f9"/>
    </style:style>
    <style:style style:name="P552" style:family="paragraph" style:parent-style-name="Text_20_body">
      <style:paragraph-properties fo:text-align="start" style:justify-single-word="false"/>
      <style:text-properties officeooo:rsid="0205ce9f" officeooo:paragraph-rsid="0205ce9f"/>
    </style:style>
    <style:style style:name="P553" style:family="paragraph" style:parent-style-name="Text_20_body">
      <style:text-properties officeooo:rsid="012d6568"/>
    </style:style>
    <style:style style:name="P554" style:family="paragraph" style:parent-style-name="Text_20_body">
      <style:text-properties officeooo:paragraph-rsid="02070ed5"/>
    </style:style>
    <style:style style:name="P555" style:family="paragraph" style:parent-style-name="Text_20_body">
      <style:paragraph-properties fo:text-align="justify" style:justify-single-word="false"/>
      <style:text-properties officeooo:rsid="0208c8b7" officeooo:paragraph-rsid="0208c8b7"/>
    </style:style>
    <style:style style:name="P556" style:family="paragraph" style:parent-style-name="Text_20_body">
      <style:paragraph-properties fo:text-align="justify" style:justify-single-word="false"/>
      <style:text-properties officeooo:rsid="00d86c28" officeooo:paragraph-rsid="02053e65"/>
    </style:style>
    <style:style style:name="P557" style:family="paragraph" style:parent-style-name="Text_20_body">
      <style:paragraph-properties fo:text-align="start" style:justify-single-word="false"/>
      <style:text-properties officeooo:rsid="020e6dd3" officeooo:paragraph-rsid="020e6dd3"/>
    </style:style>
    <style:style style:name="P558" style:family="paragraph" style:parent-style-name="Text_20_body">
      <style:paragraph-properties fo:text-align="justify" style:justify-single-word="false"/>
      <style:text-properties officeooo:rsid="022471b8" officeooo:paragraph-rsid="022471b8"/>
    </style:style>
    <style:style style:name="P559" style:family="paragraph" style:parent-style-name="Text_20_body">
      <style:paragraph-properties fo:text-align="justify" style:justify-single-word="false"/>
      <style:text-properties officeooo:rsid="0025972e" officeooo:paragraph-rsid="021cd37d"/>
    </style:style>
    <style:style style:name="P560" style:family="paragraph" style:parent-style-name="Text_20_body">
      <style:paragraph-properties fo:text-align="justify" style:justify-single-word="false"/>
      <style:text-properties officeooo:rsid="0221558b" officeooo:paragraph-rsid="0221558b"/>
    </style:style>
    <style:style style:name="P561" style:family="paragraph" style:parent-style-name="Text_20_body">
      <style:paragraph-properties fo:text-align="justify" style:justify-single-word="false"/>
      <style:text-properties officeooo:rsid="0031257b" officeooo:paragraph-rsid="0221558b"/>
    </style:style>
    <style:style style:name="P562" style:family="paragraph" style:parent-style-name="Standard">
      <style:text-properties officeooo:rsid="0031257b" officeooo:paragraph-rsid="0031257b"/>
    </style:style>
    <style:style style:name="P563" style:family="paragraph" style:parent-style-name="Text_20_body">
      <style:paragraph-properties fo:text-align="justify" style:justify-single-word="false"/>
      <style:text-properties officeooo:rsid="02290621" officeooo:paragraph-rsid="02290621"/>
    </style:style>
    <style:style style:name="P564" style:family="paragraph" style:parent-style-name="Text_20_body">
      <style:paragraph-properties fo:text-align="justify" style:justify-single-word="false"/>
      <style:text-properties officeooo:rsid="011178dc" officeooo:paragraph-rsid="023754ab"/>
    </style:style>
    <style:style style:name="P565" style:family="paragraph" style:parent-style-name="Text_20_body">
      <style:paragraph-properties fo:text-align="justify" style:justify-single-word="false"/>
      <style:text-properties officeooo:rsid="00b185a9" officeooo:paragraph-rsid="00b185a9"/>
    </style:style>
    <style:style style:name="P566" style:family="paragraph" style:parent-style-name="Text_20_body">
      <style:paragraph-properties fo:text-align="justify" style:justify-single-word="false"/>
      <style:text-properties officeooo:rsid="00b185a9" officeooo:paragraph-rsid="023754ab"/>
    </style:style>
    <style:style style:name="P567" style:family="paragraph" style:parent-style-name="Text_20_body">
      <style:paragraph-properties fo:text-align="justify" style:justify-single-word="false"/>
      <style:text-properties officeooo:rsid="01bd8e60" officeooo:paragraph-rsid="022cb552"/>
    </style:style>
    <style:style style:name="P568" style:family="paragraph" style:parent-style-name="Text_20_body">
      <style:paragraph-properties fo:text-align="justify" style:justify-single-word="false"/>
      <style:text-properties officeooo:rsid="0234a727" officeooo:paragraph-rsid="0234a727"/>
    </style:style>
    <style:style style:name="P569" style:family="paragraph" style:parent-style-name="Text_20_body">
      <style:paragraph-properties fo:text-align="justify" style:justify-single-word="false"/>
      <style:text-properties officeooo:rsid="0235ffd3" officeooo:paragraph-rsid="0235ffd3"/>
    </style:style>
    <style:style style:name="P570" style:family="paragraph" style:parent-style-name="Text_20_body">
      <style:paragraph-properties fo:text-align="justify" style:justify-single-word="false"/>
      <style:text-properties officeooo:rsid="012894fd" officeooo:paragraph-rsid="023f5e3b"/>
    </style:style>
    <style:style style:name="P571" style:family="paragraph" style:parent-style-name="Text_20_body">
      <style:paragraph-properties fo:text-align="justify" style:justify-single-word="false"/>
      <style:text-properties officeooo:rsid="012894fd" officeooo:paragraph-rsid="0248d0b9"/>
    </style:style>
    <style:style style:name="P572" style:family="paragraph" style:parent-style-name="Text_20_body">
      <style:text-properties officeooo:rsid="023f67aa" officeooo:paragraph-rsid="023f67aa"/>
    </style:style>
    <style:style style:name="P573" style:family="paragraph" style:parent-style-name="Text_20_body">
      <style:text-properties officeooo:paragraph-rsid="02413201"/>
    </style:style>
    <style:style style:name="P574" style:family="paragraph" style:parent-style-name="Text_20_body">
      <style:paragraph-properties fo:text-align="justify" style:justify-single-word="false"/>
      <style:text-properties officeooo:rsid="002a080e" officeooo:paragraph-rsid="02290621"/>
    </style:style>
    <style:style style:name="P575" style:family="paragraph" style:parent-style-name="Text_20_body">
      <style:text-properties officeooo:rsid="012f30ac" officeooo:paragraph-rsid="02413201"/>
    </style:style>
    <style:style style:name="P576" style:family="paragraph" style:parent-style-name="Text_20_body">
      <style:text-properties officeooo:rsid="012f3225" officeooo:paragraph-rsid="02413201"/>
    </style:style>
    <style:style style:name="P577" style:family="paragraph" style:parent-style-name="Text_20_body">
      <style:paragraph-properties fo:text-align="center" style:justify-single-word="false"/>
      <style:text-properties officeooo:rsid="0185afef" officeooo:paragraph-rsid="02443128"/>
    </style:style>
    <style:style style:name="P578" style:family="paragraph" style:parent-style-name="Text_20_body">
      <style:text-properties officeooo:rsid="007fb8fb" officeooo:paragraph-rsid="0246cbe8"/>
    </style:style>
    <style:style style:name="P579" style:family="paragraph" style:parent-style-name="Text_20_body">
      <style:text-properties officeooo:rsid="007cbcd5" officeooo:paragraph-rsid="0246cbe8"/>
    </style:style>
    <style:style style:name="P580" style:family="paragraph" style:parent-style-name="Text_20_body">
      <style:text-properties officeooo:rsid="02476d03" officeooo:paragraph-rsid="02476d03"/>
    </style:style>
    <style:style style:name="P581" style:family="paragraph" style:parent-style-name="Text_20_body">
      <style:text-properties officeooo:paragraph-rsid="012d6568"/>
    </style:style>
    <style:style style:name="P582" style:family="paragraph" style:parent-style-name="Text_20_body">
      <style:text-properties officeooo:paragraph-rsid="02476d03"/>
    </style:style>
    <style:style style:name="P583" style:family="paragraph" style:parent-style-name="Text_20_body">
      <style:paragraph-properties fo:text-align="justify" style:justify-single-word="false"/>
      <style:text-properties officeooo:rsid="023f5e3b" officeooo:paragraph-rsid="0248d0b9"/>
    </style:style>
    <style:style style:name="P584" style:family="paragraph" style:parent-style-name="Text_20_body">
      <style:paragraph-properties fo:text-align="justify" style:justify-single-word="false"/>
      <style:text-properties officeooo:rsid="0248d0b9" officeooo:paragraph-rsid="0248d0b9"/>
    </style:style>
    <style:style style:name="P585" style:family="paragraph" style:parent-style-name="Text_20_body">
      <style:text-properties officeooo:rsid="0248d0b9" officeooo:paragraph-rsid="0208c8b7"/>
    </style:style>
    <style:style style:name="P586" style:family="paragraph" style:parent-style-name="Text_20_body">
      <style:text-properties officeooo:paragraph-rsid="024be79a"/>
    </style:style>
    <style:style style:name="P587" style:family="paragraph" style:parent-style-name="Text_20_body">
      <style:text-properties officeooo:rsid="0246cbe8" officeooo:paragraph-rsid="0246cbe8"/>
    </style:style>
    <style:style style:name="P588" style:family="paragraph" style:parent-style-name="Text_20_body">
      <style:paragraph-properties fo:text-align="justify" style:justify-single-word="false"/>
      <style:text-properties officeooo:rsid="0076cb6b" officeooo:paragraph-rsid="024be79a"/>
    </style:style>
    <style:style style:name="P589" style:family="paragraph" style:parent-style-name="Text_20_body">
      <style:text-properties officeooo:rsid="0250e71d" officeooo:paragraph-rsid="0250e71d"/>
    </style:style>
    <style:style style:name="P590" style:family="paragraph" style:parent-style-name="Text_20_body">
      <style:text-properties officeooo:rsid="02536a10" officeooo:paragraph-rsid="02536a10"/>
    </style:style>
    <style:style style:name="P591" style:family="paragraph" style:parent-style-name="Text_20_body">
      <style:paragraph-properties fo:text-align="justify" style:justify-single-word="false"/>
      <style:text-properties officeooo:rsid="025b9c94" officeooo:paragraph-rsid="025b9c94"/>
    </style:style>
    <style:style style:name="P592" style:family="paragraph" style:parent-style-name="Text_20_body">
      <style:paragraph-properties fo:text-align="justify" style:justify-single-word="false"/>
      <style:text-properties officeooo:rsid="02612907" officeooo:paragraph-rsid="02612907"/>
    </style:style>
    <style:style style:name="P593" style:family="paragraph" style:parent-style-name="Text_20_body">
      <style:paragraph-properties fo:text-align="justify" style:justify-single-word="false"/>
      <style:text-properties officeooo:rsid="02612907" officeooo:paragraph-rsid="02624722"/>
    </style:style>
    <style:style style:name="P594" style:family="paragraph" style:parent-style-name="Text_20_body">
      <style:paragraph-properties fo:text-align="justify" style:justify-single-word="false"/>
      <style:text-properties officeooo:rsid="02624722" officeooo:paragraph-rsid="02624722"/>
    </style:style>
    <style:style style:name="P595" style:family="paragraph" style:parent-style-name="Text_20_body">
      <style:paragraph-properties fo:text-align="justify" style:justify-single-word="false"/>
      <style:text-properties officeooo:rsid="02624722" officeooo:paragraph-rsid="02882585"/>
    </style:style>
    <style:style style:name="P596" style:family="paragraph" style:parent-style-name="Text_20_body">
      <style:text-properties officeooo:paragraph-rsid="0269f90e"/>
    </style:style>
    <style:style style:name="P597" style:family="paragraph" style:parent-style-name="Text_20_body">
      <style:paragraph-properties fo:text-align="justify" style:justify-single-word="false"/>
      <style:text-properties style:font-name="Times New Roman" fo:font-size="11pt" style:font-size-asian="11pt" style:font-size-complex="11pt"/>
    </style:style>
    <style:style style:name="P598" style:family="paragraph" style:parent-style-name="Standard">
      <style:paragraph-properties fo:text-align="justify" style:justify-single-word="false"/>
      <style:text-properties style:font-name="Times New Roman" fo:font-size="11pt" officeooo:paragraph-rsid="02577077" style:font-size-asian="11pt" style:font-size-complex="11pt"/>
    </style:style>
    <style:style style:name="P599" style:family="paragraph" style:parent-style-name="Standard">
      <style:text-properties style:font-name="Times New Roman" fo:font-size="11pt" officeooo:rsid="00d8ddbf" officeooo:paragraph-rsid="02577077" style:font-size-asian="11pt" style:font-size-complex="11pt"/>
    </style:style>
    <style:style style:name="P600" style:family="paragraph" style:parent-style-name="Standard">
      <style:text-properties style:font-name="Times New Roman" fo:font-size="11pt" officeooo:rsid="014c1c50" officeooo:paragraph-rsid="02581eb1" style:font-size-asian="11pt" style:font-size-complex="11pt"/>
    </style:style>
    <style:style style:name="P601" style:family="paragraph" style:parent-style-name="Standard">
      <style:text-properties style:font-name="Times New Roman" fo:font-size="11pt" officeooo:rsid="01804ff3" officeooo:paragraph-rsid="02581eb1" style:font-size-asian="11pt" style:font-size-complex="11pt"/>
    </style:style>
    <style:style style:name="P602" style:family="paragraph" style:parent-style-name="Text_20_body">
      <style:paragraph-properties fo:text-align="start" style:justify-single-word="false"/>
      <style:text-properties officeooo:rsid="028a32fa" officeooo:paragraph-rsid="028a32fa"/>
    </style:style>
    <style:style style:name="P603" style:family="paragraph" style:parent-style-name="Text_20_body">
      <style:paragraph-properties fo:text-align="justify" style:justify-single-word="false"/>
      <style:text-properties officeooo:rsid="02900491" officeooo:paragraph-rsid="02900491"/>
    </style:style>
    <style:style style:name="P604" style:family="paragraph" style:parent-style-name="Text_20_body">
      <style:paragraph-properties fo:text-align="justify" style:justify-single-word="false"/>
      <style:text-properties officeooo:rsid="020fa3e6" officeooo:paragraph-rsid="020fa3e6"/>
    </style:style>
    <style:style style:name="P605" style:family="paragraph" style:parent-style-name="Text_20_body">
      <style:paragraph-properties fo:text-align="justify" style:justify-single-word="false"/>
      <style:text-properties officeooo:rsid="02a16760" officeooo:paragraph-rsid="02a16760"/>
    </style:style>
    <style:style style:name="P606" style:family="paragraph" style:parent-style-name="Text_20_body">
      <style:paragraph-properties fo:text-align="justify" style:justify-single-word="false"/>
      <style:text-properties officeooo:rsid="0289b66f" officeooo:paragraph-rsid="028a2d1b"/>
    </style:style>
    <style:style style:name="P607" style:family="paragraph" style:parent-style-name="Standard">
      <style:paragraph-properties fo:text-align="justify" style:justify-single-word="false"/>
      <style:text-properties officeooo:rsid="00448f4d" officeooo:paragraph-rsid="0051c09b"/>
    </style:style>
    <style:style style:name="P608" style:family="paragraph" style:parent-style-name="Standard">
      <style:text-properties officeooo:rsid="00f73932" officeooo:paragraph-rsid="007174fd"/>
    </style:style>
    <style:style style:name="P609" style:family="paragraph" style:parent-style-name="Standard">
      <style:text-properties officeooo:paragraph-rsid="007174fd"/>
    </style:style>
    <style:style style:name="P610" style:family="paragraph" style:parent-style-name="Standard">
      <style:paragraph-properties fo:text-align="justify" style:justify-single-word="false"/>
      <style:text-properties officeooo:rsid="00a1da37" officeooo:paragraph-rsid="00a1da37"/>
    </style:style>
    <style:style style:name="P611" style:family="paragraph" style:parent-style-name="Standard">
      <style:paragraph-properties fo:text-align="justify" style:justify-single-word="false"/>
      <style:text-properties officeooo:rsid="00a1da37" officeooo:paragraph-rsid="013c5ca8"/>
    </style:style>
    <style:style style:name="P612" style:family="paragraph" style:parent-style-name="Standard">
      <style:paragraph-properties fo:text-align="justify" style:justify-single-word="false"/>
      <style:text-properties officeooo:rsid="004b7ac4" officeooo:paragraph-rsid="0140361b"/>
    </style:style>
    <style:style style:name="P613" style:family="paragraph" style:parent-style-name="Standard">
      <style:paragraph-properties fo:text-align="justify" style:justify-single-word="false"/>
      <style:text-properties officeooo:rsid="004b7ac4" officeooo:paragraph-rsid="02461945"/>
    </style:style>
    <style:style style:name="P614" style:family="paragraph" style:parent-style-name="Standard">
      <style:paragraph-properties fo:text-align="justify" style:justify-single-word="false"/>
      <style:text-properties officeooo:rsid="004a8e90" officeooo:paragraph-rsid="0140361b"/>
    </style:style>
    <style:style style:name="P615" style:family="paragraph" style:parent-style-name="Standard">
      <style:paragraph-properties fo:text-align="justify" style:justify-single-word="false"/>
      <style:text-properties officeooo:rsid="004a8e90" officeooo:paragraph-rsid="02461945"/>
    </style:style>
    <style:style style:name="P616" style:family="paragraph" style:parent-style-name="Standard">
      <style:text-properties officeooo:paragraph-rsid="0015acc5"/>
    </style:style>
    <style:style style:name="P617" style:family="paragraph" style:parent-style-name="Standard">
      <style:paragraph-properties fo:text-align="justify" style:justify-single-word="false"/>
      <style:text-properties officeooo:rsid="00a7f42a" officeooo:paragraph-rsid="013e97e9"/>
    </style:style>
    <style:style style:name="P618" style:family="paragraph" style:parent-style-name="Standard">
      <style:paragraph-properties fo:text-align="justify" style:justify-single-word="false"/>
      <style:text-properties officeooo:rsid="007c4ea7" officeooo:paragraph-rsid="018dd386"/>
    </style:style>
    <style:style style:name="P619" style:family="paragraph" style:parent-style-name="Standard">
      <style:text-properties officeooo:paragraph-rsid="018dd386"/>
    </style:style>
    <style:style style:name="P620" style:family="paragraph" style:parent-style-name="Standard">
      <style:paragraph-properties fo:text-align="justify" style:justify-single-word="false"/>
      <style:text-properties officeooo:rsid="01a5fafe" officeooo:paragraph-rsid="01a5fafe"/>
    </style:style>
    <style:style style:name="P621" style:family="paragraph" style:parent-style-name="Standard">
      <style:text-properties officeooo:rsid="00214430" officeooo:paragraph-rsid="00214430"/>
    </style:style>
    <style:style style:name="P622" style:family="paragraph" style:parent-style-name="Standard">
      <style:text-properties officeooo:rsid="021cd37d" officeooo:paragraph-rsid="021cd37d"/>
    </style:style>
    <style:style style:name="P623" style:family="paragraph" style:parent-style-name="Standard">
      <style:paragraph-properties fo:text-align="justify" style:justify-single-word="false"/>
      <style:text-properties officeooo:rsid="011c273f" officeooo:paragraph-rsid="017b3d2f"/>
    </style:style>
    <style:style style:name="P624" style:family="paragraph" style:parent-style-name="Text_20_body">
      <style:paragraph-properties fo:margin-left="0cm" fo:margin-right="0cm" fo:margin-top="0cm" fo:margin-bottom="0cm" style:contextual-spacing="false" fo:text-align="justify" style:justify-single-word="false" fo:text-indent="0cm" style:auto-text-indent="false" style:writing-mode="page">
        <style:tab-stops/>
      </style:paragraph-properties>
      <style:text-properties officeooo:paragraph-rsid="01a45ebc" style:font-name-complex="Lucida Sans1"/>
    </style:style>
    <style:style style:name="P625" style:family="paragraph" style:parent-style-name="Text_20_body">
      <style:paragraph-properties fo:margin-left="0cm" fo:margin-right="0cm" fo:margin-top="0cm" fo:margin-bottom="0cm" style:contextual-spacing="false" fo:text-align="justify" style:justify-single-word="false" fo:text-indent="0cm" style:auto-text-indent="false" style:writing-mode="page">
        <style:tab-stops/>
      </style:paragraph-properties>
      <style:text-properties officeooo:rsid="01a45ebc" officeooo:paragraph-rsid="01a45ebc" style:font-name-complex="Lucida Sans1"/>
    </style:style>
    <style:style style:name="P626" style:family="paragraph" style:parent-style-name="Text_20_body">
      <style:paragraph-properties fo:text-align="justify" style:justify-single-word="false"/>
      <style:text-properties officeooo:rsid="02a89518" officeooo:paragraph-rsid="02a89518"/>
    </style:style>
    <style:style style:name="P627" style:family="paragraph" style:parent-style-name="Standard">
      <style:paragraph-properties fo:text-align="justify" style:justify-single-word="false"/>
      <style:text-properties fo:font-size="14pt" fo:font-style="italic" fo:font-weight="bold" officeooo:rsid="01bd807f" officeooo:paragraph-rsid="01bd807f" style:font-size-asian="14pt" style:font-style-asian="italic" style:font-weight-asian="bold" style:font-size-complex="14pt" style:font-style-complex="italic" style:font-weight-complex="bold"/>
    </style:style>
    <style:style style:name="P628" style:family="paragraph" style:parent-style-name="Text_20_body">
      <style:paragraph-properties fo:text-align="justify" style:justify-single-word="false"/>
      <style:text-properties officeooo:rsid="02b0a798" officeooo:paragraph-rsid="02b0a798"/>
    </style:style>
    <style:style style:name="P629" style:family="paragraph" style:parent-style-name="Text_20_body">
      <style:paragraph-properties fo:text-align="justify" style:justify-single-word="false"/>
      <style:text-properties officeooo:rsid="02b0a798" officeooo:paragraph-rsid="02b289ea"/>
    </style:style>
    <style:style style:name="P630" style:family="paragraph" style:parent-style-name="Text_20_body">
      <style:paragraph-properties fo:text-align="justify" style:justify-single-word="false"/>
      <style:text-properties officeooo:rsid="02b0a798" officeooo:paragraph-rsid="02c42c1c"/>
    </style:style>
    <style:style style:name="P631" style:family="paragraph" style:parent-style-name="Text_20_body">
      <style:paragraph-properties fo:text-align="justify" style:justify-single-word="false"/>
      <style:text-properties officeooo:rsid="02b289ea" officeooo:paragraph-rsid="02b289ea"/>
    </style:style>
    <style:style style:name="P632" style:family="paragraph" style:parent-style-name="Text_20_body">
      <style:paragraph-properties fo:text-align="justify" style:justify-single-word="false"/>
      <style:text-properties officeooo:rsid="010ec03e" officeooo:paragraph-rsid="010ec03e"/>
    </style:style>
    <style:style style:name="P633" style:family="paragraph" style:parent-style-name="Text_20_body">
      <style:paragraph-properties fo:text-align="justify" style:justify-single-word="false"/>
      <style:text-properties officeooo:rsid="02b47795" officeooo:paragraph-rsid="02b47795"/>
    </style:style>
    <style:style style:name="P634" style:family="paragraph" style:parent-style-name="Text_20_body">
      <style:paragraph-properties fo:text-align="justify" style:justify-single-word="false"/>
      <style:text-properties officeooo:rsid="02ba626d" officeooo:paragraph-rsid="02ba626d"/>
    </style:style>
    <style:style style:name="P635" style:family="paragraph" style:parent-style-name="Text_20_body">
      <style:text-properties officeooo:paragraph-rsid="01347634"/>
    </style:style>
    <style:style style:name="P636" style:family="paragraph" style:parent-style-name="Text_20_body">
      <style:text-properties officeooo:rsid="02bec126" officeooo:paragraph-rsid="02bec126"/>
    </style:style>
    <style:style style:name="P637" style:family="paragraph" style:parent-style-name="Text_20_body">
      <style:paragraph-properties fo:text-align="justify" style:justify-single-word="false"/>
      <style:text-properties officeooo:rsid="02bec126" officeooo:paragraph-rsid="02bec126"/>
    </style:style>
    <style:style style:name="P638" style:family="paragraph" style:parent-style-name="Text_20_body">
      <style:paragraph-properties fo:text-align="justify" style:justify-single-word="false"/>
      <style:text-properties officeooo:rsid="02bfcec6" officeooo:paragraph-rsid="02bfcec6"/>
    </style:style>
    <style:style style:name="P639" style:family="paragraph" style:parent-style-name="Text_20_body">
      <style:paragraph-properties fo:text-align="start" style:justify-single-word="false"/>
      <style:text-properties officeooo:rsid="02bfcec6" officeooo:paragraph-rsid="02bfcec6"/>
    </style:style>
    <style:style style:name="P640" style:family="paragraph" style:parent-style-name="Text_20_body">
      <style:paragraph-properties fo:text-align="justify" style:justify-single-word="false"/>
      <style:text-properties officeooo:rsid="02c06500" officeooo:paragraph-rsid="02c06500"/>
    </style:style>
    <style:style style:name="P641" style:family="paragraph" style:parent-style-name="Text_20_body">
      <style:text-properties officeooo:paragraph-rsid="0216a57e"/>
    </style:style>
    <style:style style:name="P642" style:family="paragraph" style:parent-style-name="Text_20_body">
      <style:paragraph-properties fo:text-align="justify" style:justify-single-word="false"/>
      <style:text-properties officeooo:rsid="02c42c1c" officeooo:paragraph-rsid="02c42c1c"/>
    </style:style>
    <style:style style:name="P643" style:family="paragraph" style:parent-style-name="Text_20_body">
      <style:text-properties officeooo:rsid="02c4e25e" officeooo:paragraph-rsid="02c4e25e"/>
    </style:style>
    <style:style style:name="P644" style:family="paragraph" style:parent-style-name="Text_20_body">
      <style:paragraph-properties fo:text-align="justify" style:justify-single-word="false"/>
      <style:text-properties officeooo:rsid="02c4e25e" officeooo:paragraph-rsid="02c4e25e"/>
    </style:style>
    <style:style style:name="P645" style:family="paragraph" style:parent-style-name="Text_20_body">
      <style:text-properties officeooo:paragraph-rsid="0208c8b7"/>
    </style:style>
    <style:style style:name="P646" style:family="paragraph" style:parent-style-name="Text_20_body">
      <style:text-properties officeooo:rsid="02c660b1" officeooo:paragraph-rsid="02c660b1"/>
    </style:style>
    <style:style style:name="P647" style:family="paragraph" style:parent-style-name="Contents_20_1">
      <style:paragraph-properties>
        <style:tab-stops>
          <style:tab-stop style:position="18cm" style:type="right" style:leader-style="dotted" style:leader-text="."/>
        </style:tab-stops>
      </style:paragraph-properties>
    </style:style>
    <style:style style:name="P648" style:family="paragraph" style:parent-style-name="Contents_20_2">
      <style:paragraph-properties>
        <style:tab-stops>
          <style:tab-stop style:position="17.501cm" style:type="right" style:leader-style="dotted" style:leader-text="."/>
        </style:tab-stops>
      </style:paragraph-properties>
    </style:style>
    <style:style style:name="P649" style:family="paragraph" style:parent-style-name="Contents_20_3">
      <style:paragraph-properties>
        <style:tab-stops>
          <style:tab-stop style:position="17.002cm" style:type="right" style:leader-style="dotted" style:leader-text="."/>
        </style:tab-stops>
      </style:paragraph-properties>
    </style:style>
    <style:style style:name="P650" style:family="paragraph" style:parent-style-name="Contents_20_4">
      <style:paragraph-properties>
        <style:tab-stops>
          <style:tab-stop style:position="16.503cm" style:type="right" style:leader-style="dotted" style:leader-text="."/>
        </style:tab-stops>
      </style:paragraph-properties>
    </style:style>
    <style:style style:name="P651" style:family="paragraph" style:parent-style-name="Heading_20_1" style:list-style-name="">
      <style:paragraph-properties fo:text-align="start" style:justify-single-word="false">
        <style:tab-stops/>
      </style:paragraph-properties>
      <style:text-properties officeooo:paragraph-rsid="001718b7"/>
    </style:style>
    <style:style style:name="P652" style:family="paragraph" style:parent-style-name="Heading_20_1" style:list-style-name="">
      <style:paragraph-properties fo:text-align="start" style:justify-single-word="false">
        <style:tab-stops/>
      </style:paragraph-properties>
    </style:style>
    <style:style style:name="P653" style:family="paragraph" style:parent-style-name="Heading_20_1" style:list-style-name="">
      <style:paragraph-properties fo:text-align="start" style:justify-single-word="false">
        <style:tab-stops/>
      </style:paragraph-properties>
      <style:text-properties officeooo:paragraph-rsid="01571c7c"/>
    </style:style>
    <style:style style:name="P654" style:family="paragraph" style:parent-style-name="Heading_20_1">
      <style:paragraph-properties fo:break-before="page"/>
      <style:text-properties officeooo:paragraph-rsid="001718b7"/>
    </style:style>
    <style:style style:name="P655" style:family="paragraph" style:parent-style-name="Heading_20_1">
      <style:paragraph-properties fo:break-before="page"/>
    </style:style>
    <style:style style:name="P656" style:family="paragraph" style:parent-style-name="Heading_20_1">
      <style:paragraph-properties fo:break-before="page"/>
      <style:text-properties officeooo:rsid="0032d908" officeooo:paragraph-rsid="0032d908"/>
    </style:style>
    <style:style style:name="P657" style:family="paragraph" style:parent-style-name="Heading_20_1">
      <style:paragraph-properties fo:break-before="page"/>
      <style:text-properties officeooo:paragraph-rsid="02a3f731"/>
    </style:style>
    <style:style style:name="P658" style:family="paragraph" style:parent-style-name="Heading_20_1">
      <style:paragraph-properties fo:break-before="page"/>
      <style:text-properties officeooo:paragraph-rsid="01571c7c"/>
    </style:style>
    <style:style style:name="P659" style:family="paragraph" style:parent-style-name="Heading_20_1">
      <style:paragraph-properties fo:break-before="page"/>
      <style:text-properties officeooo:paragraph-rsid="00795297"/>
    </style:style>
    <style:style style:name="P660" style:family="paragraph" style:parent-style-name="Heading_20_2">
      <style:paragraph-properties fo:break-before="page"/>
      <style:text-properties officeooo:paragraph-rsid="0147a710"/>
    </style:style>
    <style:style style:name="P661" style:family="paragraph" style:parent-style-name="Heading_20_2">
      <style:text-properties officeooo:paragraph-rsid="00f6904e"/>
    </style:style>
    <style:style style:name="P662" style:family="paragraph" style:parent-style-name="Heading_20_2">
      <style:paragraph-properties fo:break-before="page"/>
      <style:text-properties officeooo:rsid="00c52114" officeooo:paragraph-rsid="00f6904e"/>
    </style:style>
    <style:style style:name="P663" style:family="paragraph" style:parent-style-name="Heading_20_2">
      <style:paragraph-properties fo:break-before="page"/>
    </style:style>
    <style:style style:name="P664" style:family="paragraph" style:parent-style-name="Heading_20_2">
      <style:text-properties officeooo:paragraph-rsid="00c586c3"/>
    </style:style>
    <style:style style:name="P665" style:family="paragraph" style:parent-style-name="Heading_20_2" style:list-style-name="">
      <style:paragraph-properties fo:text-align="justify" style:justify-single-word="false">
        <style:tab-stops/>
      </style:paragraph-properties>
      <style:text-properties officeooo:paragraph-rsid="00c60346"/>
    </style:style>
    <style:style style:name="P666" style:family="paragraph" style:parent-style-name="Heading_20_2" style:list-style-name="">
      <style:paragraph-properties fo:text-align="justify" style:justify-single-word="false">
        <style:tab-stops/>
      </style:paragraph-properties>
    </style:style>
    <style:style style:name="P667" style:family="paragraph" style:parent-style-name="Heading_20_2">
      <style:paragraph-properties fo:break-before="page"/>
      <style:text-properties officeooo:paragraph-rsid="00c60346"/>
    </style:style>
    <style:style style:name="P668" style:family="paragraph" style:parent-style-name="Heading_20_2">
      <style:paragraph-properties fo:break-before="page"/>
      <style:text-properties officeooo:paragraph-rsid="00cb2274"/>
    </style:style>
    <style:style style:name="P669" style:family="paragraph" style:parent-style-name="Heading_20_2">
      <style:paragraph-properties fo:margin-left="0cm" fo:margin-right="0cm" fo:margin-top="0cm" fo:margin-bottom="0cm" style:contextual-spacing="false" fo:text-align="justify" style:justify-single-word="false" fo:text-indent="0cm" style:auto-text-indent="false" fo:break-before="page" style:shadow="none" style:writing-mode="page">
        <style:tab-stops/>
      </style:paragraph-properties>
      <style:text-properties style:font-name="Arial1" fo:font-weight="bold" officeooo:paragraph-rsid="00d1bf1f" style:font-name-asian="Microsoft YaHei" style:font-weight-asian="bold" style:font-name-complex="Lucida Sans1" style:font-weight-complex="bold"/>
    </style:style>
    <style:style style:name="P670" style:family="paragraph" style:parent-style-name="Heading_20_2" style:list-style-name="">
      <style:paragraph-properties fo:text-align="justify" style:justify-single-word="false">
        <style:tab-stops/>
      </style:paragraph-properties>
      <style:text-properties style:font-name="Arial1" fo:font-size="14pt" officeooo:rsid="00ce6c1a" officeooo:paragraph-rsid="00d1bf1f" style:font-size-asian="14pt" style:font-size-complex="14pt"/>
    </style:style>
    <style:style style:name="P671" style:family="paragraph" style:parent-style-name="Heading_20_2">
      <style:paragraph-properties fo:break-before="page"/>
      <style:text-properties fo:font-size="14pt" officeooo:paragraph-rsid="00d1bf1f" style:font-size-asian="14pt" style:font-size-complex="14pt"/>
    </style:style>
    <style:style style:name="P672" style:family="paragraph" style:parent-style-name="Heading_20_2">
      <style:paragraph-properties fo:break-before="page"/>
      <style:text-properties officeooo:paragraph-rsid="015c580a"/>
    </style:style>
    <style:style style:name="P673" style:family="paragraph" style:parent-style-name="Heading_20_2" style:list-style-name="" style:master-page-name="">
      <style:paragraph-properties fo:margin-left="0cm" fo:margin-right="0cm" fo:margin-top="0cm" fo:margin-bottom="0cm" style:contextual-spacing="false" fo:text-indent="0cm" style:auto-text-indent="false" style:page-number="auto" style:writing-mode="page">
        <style:tab-stops/>
      </style:paragraph-properties>
      <style:text-properties style:font-name-complex="Lucida Sans1"/>
    </style:style>
    <style:style style:name="P674" style:family="paragraph" style:parent-style-name="Heading_20_2" style:list-style-name="">
      <style:paragraph-properties fo:text-align="start" style:justify-single-word="false">
        <style:tab-stops/>
      </style:paragraph-properties>
    </style:style>
    <style:style style:name="P675" style:family="paragraph" style:parent-style-name="Heading_20_2" style:list-style-name="">
      <style:paragraph-properties fo:text-align="start" style:justify-single-word="false">
        <style:tab-stops/>
      </style:paragraph-properties>
      <style:text-properties fo:font-weight="normal" style:font-weight-asian="normal" style:font-weight-complex="normal"/>
    </style:style>
    <style:style style:name="P676" style:family="paragraph" style:parent-style-name="Heading_20_2">
      <style:text-properties officeooo:rsid="018dd386" officeooo:paragraph-rsid="018dd386"/>
    </style:style>
    <style:style style:name="P677" style:family="paragraph" style:parent-style-name="Heading_20_2">
      <style:text-properties officeooo:paragraph-rsid="0140361b"/>
    </style:style>
    <style:style style:name="P678" style:family="paragraph" style:parent-style-name="Heading_20_2">
      <style:paragraph-properties fo:break-before="page"/>
      <style:text-properties officeooo:paragraph-rsid="02461945"/>
    </style:style>
    <style:style style:name="P679" style:family="paragraph" style:parent-style-name="Heading_20_2">
      <style:text-properties officeooo:paragraph-rsid="018dd386"/>
    </style:style>
    <style:style style:name="P680" style:family="paragraph" style:parent-style-name="Heading_20_2">
      <style:paragraph-properties fo:break-before="page"/>
      <style:text-properties officeooo:paragraph-rsid="01347634"/>
    </style:style>
    <style:style style:name="P681" style:family="paragraph" style:parent-style-name="Heading_20_2">
      <style:text-properties officeooo:paragraph-rsid="01347634"/>
    </style:style>
    <style:style style:name="P682" style:family="paragraph" style:parent-style-name="Heading_20_2">
      <style:text-properties officeooo:paragraph-rsid="01353978"/>
    </style:style>
    <style:style style:name="P683" style:family="paragraph" style:parent-style-name="Heading_20_2">
      <loext:graphic-properties draw:fill="none"/>
      <style:paragraph-properties fo:margin-left="0cm" fo:margin-right="0cm" fo:margin-top="0.423cm" fo:margin-bottom="0.212cm" style:contextual-spacing="false" fo:keep-together="always" fo:text-indent="0cm" style:auto-text-indent="false" fo:background-color="transparent" style:shadow="none" fo:keep-with-next="always">
        <style:tab-stops/>
      </style:paragraph-properties>
      <style:text-properties officeooo:paragraph-rsid="007174fd"/>
    </style:style>
    <style:style style:name="P684" style:family="paragraph" style:parent-style-name="Heading_20_2">
      <style:paragraph-properties fo:break-before="page"/>
      <style:text-properties officeooo:paragraph-rsid="007174fd"/>
    </style:style>
    <style:style style:name="P685" style:family="paragraph" style:parent-style-name="Heading_20_3">
      <style:text-properties officeooo:paragraph-rsid="0216a57e"/>
    </style:style>
    <style:style style:name="P686" style:family="paragraph" style:parent-style-name="Heading_20_3" style:list-style-name="">
      <style:paragraph-properties fo:text-align="start" style:justify-single-word="false"/>
    </style:style>
    <style:style style:name="P687" style:family="paragraph" style:parent-style-name="Heading_20_3" style:list-style-name="">
      <style:paragraph-properties fo:text-align="start" style:justify-single-word="false"/>
      <style:text-properties officeooo:paragraph-rsid="00b94d9c"/>
    </style:style>
    <style:style style:name="P688" style:family="paragraph" style:parent-style-name="Heading_20_3">
      <style:paragraph-properties fo:break-before="page"/>
    </style:style>
    <style:style style:name="P689" style:family="paragraph" style:parent-style-name="Heading_20_3" style:list-style-name="">
      <style:paragraph-properties fo:text-align="justify" style:justify-single-word="false"/>
      <style:text-properties officeooo:paragraph-rsid="01ab787c"/>
    </style:style>
    <style:style style:name="P690" style:family="paragraph" style:parent-style-name="Heading_20_3">
      <style:paragraph-properties fo:break-before="page"/>
      <style:text-properties officeooo:paragraph-rsid="01ab787c"/>
    </style:style>
    <style:style style:name="P691" style:family="paragraph" style:parent-style-name="Heading_20_3">
      <style:paragraph-properties fo:break-before="page"/>
      <style:text-properties officeooo:paragraph-rsid="00b94d9c"/>
    </style:style>
    <style:style style:name="P692" style:family="paragraph" style:parent-style-name="Heading_20_3">
      <style:text-properties officeooo:paragraph-rsid="013b130e"/>
    </style:style>
    <style:style style:name="P693" style:family="paragraph" style:parent-style-name="Standard">
      <style:paragraph-properties fo:text-align="justify" style:justify-single-word="false"/>
      <style:text-properties officeooo:rsid="004b7ac4" officeooo:paragraph-rsid="0140361b"/>
    </style:style>
    <style:style style:name="P694" style:family="paragraph" style:parent-style-name="Standard">
      <style:paragraph-properties fo:text-align="justify" style:justify-single-word="false"/>
      <style:text-properties officeooo:rsid="02d757c2" officeooo:paragraph-rsid="02d757c2"/>
    </style:style>
    <style:style style:name="P695" style:family="paragraph" style:parent-style-name="Standard">
      <style:paragraph-properties fo:text-align="justify" style:justify-single-word="false"/>
      <style:text-properties fo:font-style="normal" officeooo:rsid="02c68408" officeooo:paragraph-rsid="02c68408" style:font-style-asian="normal" style:font-style-complex="normal"/>
    </style:style>
    <style:style style:name="P6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c660b1" officeooo:paragraph-rsid="02c660b1" style:font-size-asian="11pt" style:font-style-asian="normal" style:font-weight-asian="normal" style:font-size-complex="11pt" style:font-style-complex="normal" style:font-weight-complex="normal" style:text-overline-style="none" style:text-overline-color="font-color"/>
    </style:style>
    <style:style style:name="P6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98" style:family="paragraph" style:parent-style-name="Text_20_body" style:master-page-name="First_20_Page">
      <style:paragraph-properties style:page-number="1"/>
    </style:style>
    <style:style style:name="P699" style:family="paragraph" style:parent-style-name="Text_20_body" style:list-style-name="">
      <style:paragraph-properties fo:text-align="center" style:justify-single-word="false"/>
      <style:text-properties style:font-name="Arial1" officeooo:rsid="01dd3fd4" officeooo:paragraph-rsid="01dd3fd4"/>
    </style:style>
    <style:style style:name="P700" style:family="paragraph" style:parent-style-name="Text_20_body" style:list-style-name="">
      <style:paragraph-properties fo:text-align="start" style:justify-single-word="false"/>
      <style:text-properties style:font-name="Arial1" officeooo:rsid="01dd3fd4" officeooo:paragraph-rsid="01dd3fd4"/>
    </style:style>
    <style:style style:name="P701" style:family="paragraph" style:parent-style-name="Text_20_body" style:list-style-name="L5">
      <style:text-properties style:font-name="Arial1" officeooo:paragraph-rsid="012d6568"/>
    </style:style>
    <style:style style:name="P702" style:family="paragraph" style:parent-style-name="Text_20_body" style:list-style-name="L7">
      <style:paragraph-properties fo:text-align="justify" style:justify-single-word="false"/>
      <style:text-properties style:font-name="Arial1" officeooo:paragraph-rsid="01330635"/>
    </style:style>
    <style:style style:name="P703" style:family="paragraph" style:parent-style-name="Text_20_body">
      <style:paragraph-properties fo:text-align="justify" style:justify-single-word="false"/>
      <style:text-properties style:font-name="Arial1" officeooo:paragraph-rsid="0216a57e"/>
    </style:style>
    <style:style style:name="P704" style:family="paragraph" style:parent-style-name="Text_20_body">
      <style:paragraph-properties fo:text-align="justify" style:justify-single-word="false"/>
      <style:text-properties style:font-name="Arial1" officeooo:rsid="02a5f3fc" officeooo:paragraph-rsid="02a5f3fc"/>
    </style:style>
    <style:style style:name="P705" style:family="paragraph" style:parent-style-name="Text_20_body">
      <style:paragraph-properties fo:text-align="justify" style:justify-single-word="false"/>
      <style:text-properties style:font-name="Arial1" officeooo:rsid="01154e96" officeooo:paragraph-rsid="01154e96"/>
    </style:style>
    <style:style style:name="P706"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285503f" officeooo:paragraph-rsid="02d09593" style:font-name-asian="Microsoft YaHei" style:font-weight-asian="normal" style:font-name-complex="Lucida Sans1" style:font-weight-complex="normal"/>
    </style:style>
    <style:style style:name="P707" style:family="paragraph" style:parent-style-name="Text_20_body">
      <style:paragraph-properties fo:text-align="justify" style:justify-single-word="false"/>
      <style:text-properties style:font-name="Arial1" fo:font-size="12pt" officeooo:rsid="00ce6c1a" officeooo:paragraph-rsid="01574542" style:font-size-asian="12pt" style:font-size-complex="12pt"/>
    </style:style>
    <style:style style:name="P708" style:family="paragraph" style:parent-style-name="Text_20_body">
      <style:paragraph-properties fo:text-align="justify" style:justify-single-word="false"/>
      <style:text-properties style:font-name="Arial1" fo:font-size="12pt" officeooo:rsid="02d248b2" officeooo:paragraph-rsid="02d248b2" style:font-size-asian="12pt" style:font-size-complex="12pt"/>
    </style:style>
    <style:style style:name="P709" style:family="paragraph" style:parent-style-name="Text_20_body" style:list-style-name="L1">
      <style:paragraph-properties fo:text-align="start" style:justify-single-word="false"/>
      <style:text-properties fo:color="#000000" loext:opacity="100%" fo:font-style="italic" fo:font-weight="bold" officeooo:paragraph-rsid="012b03a1" fo:background-color="#ffffff" style:font-style-asian="italic" style:font-weight-asian="bold" style:font-style-complex="italic" style:font-weight-complex="bold"/>
    </style:style>
    <style:style style:name="P710" style:family="paragraph" style:parent-style-name="Text_20_body" style:list-style-name="L6">
      <style:text-properties fo:color="#000000" loext:opacity="100%" fo:font-style="italic" officeooo:paragraph-rsid="02476d03" fo:background-color="#ffffff" style:font-style-asian="italic" style:font-style-complex="italic"/>
    </style:style>
    <style:style style:name="P711" style:family="paragraph" style:parent-style-name="Text_20_body" style:list-style-name="L7">
      <style:paragraph-properties fo:text-align="start" style:justify-single-word="false"/>
      <style:text-properties fo:color="#000000" loext:opacity="100%" style:font-name="Liberation Mono" officeooo:paragraph-rsid="0131b1e4" fo:background-color="#ffffff"/>
    </style:style>
    <style:style style:name="P712" style:family="paragraph" style:parent-style-name="Text_20_body" style:list-style-name="L7">
      <style:paragraph-properties fo:text-align="start" style:justify-single-word="false"/>
      <style:text-properties fo:color="#000000" loext:opacity="100%" style:font-name="Liberation Mono" officeooo:paragraph-rsid="01330635" fo:background-color="#ffffff"/>
    </style:style>
    <style:style style:name="P713" style:family="paragraph" style:parent-style-name="Text_20_body" style:list-style-name="L2">
      <style:text-properties fo:font-style="italic" fo:font-weight="bold" style:font-style-asian="italic" style:font-weight-asian="bold" style:font-style-complex="italic" style:font-weight-complex="bold"/>
    </style:style>
    <style:style style:name="P714" style:family="paragraph" style:parent-style-name="Text_20_body" style:list-style-name="L4">
      <style:text-properties fo:font-style="italic" fo:font-weight="bold" style:font-style-asian="italic" style:font-weight-asian="bold" style:font-style-complex="italic" style:font-weight-complex="bold"/>
    </style:style>
    <style:style style:name="P715" style:family="paragraph" style:parent-style-name="Text_20_body" style:list-style-name="L3"/>
    <style:style style:name="P716" style:family="paragraph" style:parent-style-name="Text_20_body" style:list-style-name="L7">
      <style:paragraph-properties fo:text-align="justify" style:justify-single-word="false"/>
      <style:text-properties officeooo:paragraph-rsid="0131b1e4"/>
    </style:style>
    <style:style style:name="P717" style:family="paragraph" style:parent-style-name="Text_20_body" style:list-style-name="L7">
      <style:paragraph-properties fo:text-align="justify" style:justify-single-word="false"/>
      <style:text-properties officeooo:paragraph-rsid="024a8ee7"/>
    </style:style>
    <style:style style:name="P718" style:family="paragraph" style:parent-style-name="Text_20_body" style:list-style-name="L7">
      <style:paragraph-properties fo:text-align="justify" style:justify-single-word="false"/>
      <style:text-properties officeooo:paragraph-rsid="01330635"/>
    </style:style>
    <style:style style:name="P719" style:family="paragraph" style:parent-style-name="Text_20_body">
      <style:paragraph-properties fo:text-align="justify" style:justify-single-word="false"/>
      <style:text-properties officeooo:paragraph-rsid="0147a710"/>
    </style:style>
    <style:style style:name="P720" style:family="paragraph" style:parent-style-name="Text_20_body" style:list-style-name="L7">
      <style:paragraph-properties fo:text-align="justify" style:justify-single-word="false"/>
      <style:text-properties style:font-name="monospace" officeooo:paragraph-rsid="024a8ee7"/>
    </style:style>
    <style:style style:name="P721" style:family="paragraph" style:parent-style-name="Text_20_body" style:list-style-name="L7">
      <style:paragraph-properties fo:text-align="start" style:justify-single-word="false"/>
      <style:text-properties style:font-name="Liberation Mono" officeooo:paragraph-rsid="01330635"/>
    </style:style>
    <style:style style:name="P722" style:family="paragraph" style:parent-style-name="Text_20_body">
      <style:paragraph-properties fo:text-align="justify" style:justify-single-word="false"/>
      <style:text-properties officeooo:rsid="02cd4a54" officeooo:paragraph-rsid="02cd4a54"/>
    </style:style>
    <style:style style:name="P723" style:family="paragraph" style:parent-style-name="Text_20_body">
      <style:paragraph-properties fo:text-align="justify" style:justify-single-word="false"/>
      <style:text-properties officeooo:rsid="00b77f06" officeooo:paragraph-rsid="00b77f06"/>
    </style:style>
    <style:style style:name="P724" style:family="paragraph" style:parent-style-name="Text_20_body">
      <style:paragraph-properties fo:text-align="justify" style:justify-single-word="false"/>
      <style:text-properties officeooo:rsid="02612907" officeooo:paragraph-rsid="02612907"/>
    </style:style>
    <style:style style:name="P725" style:family="paragraph" style:parent-style-name="Text_20_body">
      <style:paragraph-properties fo:text-align="justify" style:justify-single-word="false"/>
      <style:text-properties officeooo:rsid="02612907" officeooo:paragraph-rsid="02624722"/>
    </style:style>
    <style:style style:name="P726" style:family="paragraph" style:parent-style-name="Text_20_body">
      <style:paragraph-properties fo:text-align="justify" style:justify-single-word="false"/>
      <style:text-properties fo:font-size="14pt" fo:font-weight="bold" officeooo:rsid="0289b66f" officeooo:paragraph-rsid="028a2d1b" style:font-size-asian="14pt" style:font-weight-asian="bold" style:font-size-complex="14pt" style:font-weight-complex="bold"/>
    </style:style>
    <style:style style:name="P727" style:family="paragraph" style:parent-style-name="Text_20_body">
      <style:paragraph-properties fo:text-align="justify" style:justify-single-word="false"/>
      <style:text-properties officeooo:rsid="028a2d1b" officeooo:paragraph-rsid="028a2d1b"/>
    </style:style>
    <style:style style:name="T1" style:family="text">
      <style:text-properties officeooo:rsid="001eb9d2"/>
    </style:style>
    <style:style style:name="T2" style:family="text">
      <style:text-properties style:text-line-through-style="none" style:text-line-through-type="none"/>
    </style:style>
    <style:style style:name="T3" style:family="text">
      <style:text-properties style:text-line-through-style="none" style:text-line-through-type="none" style:font-name="Liberation Mono"/>
    </style:style>
    <style:style style:name="T4" style:family="text">
      <style:text-properties style:text-line-through-style="none" style:text-line-through-type="none" style:font-name="Liberation Mono" officeooo:rsid="01821a74"/>
    </style:style>
    <style:style style:name="T5" style:family="text">
      <style:text-properties style:text-line-through-style="none" style:text-line-through-type="none" officeooo:rsid="01a1ae4f"/>
    </style:style>
    <style:style style:name="T6" style:family="text">
      <style:text-properties style:text-line-through-style="none" style:text-line-through-type="none" officeooo:rsid="02c4e25e"/>
    </style:style>
    <style:style style:name="T7" style:family="text">
      <style:text-properties style:text-line-through-style="solid" style:text-line-through-type="single" style:text-line-through-text="X"/>
    </style:style>
    <style:style style:name="T8" style:family="text">
      <style:text-properties style:text-line-through-style="solid" style:text-line-through-type="single" style:text-line-through-text="X" fo:background-color="transparent" loext:char-shading-value="0"/>
    </style:style>
    <style:style style:name="T9" style:family="text">
      <style:text-properties fo:font-size="12pt" style:font-size-asian="12pt" style:font-size-complex="12pt"/>
    </style:style>
    <style:style style:name="T10" style:family="text">
      <style:text-properties fo:font-size="12pt" officeooo:rsid="0015acc5" style:font-size-asian="12pt" style:font-size-complex="12pt"/>
    </style:style>
    <style:style style:name="T11" style:family="text">
      <style:text-properties fo:font-size="12pt" officeooo:rsid="003bf684" style:font-size-asian="12pt" style:font-size-complex="12pt"/>
    </style:style>
    <style:style style:name="T12" style:family="text">
      <style:text-properties fo:font-size="12pt" officeooo:rsid="00f06419" style:font-size-asian="12pt" style:font-size-complex="12pt"/>
    </style:style>
    <style:style style:name="T13" style:family="text">
      <style:text-properties fo:font-size="12pt" officeooo:rsid="02013b58" style:font-size-asian="12pt" style:font-size-complex="12pt"/>
    </style:style>
    <style:style style:name="T14" style:family="text">
      <style:text-properties fo:font-size="12pt" officeooo:rsid="0283ab3d" style:font-size-asian="12pt" style:font-size-complex="12pt"/>
    </style:style>
    <style:style style:name="T15" style:family="text">
      <style:text-properties fo:font-size="12pt" officeooo:rsid="02baafda" style:font-size-asian="12pt" style:font-size-complex="12pt"/>
    </style:style>
    <style:style style:name="T16" style:family="text">
      <style:text-properties fo:font-size="12pt" fo:font-style="italic" fo:font-weight="bold" officeooo:rsid="0037c69f" style:font-size-asian="12pt" style:font-style-asian="italic" style:font-weight-asian="bold" style:font-size-complex="12pt" style:font-style-complex="italic" style:font-weight-complex="bold"/>
    </style:style>
    <style:style style:name="T17" style:family="text">
      <style:text-properties officeooo:rsid="001f6f30"/>
    </style:style>
    <style:style style:name="T18" style:family="text">
      <style:text-properties officeooo:rsid="0015acc5"/>
    </style:style>
    <style:style style:name="T19" style:family="text">
      <style:text-properties officeooo:rsid="001718b7"/>
    </style:style>
    <style:style style:name="T20" style:family="text">
      <style:text-properties officeooo:rsid="00176274"/>
    </style:style>
    <style:style style:name="T21" style:family="text">
      <style:text-properties officeooo:rsid="0019987b"/>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35d2f2" style:font-weight-asian="bold" style:font-weight-complex="bold"/>
    </style:style>
    <style:style style:name="T25" style:family="text">
      <style:text-properties fo:font-weight="bold" officeooo:rsid="00458eeb" style:font-weight-asian="bold" style:font-weight-complex="bold"/>
    </style:style>
    <style:style style:name="T26" style:family="text">
      <style:text-properties fo:font-weight="bold" officeooo:rsid="00db25a7" style:font-weight-asian="bold" style:font-weight-complex="bold"/>
    </style:style>
    <style:style style:name="T27" style:family="text">
      <style:text-properties fo:font-weight="bold" officeooo:rsid="00917b6f" style:font-weight-asian="bold" style:font-weight-complex="bold"/>
    </style:style>
    <style:style style:name="T28" style:family="text">
      <style:text-properties fo:font-weight="bold" officeooo:rsid="0031257b" style:font-weight-asian="bold" style:font-weight-complex="bold"/>
    </style:style>
    <style:style style:name="T29" style:family="text">
      <style:text-properties fo:font-weight="bold" officeooo:rsid="00280832" style:font-weight-asian="bold" style:font-weight-complex="bold"/>
    </style:style>
    <style:style style:name="T30" style:family="text">
      <style:text-properties fo:font-weight="bold" officeooo:rsid="016a7291" style:font-weight-asian="bold" style:font-weight-complex="bold"/>
    </style:style>
    <style:style style:name="T31" style:family="text">
      <style:text-properties fo:font-weight="bold" officeooo:rsid="016f0976" style:font-weight-asian="bold" style:font-weight-complex="bold"/>
    </style:style>
    <style:style style:name="T32" style:family="text">
      <style:text-properties fo:font-weight="bold" officeooo:rsid="016f8d83" style:font-weight-asian="bold" style:font-weight-complex="bold"/>
    </style:style>
    <style:style style:name="T33" style:family="text">
      <style:text-properties fo:font-weight="bold" officeooo:rsid="017a2d63" style:font-weight-asian="bold" style:font-weight-complex="bold"/>
    </style:style>
    <style:style style:name="T34" style:family="text">
      <style:text-properties fo:font-weight="bold" officeooo:rsid="01571c7c" style:font-weight-asian="bold" style:font-weight-complex="bold"/>
    </style:style>
    <style:style style:name="T35" style:family="text">
      <style:text-properties fo:font-weight="bold" officeooo:rsid="01a3783a" style:font-weight-asian="bold" style:font-weight-complex="bold"/>
    </style:style>
    <style:style style:name="T36" style:family="text">
      <style:text-properties fo:font-weight="bold" officeooo:rsid="01c2ff30" style:font-weight-asian="bold" style:font-weight-complex="bold"/>
    </style:style>
    <style:style style:name="T37" style:family="text">
      <style:text-properties fo:font-weight="bold" officeooo:rsid="017b3d2f" style:font-weight-asian="bold" style:font-weight-complex="bold"/>
    </style:style>
    <style:style style:name="T38" style:family="text">
      <style:text-properties fo:font-weight="bold" officeooo:rsid="01d4d6a5" style:font-weight-asian="bold" style:font-weight-complex="bold"/>
    </style:style>
    <style:style style:name="T39" style:family="text">
      <style:text-properties fo:font-weight="bold" officeooo:rsid="019fd78e" style:font-weight-asian="bold" style:font-weight-complex="bold"/>
    </style:style>
    <style:style style:name="T40" style:family="text">
      <style:text-properties fo:font-weight="bold" officeooo:rsid="02070ed5" style:font-weight-asian="bold" style:font-weight-complex="bold"/>
    </style:style>
    <style:style style:name="T41" style:family="text">
      <style:text-properties fo:font-weight="bold" officeooo:rsid="02536a10" style:font-weight-asian="bold" style:font-weight-complex="bold"/>
    </style:style>
    <style:style style:name="T42" style:family="text">
      <style:text-properties fo:font-weight="bold" officeooo:rsid="0155cd72" style:font-weight-asian="bold" style:font-weight-complex="bold"/>
    </style:style>
    <style:style style:name="T43" style:family="text">
      <style:text-properties fo:font-weight="bold" officeooo:rsid="006115d1" style:font-weight-asian="bold" style:font-weight-complex="bold"/>
    </style:style>
    <style:style style:name="T44" style:family="text">
      <style:text-properties fo:font-weight="bold" officeooo:rsid="026f985a" style:font-weight-asian="bold" style:font-weight-complex="bold"/>
    </style:style>
    <style:style style:name="T45" style:family="text">
      <style:text-properties fo:font-weight="bold" officeooo:rsid="0049e974" style:font-weight-asian="bold" style:font-weight-complex="bold"/>
    </style:style>
    <style:style style:name="T46" style:family="text">
      <style:text-properties officeooo:rsid="001cec2b"/>
    </style:style>
    <style:style style:name="T47" style:family="text">
      <style:text-properties officeooo:rsid="00214430"/>
    </style:style>
    <style:style style:name="T48" style:family="text">
      <style:text-properties officeooo:rsid="0021a117"/>
    </style:style>
    <style:style style:name="T49" style:family="text">
      <style:text-properties officeooo:rsid="0022c43e"/>
    </style:style>
    <style:style style:name="T50" style:family="text">
      <style:text-properties officeooo:rsid="002331d8"/>
    </style:style>
    <style:style style:name="T51" style:family="text">
      <style:text-properties officeooo:rsid="0024bb28"/>
    </style:style>
    <style:style style:name="T52" style:family="text">
      <style:text-properties officeooo:rsid="0025972e"/>
    </style:style>
    <style:style style:name="T53" style:family="text">
      <style:text-properties officeooo:rsid="00264c1c"/>
    </style:style>
    <style:style style:name="T54" style:family="text">
      <style:text-properties officeooo:rsid="00280832"/>
    </style:style>
    <style:style style:name="T55" style:family="text">
      <style:text-properties officeooo:rsid="002a080e"/>
    </style:style>
    <style:style style:name="T56" style:family="text">
      <style:text-properties officeooo:rsid="002dce5f"/>
    </style:style>
    <style:style style:name="T57" style:family="text">
      <style:text-properties officeooo:rsid="002f877d"/>
    </style:style>
    <style:style style:name="T58" style:family="text">
      <style:text-properties officeooo:rsid="0031257b"/>
    </style:style>
    <style:style style:name="T59" style:family="text">
      <style:text-properties officeooo:rsid="00351111"/>
    </style:style>
    <style:style style:name="T60" style:family="text">
      <style:text-properties officeooo:rsid="0035d2f2"/>
    </style:style>
    <style:style style:name="T61" style:family="text">
      <style:text-properties fo:font-style="italic" style:font-style-asian="italic" style:font-style-complex="italic"/>
    </style:style>
    <style:style style:name="T62" style:family="text">
      <style:text-properties fo:font-style="italic" officeooo:rsid="00351111" style:font-style-asian="italic" style:font-style-complex="italic"/>
    </style:style>
    <style:style style:name="T63" style:family="text">
      <style:text-properties fo:font-style="italic" officeooo:rsid="0037e16c" style:font-style-asian="italic" style:font-style-complex="italic"/>
    </style:style>
    <style:style style:name="T64" style:family="text">
      <style:text-properties fo:font-style="italic" officeooo:rsid="008dbfe1" style:font-style-asian="italic" style:font-style-complex="italic"/>
    </style:style>
    <style:style style:name="T65" style:family="text">
      <style:text-properties fo:font-style="italic" officeooo:rsid="00df735b" style:font-style-asian="italic" style:font-style-complex="italic"/>
    </style:style>
    <style:style style:name="T66" style:family="text">
      <style:text-properties fo:font-style="italic" officeooo:rsid="015d2012" style:font-style-asian="italic" style:font-style-complex="italic"/>
    </style:style>
    <style:style style:name="T67" style:family="text">
      <style:text-properties fo:font-style="italic" officeooo:rsid="003e20b2" style:font-style-asian="italic" style:font-style-complex="italic"/>
    </style:style>
    <style:style style:name="T68" style:family="text">
      <style:text-properties fo:font-style="italic" officeooo:rsid="016db416" style:font-style-asian="italic" style:font-style-complex="italic"/>
    </style:style>
    <style:style style:name="T69" style:family="text">
      <style:text-properties fo:font-style="italic" officeooo:rsid="016f8d83" style:font-style-asian="italic" style:font-style-complex="italic"/>
    </style:style>
    <style:style style:name="T70" style:family="text">
      <style:text-properties fo:font-style="italic" officeooo:rsid="01aeffd7" style:font-style-asian="italic" style:font-style-complex="italic"/>
    </style:style>
    <style:style style:name="T71" style:family="text">
      <style:text-properties fo:font-style="italic" officeooo:rsid="020ea963" style:font-style-asian="italic" style:font-style-complex="italic"/>
    </style:style>
    <style:style style:name="T72" style:family="text">
      <style:text-properties fo:font-style="italic" officeooo:rsid="0269c1de" style:font-style-asian="italic" style:font-style-complex="italic"/>
    </style:style>
    <style:style style:name="T73" style:family="text">
      <style:text-properties fo:font-style="italic" officeooo:rsid="02c4e25e"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372dd8" style:font-style-asian="italic" style:font-weight-asian="bold" style:font-style-complex="italic" style:font-weight-complex="bold"/>
    </style:style>
    <style:style style:name="T76" style:family="text">
      <style:text-properties fo:font-style="italic" fo:font-weight="bold" officeooo:rsid="00351111" style:font-style-asian="italic" style:font-weight-asian="bold" style:font-style-complex="italic" style:font-weight-complex="bold"/>
    </style:style>
    <style:style style:name="T77" style:family="text">
      <style:text-properties fo:font-style="italic" fo:font-weight="bold" officeooo:rsid="01192aa3" style:font-style-asian="italic" style:font-weight-asian="bold" style:font-style-complex="italic" style:font-weight-complex="bold"/>
    </style:style>
    <style:style style:name="T78" style:family="text">
      <style:text-properties fo:font-style="italic" fo:font-weight="bold" officeooo:rsid="012d827c" style:font-style-asian="italic" style:font-weight-asian="bold" style:font-style-complex="italic" style:font-weight-complex="bold"/>
    </style:style>
    <style:style style:name="T79" style:family="text">
      <style:text-properties fo:font-style="italic" fo:font-weight="bold" officeooo:rsid="015b160f" style:font-style-asian="italic" style:font-weight-asian="bold" style:font-style-complex="italic" style:font-weight-complex="bold"/>
    </style:style>
    <style:style style:name="T80" style:family="text">
      <style:text-properties fo:font-style="italic" fo:font-weight="bold" officeooo:rsid="0051c09b" style:font-style-asian="italic" style:font-weight-asian="bold" style:font-style-complex="italic" style:font-weight-complex="bold"/>
    </style:style>
    <style:style style:name="T81" style:family="text">
      <style:text-properties fo:font-style="italic" fo:font-weight="bold" officeooo:rsid="003e20b2" style:font-style-asian="italic" style:font-weight-asian="bold" style:font-style-complex="italic" style:font-weight-complex="bold"/>
    </style:style>
    <style:style style:name="T82" style:family="text">
      <style:text-properties fo:font-style="italic" fo:font-weight="bold" officeooo:rsid="00542c05" style:font-style-asian="italic" style:font-weight-asian="bold" style:font-style-complex="italic" style:font-weight-complex="bold"/>
    </style:style>
    <style:style style:name="T83" style:family="text">
      <style:text-properties fo:font-style="italic" fo:font-weight="bold" officeooo:rsid="01b2c87e" style:font-style-asian="italic" style:font-weight-asian="bold" style:font-style-complex="italic" style:font-weight-complex="bold"/>
    </style:style>
    <style:style style:name="T84" style:family="text">
      <style:text-properties fo:font-style="italic" fo:font-weight="bold" officeooo:rsid="00f06419" style:font-style-asian="italic" style:font-weight-asian="bold" style:font-style-complex="italic" style:font-weight-complex="bold"/>
    </style:style>
    <style:style style:name="T85" style:family="text">
      <style:text-properties fo:font-style="italic" fo:font-weight="bold" officeooo:rsid="017a2d63" style:font-style-asian="italic" style:font-weight-asian="bold" style:font-style-complex="italic" style:font-weight-complex="bold"/>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039bea8" style:font-style-asian="italic" style:font-weight-asian="normal" style:font-style-complex="italic" style:font-weight-complex="normal"/>
    </style:style>
    <style:style style:name="T88" style:family="text">
      <style:text-properties fo:font-style="italic" fo:font-weight="normal" officeooo:rsid="00b94d9c" style:font-style-asian="italic" style:font-weight-asian="normal" style:font-style-complex="italic" style:font-weight-complex="normal"/>
    </style:style>
    <style:style style:name="T89" style:family="text">
      <style:text-properties fo:font-style="italic" fo:font-weight="normal" officeooo:rsid="00351111" style:font-style-asian="italic" style:font-weight-asian="normal" style:font-style-complex="italic" style:font-weight-complex="normal"/>
    </style:style>
    <style:style style:name="T90" style:family="text">
      <style:text-properties fo:font-style="italic" fo:font-weight="normal" officeooo:rsid="0088d318" style:font-style-asian="italic" style:font-weight-asian="normal" style:font-style-complex="italic" style:font-weight-complex="normal"/>
    </style:style>
    <style:style style:name="T91" style:family="text">
      <style:text-properties fo:font-style="italic" style:text-underline-style="none" fo:font-weight="bold" officeooo:rsid="0051c09b" style:font-style-asian="italic" style:font-weight-asian="bold" style:font-style-complex="italic" style:font-weight-complex="bold"/>
    </style:style>
    <style:style style:name="T92" style:family="text">
      <style:text-properties officeooo:rsid="00372dd8"/>
    </style:style>
    <style:style style:name="T93" style:family="text">
      <style:text-properties officeooo:rsid="0037c69f"/>
    </style:style>
    <style:style style:name="T94" style:family="text">
      <style:text-properties fo:font-weight="normal" style:font-weight-asian="normal" style:font-weight-complex="normal"/>
    </style:style>
    <style:style style:name="T95" style:family="text">
      <style:text-properties fo:font-weight="normal" officeooo:rsid="003e20b2" style:font-weight-asian="normal" style:font-weight-complex="normal"/>
    </style:style>
    <style:style style:name="T96" style:family="text">
      <style:text-properties fo:font-weight="normal" officeooo:rsid="0040fd48" style:font-weight-asian="normal" style:font-weight-complex="normal"/>
    </style:style>
    <style:style style:name="T97" style:family="text">
      <style:text-properties fo:font-weight="normal" officeooo:rsid="0042b006" style:font-weight-asian="normal" style:font-weight-complex="normal"/>
    </style:style>
    <style:style style:name="T98" style:family="text">
      <style:text-properties fo:font-weight="normal" officeooo:rsid="00542c05" style:font-weight-asian="normal" style:font-weight-complex="normal"/>
    </style:style>
    <style:style style:name="T99" style:family="text">
      <style:text-properties fo:font-weight="normal" officeooo:rsid="00571c41" style:font-weight-asian="normal" style:font-weight-complex="normal"/>
    </style:style>
    <style:style style:name="T100" style:family="text">
      <style:text-properties fo:font-weight="normal" officeooo:rsid="0059afae" style:font-weight-asian="normal" style:font-weight-complex="normal"/>
    </style:style>
    <style:style style:name="T101" style:family="text">
      <style:text-properties fo:font-weight="normal" officeooo:rsid="005a5832" style:font-weight-asian="normal" style:font-weight-complex="normal"/>
    </style:style>
    <style:style style:name="T102" style:family="text">
      <style:text-properties fo:font-weight="normal" officeooo:rsid="005bcc00" style:font-weight-asian="normal" style:font-weight-complex="normal"/>
    </style:style>
    <style:style style:name="T103" style:family="text">
      <style:text-properties fo:font-weight="normal" officeooo:rsid="005ebb16" style:font-weight-asian="normal" style:font-weight-complex="normal"/>
    </style:style>
    <style:style style:name="T104" style:family="text">
      <style:text-properties fo:font-weight="normal" officeooo:rsid="0066b75c" style:font-weight-asian="normal" style:font-weight-complex="normal"/>
    </style:style>
    <style:style style:name="T105" style:family="text">
      <style:text-properties fo:font-weight="normal" officeooo:rsid="00e2cf55" style:font-weight-asian="normal" style:font-weight-complex="normal"/>
    </style:style>
    <style:style style:name="T106" style:family="text">
      <style:text-properties fo:font-weight="normal" officeooo:rsid="0125be6e" style:font-weight-asian="normal" style:font-weight-complex="normal"/>
    </style:style>
    <style:style style:name="T107" style:family="text">
      <style:text-properties fo:font-weight="normal" officeooo:rsid="01938924" style:font-weight-asian="normal" style:font-weight-complex="normal"/>
    </style:style>
    <style:style style:name="T108" style:family="text">
      <style:text-properties fo:font-weight="normal" officeooo:rsid="0197ac42" style:font-weight-asian="normal" style:font-weight-complex="normal"/>
    </style:style>
    <style:style style:name="T109" style:family="text">
      <style:text-properties fo:font-weight="normal" officeooo:rsid="01a3783a" style:font-weight-asian="normal" style:font-weight-complex="normal"/>
    </style:style>
    <style:style style:name="T110" style:family="text">
      <style:text-properties fo:font-weight="normal" officeooo:rsid="01a45ebc" style:font-weight-asian="normal" style:font-weight-complex="normal"/>
    </style:style>
    <style:style style:name="T111" style:family="text">
      <style:text-properties fo:font-weight="normal" officeooo:rsid="01aeffd7" style:font-weight-asian="normal" style:font-weight-complex="normal"/>
    </style:style>
    <style:style style:name="T112" style:family="text">
      <style:text-properties fo:font-weight="normal" officeooo:rsid="0209b73a" style:font-weight-asian="normal" style:font-weight-complex="normal"/>
    </style:style>
    <style:style style:name="T113" style:family="text">
      <style:text-properties fo:font-weight="normal" officeooo:rsid="0209fa3c" style:font-weight-asian="normal" style:font-weight-complex="normal"/>
    </style:style>
    <style:style style:name="T114" style:family="text">
      <style:text-properties fo:font-weight="normal" officeooo:rsid="0269f90e" style:font-weight-asian="normal" style:font-weight-complex="normal"/>
    </style:style>
    <style:style style:name="T115" style:family="text">
      <style:text-properties fo:font-weight="normal" officeooo:rsid="0049e974" style:font-weight-asian="normal" style:font-weight-complex="normal"/>
    </style:style>
    <style:style style:name="T116" style:family="text">
      <style:text-properties officeooo:rsid="0037e16c"/>
    </style:style>
    <style:style style:name="T117" style:family="text">
      <style:text-properties officeooo:rsid="003860bd"/>
    </style:style>
    <style:style style:name="T118" style:family="text">
      <style:text-properties officeooo:rsid="0039bea8"/>
    </style:style>
    <style:style style:name="T119" style:family="text">
      <style:text-properties officeooo:rsid="003adffa"/>
    </style:style>
    <style:style style:name="T120" style:family="text">
      <style:text-properties officeooo:rsid="003bf684"/>
    </style:style>
    <style:style style:name="T121" style:family="text">
      <style:text-properties officeooo:rsid="003c954e"/>
    </style:style>
    <style:style style:name="T122" style:family="text">
      <style:text-properties officeooo:rsid="003e20b2"/>
    </style:style>
    <style:style style:name="T123" style:family="text">
      <style:text-properties officeooo:rsid="00401654"/>
    </style:style>
    <style:style style:name="T124" style:family="text">
      <style:text-properties officeooo:rsid="0040fd48"/>
    </style:style>
    <style:style style:name="T125" style:family="text">
      <style:text-properties officeooo:rsid="0042b006"/>
    </style:style>
    <style:style style:name="T126" style:family="text">
      <style:text-properties officeooo:rsid="00458eeb"/>
    </style:style>
    <style:style style:name="T127" style:family="text">
      <style:text-properties officeooo:rsid="0045b5f9"/>
    </style:style>
    <style:style style:name="T128" style:family="text">
      <style:text-properties officeooo:rsid="0049e974"/>
    </style:style>
    <style:style style:name="T129" style:family="text">
      <style:text-properties officeooo:rsid="004a26d6"/>
    </style:style>
    <style:style style:name="T130" style:family="text">
      <style:text-properties officeooo:rsid="004b6c93"/>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style:text-underline-style="solid" style:text-underline-width="auto" style:text-underline-color="font-color" fo:font-weight="normal" officeooo:rsid="00e36c45" style:font-weight-asian="normal" style:font-weight-complex="normal"/>
    </style:style>
    <style:style style:name="T134" style:family="text">
      <style:text-properties officeooo:rsid="004d8f25"/>
    </style:style>
    <style:style style:name="T135" style:family="text">
      <style:text-properties officeooo:rsid="004f6632"/>
    </style:style>
    <style:style style:name="T136" style:family="text">
      <style:text-properties officeooo:rsid="0051c09b"/>
    </style:style>
    <style:style style:name="T137" style:family="text">
      <style:text-properties style:font-name="Liberation Mono"/>
    </style:style>
    <style:style style:name="T138" style:family="text">
      <style:text-properties style:font-name="Liberation Mono" officeooo:rsid="004618ec"/>
    </style:style>
    <style:style style:name="T139" style:family="text">
      <style:text-properties style:font-name="Liberation Mono" officeooo:rsid="01821a74"/>
    </style:style>
    <style:style style:name="T140" style:family="text">
      <style:text-properties style:font-name="Liberation Mono" officeooo:rsid="01a1ae4f"/>
    </style:style>
    <style:style style:name="T141" style:family="text">
      <style:text-properties style:font-name="Liberation Mono" officeooo:rsid="01fd0fd2"/>
    </style:style>
    <style:style style:name="T142" style:family="text">
      <style:text-properties style:font-name="Liberation Mono" officeooo:rsid="023038ab"/>
    </style:style>
    <style:style style:name="T143" style:family="text">
      <style:text-properties style:font-name="Liberation Mono" officeooo:rsid="01bef21c"/>
    </style:style>
    <style:style style:name="T144" style:family="text">
      <style:text-properties style:font-name="Liberation Mono" officeooo:rsid="0231f929"/>
    </style:style>
    <style:style style:name="T145" style:family="text">
      <style:text-properties style:font-name="Liberation Mono" fo:font-style="normal" style:font-style-asian="normal" style:font-style-complex="normal"/>
    </style:style>
    <style:style style:name="T146" style:family="text">
      <style:text-properties style:font-name="Liberation Mono" fo:font-style="italic" style:font-style-asian="italic" style:font-style-complex="italic"/>
    </style:style>
    <style:style style:name="T147" style:family="text">
      <style:text-properties officeooo:rsid="0052d401"/>
    </style:style>
    <style:style style:name="T148" style:family="text">
      <style:text-properties officeooo:rsid="005d65ea"/>
    </style:style>
    <style:style style:name="T149" style:family="text">
      <style:text-properties officeooo:rsid="005ebb16"/>
    </style:style>
    <style:style style:name="T150" style:family="text">
      <style:text-properties officeooo:rsid="005f363c"/>
    </style:style>
    <style:style style:name="T151" style:family="text">
      <style:text-properties officeooo:rsid="00600326"/>
    </style:style>
    <style:style style:name="T152" style:family="text">
      <style:text-properties officeooo:rsid="0060cf7a"/>
    </style:style>
    <style:style style:name="T153" style:family="text">
      <style:text-properties officeooo:rsid="006115d1"/>
    </style:style>
    <style:style style:name="T154" style:family="text">
      <style:text-properties officeooo:rsid="00630a18"/>
    </style:style>
    <style:style style:name="T155" style:family="text">
      <style:text-properties officeooo:rsid="0064444d"/>
    </style:style>
    <style:style style:name="T156" style:family="text">
      <style:text-properties fo:background-color="#dc2300" loext:char-shading-value="0"/>
    </style:style>
    <style:style style:name="T157" style:family="text">
      <style:text-properties officeooo:rsid="0064444d" fo:background-color="#dc2300" loext:char-shading-value="0"/>
    </style:style>
    <style:style style:name="T158" style:family="text">
      <style:text-properties officeooo:rsid="00658b77"/>
    </style:style>
    <style:style style:name="T159" style:family="text">
      <style:text-properties officeooo:rsid="0066b75c"/>
    </style:style>
    <style:style style:name="T160" style:family="text">
      <style:text-properties officeooo:rsid="0067101e"/>
    </style:style>
    <style:style style:name="T161" style:family="text">
      <style:text-properties officeooo:rsid="006831d8"/>
    </style:style>
    <style:style style:name="T162" style:family="text">
      <style:text-properties officeooo:rsid="00687de2"/>
    </style:style>
    <style:style style:name="T163" style:family="text">
      <style:text-properties officeooo:rsid="006b457e"/>
    </style:style>
    <style:style style:name="T164" style:family="text">
      <style:text-properties officeooo:rsid="006d7498"/>
    </style:style>
    <style:style style:name="T165" style:family="text">
      <style:text-properties officeooo:rsid="006ef277"/>
    </style:style>
    <style:style style:name="T166" style:family="text">
      <style:text-properties officeooo:rsid="00709460"/>
    </style:style>
    <style:style style:name="T167" style:family="text">
      <style:text-properties officeooo:rsid="008cc4e2"/>
    </style:style>
    <style:style style:name="T168" style:family="text">
      <style:text-properties officeooo:rsid="0088945b"/>
    </style:style>
    <style:style style:name="T169" style:family="text">
      <style:text-properties officeooo:rsid="00945869"/>
    </style:style>
    <style:style style:name="T170" style:family="text">
      <style:text-properties officeooo:rsid="008a5784"/>
    </style:style>
    <style:style style:name="T171" style:family="text">
      <style:text-properties officeooo:rsid="004ec0c1"/>
    </style:style>
    <style:style style:name="T172" style:family="text">
      <style:text-properties officeooo:rsid="008dfc63"/>
    </style:style>
    <style:style style:name="T173" style:family="text">
      <style:text-properties officeooo:rsid="00d86c28"/>
    </style:style>
    <style:style style:name="T174" style:family="text">
      <style:text-properties officeooo:rsid="008c0718"/>
    </style:style>
    <style:style style:name="T175" style:family="text">
      <style:text-properties officeooo:rsid="0145b9a5"/>
    </style:style>
    <style:style style:name="T176" style:family="text">
      <style:text-properties officeooo:rsid="008f59c2"/>
    </style:style>
    <style:style style:name="T177" style:family="text">
      <style:text-properties officeooo:rsid="00d965c9"/>
    </style:style>
    <style:style style:name="T178" style:family="text">
      <style:text-properties officeooo:rsid="0090c064"/>
    </style:style>
    <style:style style:name="T179" style:family="text">
      <style:text-properties fo:font-style="normal" style:font-style-asian="normal" style:font-style-complex="normal"/>
    </style:style>
    <style:style style:name="T180" style:family="text">
      <style:text-properties fo:font-style="normal" officeooo:rsid="013c5ca8" style:font-style-asian="normal" style:font-style-complex="normal"/>
    </style:style>
    <style:style style:name="T181" style:family="text">
      <style:text-properties fo:font-style="normal" officeooo:rsid="013db025" style:font-style-asian="normal" style:font-style-complex="normal"/>
    </style:style>
    <style:style style:name="T182" style:family="text">
      <style:text-properties fo:font-style="normal" officeooo:rsid="013fd7a1" style:font-style-asian="normal" style:font-style-complex="normal"/>
    </style:style>
    <style:style style:name="T183" style:family="text">
      <style:text-properties fo:font-style="normal" officeooo:rsid="016f8d83" style:font-style-asian="normal" style:font-style-complex="normal"/>
    </style:style>
    <style:style style:name="T184" style:family="text">
      <style:text-properties fo:font-style="normal" officeooo:rsid="0170168f" style:font-style-asian="normal" style:font-style-complex="normal"/>
    </style:style>
    <style:style style:name="T185" style:family="text">
      <style:text-properties fo:font-style="normal" officeooo:rsid="017a2d63" style:font-style-asian="normal" style:font-style-complex="normal"/>
    </style:style>
    <style:style style:name="T186" style:family="text">
      <style:text-properties fo:font-style="normal" officeooo:rsid="017b3d2f" style:font-style-asian="normal" style:font-style-complex="normal"/>
    </style:style>
    <style:style style:name="T187" style:family="text">
      <style:text-properties fo:font-style="normal" officeooo:rsid="01ab787c" style:font-style-asian="normal" style:font-style-complex="normal"/>
    </style:style>
    <style:style style:name="T188" style:family="text">
      <style:text-properties fo:font-style="normal" officeooo:rsid="01ad6aae" style:font-style-asian="normal" style:font-style-complex="normal"/>
    </style:style>
    <style:style style:name="T189" style:family="text">
      <style:text-properties fo:font-style="normal" officeooo:rsid="01c1d233" style:font-style-asian="normal" style:font-style-complex="normal"/>
    </style:style>
    <style:style style:name="T190" style:family="text">
      <style:text-properties fo:font-style="normal" officeooo:rsid="01c42ac8" style:font-style-asian="normal" style:font-style-complex="normal"/>
    </style:style>
    <style:style style:name="T191" style:family="text">
      <style:text-properties fo:font-style="normal" officeooo:rsid="01e78945" style:font-style-asian="normal" style:font-style-complex="normal"/>
    </style:style>
    <style:style style:name="T192" style:family="text">
      <style:text-properties fo:font-style="normal" officeooo:rsid="01e8b619" style:font-style-asian="normal" style:font-style-complex="normal"/>
    </style:style>
    <style:style style:name="T193" style:family="text">
      <style:text-properties fo:font-style="normal" officeooo:rsid="024f1b06" style:font-style-asian="normal" style:font-style-complex="normal"/>
    </style:style>
    <style:style style:name="T194" style:family="text">
      <style:text-properties fo:font-style="normal" officeooo:rsid="01c2ff30" style:font-style-asian="normal" style:font-style-complex="normal"/>
    </style:style>
    <style:style style:name="T195" style:family="text">
      <style:text-properties fo:font-style="normal" officeooo:rsid="026f2051" style:font-style-asian="normal" style:font-style-complex="normal"/>
    </style:style>
    <style:style style:name="T196" style:family="text">
      <style:text-properties fo:font-style="normal" officeooo:rsid="029b42ef" style:font-style-asian="normal" style:font-style-complex="normal"/>
    </style:style>
    <style:style style:name="T197" style:family="text">
      <style:text-properties fo:font-style="normal" officeooo:rsid="02abafb7" style:font-style-asian="normal" style:font-style-complex="normal"/>
    </style:style>
    <style:style style:name="T198" style:family="text">
      <style:text-properties fo:font-style="normal" officeooo:rsid="02acf586" style:font-style-asian="normal" style:font-style-complex="normal"/>
    </style:style>
    <style:style style:name="T199" style:family="text">
      <style:text-properties fo:font-style="normal" officeooo:rsid="02c4e25e" style:font-style-asian="normal" style:font-style-complex="normal"/>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bold" officeooo:rsid="017a2d63" style:font-style-asian="normal" style:font-weight-asian="bold" style:font-style-complex="normal" style:font-weight-complex="bold"/>
    </style:style>
    <style:style style:name="T202" style:family="text">
      <style:text-properties fo:font-style="normal" style:text-underline-style="solid" style:text-underline-width="auto" style:text-underline-color="font-color" officeooo:rsid="026f2051" style:font-style-asian="normal" style:font-style-complex="normal"/>
    </style:style>
    <style:style style:name="T203" style:family="text">
      <style:text-properties officeooo:rsid="00d99cf1"/>
    </style:style>
    <style:style style:name="T204" style:family="text">
      <style:text-properties officeooo:rsid="011baca8"/>
    </style:style>
    <style:style style:name="T205" style:family="text">
      <style:text-properties officeooo:rsid="0092490b"/>
    </style:style>
    <style:style style:name="T206" style:family="text">
      <style:text-properties officeooo:rsid="00f68ab2"/>
    </style:style>
    <style:style style:name="T207" style:family="text">
      <style:text-properties officeooo:rsid="0073ae6e"/>
    </style:style>
    <style:style style:name="T208" style:family="text">
      <style:text-properties officeooo:rsid="00db25a7"/>
    </style:style>
    <style:style style:name="T209" style:family="text">
      <style:text-properties officeooo:rsid="00dc3ba1"/>
    </style:style>
    <style:style style:name="T210" style:family="text">
      <style:text-properties officeooo:rsid="00f73932"/>
    </style:style>
    <style:style style:name="T211" style:family="text">
      <style:text-properties officeooo:rsid="0074bab0"/>
    </style:style>
    <style:style style:name="T212" style:family="text">
      <style:text-properties officeooo:rsid="0074f547"/>
    </style:style>
    <style:style style:name="T213" style:family="text">
      <style:text-properties fo:color="#000000" loext:opacity="100%" fo:font-style="normal" fo:background-color="#ffffff" loext:char-shading-value="0" style:font-style-asian="normal" style:font-style-complex="normal"/>
    </style:style>
    <style:style style:name="T214" style:family="text">
      <style:text-properties fo:color="#000000" loext:opacity="100%" fo:font-style="normal" officeooo:rsid="024be79a" fo:background-color="#ffffff" loext:char-shading-value="0" style:font-style-asian="normal" style:font-style-complex="normal"/>
    </style:style>
    <style:style style:name="T215" style:family="text">
      <style:text-properties fo:color="#000000" loext:opacity="100%" fo:background-color="#ffffff" loext:char-shading-value="0"/>
    </style:style>
    <style:style style:name="T216" style:family="text">
      <style:text-properties fo:color="#000000" loext:opacity="100%" officeooo:rsid="00f27947" fo:background-color="#ffffff" loext:char-shading-value="0"/>
    </style:style>
    <style:style style:name="T217" style:family="text">
      <style:text-properties fo:color="#000000" loext:opacity="100%" officeooo:rsid="00f2cb07" fo:background-color="#ffffff" loext:char-shading-value="0"/>
    </style:style>
    <style:style style:name="T218" style:family="text">
      <style:text-properties fo:color="#000000" loext:opacity="100%" officeooo:rsid="0170168f" fo:background-color="#ffffff" loext:char-shading-value="0"/>
    </style:style>
    <style:style style:name="T219" style:family="text">
      <style:text-properties fo:color="#000000" loext:opacity="100%" officeooo:rsid="01838ff0" fo:background-color="#ffffff" loext:char-shading-value="0"/>
    </style:style>
    <style:style style:name="T220" style:family="text">
      <style:text-properties fo:color="#000000" loext:opacity="100%" officeooo:rsid="0210b493" fo:background-color="#ffffff" loext:char-shading-value="0"/>
    </style:style>
    <style:style style:name="T221" style:family="text">
      <style:text-properties fo:color="#000000" loext:opacity="100%" officeooo:rsid="021210e4" fo:background-color="#ffffff" loext:char-shading-value="0"/>
    </style:style>
    <style:style style:name="T222" style:family="text">
      <style:text-properties fo:color="#000000" loext:opacity="100%" officeooo:rsid="0235ffbe" fo:background-color="#ffffff" loext:char-shading-value="0"/>
    </style:style>
    <style:style style:name="T223" style:family="text">
      <style:text-properties fo:color="#000000" loext:opacity="100%" officeooo:rsid="02581eb1" fo:background-color="#ffffff" loext:char-shading-value="0"/>
    </style:style>
    <style:style style:name="T224" style:family="text">
      <style:text-properties fo:color="#000000" loext:opacity="100%" style:font-name="Arial1" fo:background-color="#ffffff" loext:char-shading-value="0"/>
    </style:style>
    <style:style style:name="T225" style:family="text">
      <style:text-properties fo:color="#000000" loext:opacity="100%" style:font-name="Arial1" officeooo:rsid="024a8ee7" fo:background-color="#ffffff" loext:char-shading-value="0"/>
    </style:style>
    <style:style style:name="T226" style:family="text">
      <style:text-properties fo:color="#000000" loext:opacity="100%" style:font-name="Arial1" fo:font-weight="bold" officeooo:rsid="016f0976" fo:background-color="#ffffff" loext:char-shading-value="0" style:font-weight-asian="bold" style:font-weight-complex="bold"/>
    </style:style>
    <style:style style:name="T227" style:family="text">
      <style:text-properties fo:color="#000000" loext:opacity="100%" style:font-name="Liberation Mono" style:text-underline-style="none"/>
    </style:style>
    <style:style style:name="T228" style:family="text">
      <style:text-properties fo:color="#000000" loext:opacity="100%" style:font-name="Liberation Mono" style:text-underline-style="none" officeooo:rsid="00ba2c3f"/>
    </style:style>
    <style:style style:name="T229" style:family="text">
      <style:text-properties fo:color="#000000" loext:opacity="100%" fo:font-weight="bold" fo:background-color="#ffffff" loext:char-shading-value="0" style:font-weight-asian="bold" style:font-weight-complex="bold"/>
    </style:style>
    <style:style style:name="T230" style:family="text">
      <style:text-properties fo:color="#000000" loext:opacity="100%" fo:font-weight="bold" officeooo:rsid="023f67aa" fo:background-color="#ffffff" loext:char-shading-value="0" style:font-weight-asian="bold" style:font-weight-complex="bold"/>
    </style:style>
    <style:style style:name="T231" style:family="text">
      <style:text-properties fo:color="#000000" loext:opacity="100%" fo:font-weight="normal" officeooo:rsid="0122bc96" fo:background-color="#ffffff" loext:char-shading-value="0" style:font-weight-asian="normal" style:font-weight-complex="normal"/>
    </style:style>
    <style:style style:name="T232" style:family="text">
      <style:text-properties fo:color="#000000" loext:opacity="100%" fo:font-weight="normal" officeooo:rsid="014e16a7" fo:background-color="#ffffff" loext:char-shading-value="0" style:font-weight-asian="normal" style:font-weight-complex="normal"/>
    </style:style>
    <style:style style:name="T233" style:family="text">
      <style:text-properties fo:color="#000000" loext:opacity="100%" fo:font-weight="normal" officeooo:rsid="0171b90e" fo:background-color="#ffffff" loext:char-shading-value="0" style:font-weight-asian="normal" style:font-weight-complex="normal"/>
    </style:style>
    <style:style style:name="T234" style:family="text">
      <style:text-properties fo:color="#000000" loext:opacity="100%" fo:font-weight="normal" officeooo:rsid="023f67aa" fo:background-color="#ffffff" loext:char-shading-value="0" style:font-weight-asian="normal" style:font-weight-complex="normal"/>
    </style:style>
    <style:style style:name="T235" style:family="text">
      <style:text-properties fo:color="#000000" loext:opacity="100%" style:font-name="Liberation Sans" fo:font-size="7pt" fo:background-color="#ffffff" loext:char-shading-value="0" style:font-size-asian="7pt" style:font-size-complex="7pt"/>
    </style:style>
    <style:style style:name="T236" style:family="text">
      <style:text-properties fo:color="#000000" loext:opacity="100%" style:text-outline="false" style:text-line-through-style="none" style:text-line-through-type="none" fo:font-style="normal" fo:text-shadow="none" style:text-underline-style="none" fo:font-weight="normal" officeooo:rsid="01230c49" style:font-style-asian="normal" style:font-weight-asian="normal" style:font-style-complex="normal" style:font-weight-complex="normal" style:text-overline-style="none" style:text-overline-color="font-color"/>
    </style:style>
    <style:style style:name="T237" style:family="text">
      <style:text-properties fo:color="#000000" loext:opacity="100%" style:text-outline="false" style:text-line-through-style="none" style:text-line-through-type="none" fo:font-style="normal" fo:text-shadow="none" style:text-underline-style="none" fo:font-weight="normal" officeooo:rsid="01809b3c" fo:background-color="#ffffff" loext:char-shading-value="0" style:font-style-asian="normal" style:font-weight-asian="normal" style:font-style-complex="normal" style:font-weight-complex="normal" style:text-overline-style="none" style:text-overline-color="font-color"/>
    </style:style>
    <style:style style:name="T238" style:family="text">
      <style:text-properties fo:color="#000000" loext:opacity="100%" style:text-outline="false" style:text-line-through-style="none" style:text-line-through-type="none" fo:font-style="normal" fo:text-shadow="none" style:text-underline-style="none" fo:font-weight="normal" officeooo:rsid="02581eb1" fo:background-color="#ffffff" loext:char-shading-value="0" style:font-style-asian="normal" style:font-weight-asian="normal" style:font-style-complex="normal" style:font-weight-complex="normal" style:text-overline-style="none" style:text-overline-color="font-color"/>
    </style:style>
    <style:style style:name="T239" style:family="text">
      <style:text-properties fo:color="#000000" loext:opacity="100%" style:text-outline="false" style:text-line-through-style="none" style:text-line-through-type="none" fo:font-style="normal" fo:text-shadow="none" style:text-underline-style="none" fo:font-weight="normal" officeooo:rsid="019647ee" fo:background-color="#ffffff" loext:char-shading-value="0" style:font-style-asian="normal" style:font-weight-asian="normal" style:font-style-complex="normal" style:font-weight-complex="normal" style:text-overline-style="none" style:text-overline-color="font-color"/>
    </style:style>
    <style:style style:name="T240" style:family="text">
      <style:text-properties fo:color="#000000" loext:opacity="100%" style:text-outline="false" style:text-line-through-style="none" style:text-line-through-type="none" fo:font-style="normal" fo:text-shadow="none" style:text-underline-style="none" fo:font-weight="normal" officeooo:rsid="019d2e20" fo:background-color="#ffffff" loext:char-shading-value="0" style:font-style-asian="normal" style:font-weight-asian="normal" style:font-style-complex="normal" style:font-weight-complex="normal" style:text-overline-style="none" style:text-overline-color="font-color"/>
    </style:style>
    <style:style style:name="T241" style:family="text">
      <style:text-properties officeooo:rsid="00754498"/>
    </style:style>
    <style:style style:name="T242" style:family="text">
      <style:text-properties officeooo:rsid="0076cb6b"/>
    </style:style>
    <style:style style:name="T243" style:family="text">
      <style:text-properties style:font-name="Arial1"/>
    </style:style>
    <style:style style:name="T244" style:family="text">
      <style:text-properties style:font-name="Arial1" fo:font-size="12pt" style:font-size-asian="12pt" style:font-size-complex="12pt"/>
    </style:style>
    <style:style style:name="T245" style:family="text">
      <style:text-properties style:font-name="Arial1" fo:font-size="12pt" officeooo:rsid="00c52114" style:font-size-asian="12pt" style:font-size-complex="12pt"/>
    </style:style>
    <style:style style:name="T246" style:family="text">
      <style:text-properties style:font-name="Arial1" fo:font-size="12pt" officeooo:rsid="00ce6c1a" style:font-size-asian="12pt" style:font-size-complex="12pt"/>
    </style:style>
    <style:style style:name="T247" style:family="text">
      <style:text-properties style:font-name="Arial1" fo:font-size="12pt" officeooo:rsid="00d6056d" style:font-size-asian="12pt" style:font-size-complex="12pt"/>
    </style:style>
    <style:style style:name="T248" style:family="text">
      <style:text-properties style:font-name="Arial1" fo:font-size="12pt" officeooo:rsid="01176bfa" style:font-size-asian="12pt" style:font-size-complex="12pt"/>
    </style:style>
    <style:style style:name="T249" style:family="text">
      <style:text-properties style:font-name="Arial1" fo:font-size="12pt" officeooo:rsid="01571c7c" style:font-size-asian="12pt" style:font-size-complex="12pt"/>
    </style:style>
    <style:style style:name="T250" style:family="text">
      <style:text-properties style:font-name="Arial1" fo:font-size="12pt" officeooo:rsid="01574542" style:font-size-asian="12pt" style:font-size-complex="12pt"/>
    </style:style>
    <style:style style:name="T251" style:family="text">
      <style:text-properties style:font-name="Arial1" fo:font-size="12pt" officeooo:rsid="017a2d63" style:font-size-asian="12pt" style:font-size-complex="12pt"/>
    </style:style>
    <style:style style:name="T252" style:family="text">
      <style:text-properties style:font-name="Arial1" fo:font-size="12pt" officeooo:rsid="018ad05a" style:font-size-asian="12pt" style:font-size-complex="12pt"/>
    </style:style>
    <style:style style:name="T253" style:family="text">
      <style:text-properties style:font-name="Arial1" fo:font-size="12pt" officeooo:rsid="019fd217" style:font-size-asian="12pt" style:font-size-complex="12pt"/>
    </style:style>
    <style:style style:name="T254" style:family="text">
      <style:text-properties style:font-name="Arial1" fo:font-size="12pt" officeooo:rsid="02882585" style:font-size-asian="12pt" style:font-size-complex="12pt"/>
    </style:style>
    <style:style style:name="T255" style:family="text">
      <style:text-properties style:font-name="Arial1" fo:font-size="12pt" officeooo:rsid="02bbf500" style:font-size-asian="12pt" style:font-size-complex="12pt"/>
    </style:style>
    <style:style style:name="T256" style:family="text">
      <style:text-properties style:font-name="Arial1" fo:font-size="12pt" officeooo:rsid="02bded04" style:font-size-asian="12pt" style:font-size-complex="12pt"/>
    </style:style>
    <style:style style:name="T257" style:family="text">
      <style:text-properties style:font-name="Arial1" fo:font-size="12pt" officeooo:rsid="02c4e25e" style:font-size-asian="12pt" style:font-size-complex="12pt"/>
    </style:style>
    <style:style style:name="T258" style:family="text">
      <style:text-properties style:font-name="Arial1" fo:font-size="12pt" style:text-underline-style="solid" style:text-underline-width="auto" style:text-underline-color="font-color" style:font-size-asian="12pt" style:font-size-complex="12pt"/>
    </style:style>
    <style:style style:name="T259" style:family="text">
      <style:text-properties style:font-name="Arial1" fo:font-size="12pt" style:font-size-asian="10.5pt" style:font-size-complex="12pt"/>
    </style:style>
    <style:style style:name="T260" style:family="text">
      <style:text-properties style:font-name="Arial1" officeooo:rsid="00c60346"/>
    </style:style>
    <style:style style:name="T261" style:family="text">
      <style:text-properties style:font-name="Arial1" officeooo:rsid="00ccca20"/>
    </style:style>
    <style:style style:name="T262" style:family="text">
      <style:text-properties style:font-name="Arial1" officeooo:rsid="00ce6c1a"/>
    </style:style>
    <style:style style:name="T263" style:family="text">
      <style:text-properties style:font-name="Arial1" officeooo:rsid="0115b6a5"/>
    </style:style>
    <style:style style:name="T264" style:family="text">
      <style:text-properties style:font-name="Arial1" officeooo:rsid="01176bfa"/>
    </style:style>
    <style:style style:name="T265" style:family="text">
      <style:text-properties style:font-name="Arial1" officeooo:rsid="01de51ff"/>
    </style:style>
    <style:style style:name="T266" style:family="text">
      <style:text-properties style:font-name="Arial1" fo:font-style="normal" officeooo:rsid="0235069a" style:font-style-asian="normal" style:font-style-complex="normal"/>
    </style:style>
    <style:style style:name="T267" style:family="text">
      <style:text-properties style:font-name="Arial1" fo:font-style="normal" officeooo:rsid="014e16a7" style:font-style-asian="normal" style:font-style-complex="normal"/>
    </style:style>
    <style:style style:name="T268" style:family="text">
      <style:text-properties style:font-name="Arial1" officeooo:rsid="014e16a7"/>
    </style:style>
    <style:style style:name="T269" style:family="text">
      <style:text-properties style:font-name="Arial1" officeooo:rsid="0235069a"/>
    </style:style>
    <style:style style:name="T270" style:family="text">
      <style:text-properties style:font-name="Arial1" officeooo:rsid="01c866a9"/>
    </style:style>
    <style:style style:name="T271" style:family="text">
      <style:text-properties style:font-name="Arial1" officeooo:rsid="0173098a"/>
    </style:style>
    <style:style style:name="T272" style:family="text">
      <style:text-properties style:font-name="Arial1" officeooo:rsid="0235ffd3"/>
    </style:style>
    <style:style style:name="T273" style:family="text">
      <style:text-properties style:font-name="Arial1" officeooo:rsid="008f59c2"/>
    </style:style>
    <style:style style:name="T274" style:family="text">
      <style:text-properties style:font-name="Arial1" officeooo:rsid="025d4922"/>
    </style:style>
    <style:style style:name="T275" style:family="text">
      <style:text-properties style:font-name="Arial1" officeooo:rsid="0263b1a9"/>
    </style:style>
    <style:style style:name="T276" style:family="text">
      <style:text-properties style:font-name="Arial1" officeooo:rsid="0281eb4a"/>
    </style:style>
    <style:style style:name="T277" style:family="text">
      <style:text-properties style:font-name="Arial1" officeooo:rsid="02882585"/>
    </style:style>
    <style:style style:name="T278" style:family="text">
      <style:text-properties style:font-name="Arial1" fo:font-weight="bold" officeooo:rsid="02882585" style:font-weight-asian="bold" style:font-weight-complex="bold"/>
    </style:style>
    <style:style style:name="T279" style:family="text">
      <style:text-properties style:font-name="Arial1" fo:font-weight="bold" officeooo:rsid="02a5f3fc" style:font-weight-asian="bold" style:font-weight-complex="bold"/>
    </style:style>
    <style:style style:name="T280" style:family="text">
      <style:text-properties style:font-name="Arial1" officeooo:rsid="02893f5b"/>
    </style:style>
    <style:style style:name="T281" style:family="text">
      <style:text-properties style:font-name="Arial1" officeooo:rsid="02a5f3fc"/>
    </style:style>
    <style:style style:name="T282" style:family="text">
      <style:text-properties style:font-name="Arial1" officeooo:rsid="02b35ffb"/>
    </style:style>
    <style:style style:name="T283" style:family="text">
      <style:text-properties officeooo:rsid="00788484"/>
    </style:style>
    <style:style style:name="T284" style:family="text">
      <style:text-properties officeooo:rsid="00793c61"/>
    </style:style>
    <style:style style:name="T285" style:family="text">
      <style:text-properties officeooo:rsid="00795297"/>
    </style:style>
    <style:style style:name="T286" style:family="text">
      <style:text-properties officeooo:rsid="0079a39e"/>
    </style:style>
    <style:style style:name="T287" style:family="text">
      <style:text-properties officeooo:rsid="007b3025"/>
    </style:style>
    <style:style style:name="T288" style:family="text">
      <style:text-properties officeooo:rsid="007cbcd5"/>
    </style:style>
    <style:style style:name="T289" style:family="text">
      <style:text-properties officeooo:rsid="007e51fa"/>
    </style:style>
    <style:style style:name="T290" style:family="text">
      <style:text-properties officeooo:rsid="007fb8fb"/>
    </style:style>
    <style:style style:name="T291" style:family="text">
      <style:text-properties officeooo:rsid="007fffd6"/>
    </style:style>
    <style:style style:name="T292" style:family="text">
      <style:text-properties officeooo:rsid="008193ab"/>
    </style:style>
    <style:style style:name="T293" style:family="text">
      <style:text-properties officeooo:rsid="0086bbf9"/>
    </style:style>
    <style:style style:name="T294" style:family="text">
      <style:text-properties officeooo:rsid="0087e748"/>
    </style:style>
    <style:style style:name="T295" style:family="text">
      <style:text-properties officeooo:rsid="0088d318"/>
    </style:style>
    <style:style style:name="T296" style:family="text">
      <style:text-properties officeooo:rsid="008b6dac"/>
    </style:style>
    <style:style style:name="T297" style:family="text">
      <style:text-properties officeooo:rsid="008c80e4"/>
    </style:style>
    <style:style style:name="T298" style:family="text">
      <style:text-properties officeooo:rsid="008d0cb5"/>
    </style:style>
    <style:style style:name="T299" style:family="text">
      <style:text-properties officeooo:rsid="008dbfe1"/>
    </style:style>
    <style:style style:name="T300" style:family="text">
      <style:text-properties officeooo:rsid="008e908a"/>
    </style:style>
    <style:style style:name="T301" style:family="text">
      <style:text-properties officeooo:rsid="0090e07c"/>
    </style:style>
    <style:style style:name="T302" style:family="text">
      <style:text-properties officeooo:rsid="00917b6f"/>
    </style:style>
    <style:style style:name="T303" style:family="text">
      <style:text-properties officeooo:rsid="00952530"/>
    </style:style>
    <style:style style:name="T304" style:family="text">
      <style:text-properties officeooo:rsid="009651c8"/>
    </style:style>
    <style:style style:name="T305" style:family="text">
      <style:text-properties officeooo:rsid="00981e45"/>
    </style:style>
    <style:style style:name="T306" style:family="text">
      <style:text-properties officeooo:rsid="009867b6"/>
    </style:style>
    <style:style style:name="T307" style:family="text">
      <style:text-properties officeooo:rsid="0098f2e6"/>
    </style:style>
    <style:style style:name="T308" style:family="text">
      <style:text-properties officeooo:rsid="00993464"/>
    </style:style>
    <style:style style:name="T309" style:family="text">
      <style:text-properties officeooo:rsid="009a6480"/>
    </style:style>
    <style:style style:name="T310" style:family="text">
      <style:text-properties officeooo:rsid="009befff"/>
    </style:style>
    <style:style style:name="T311" style:family="text">
      <style:text-properties officeooo:rsid="00a23bd7"/>
    </style:style>
    <style:style style:name="T312" style:family="text">
      <style:text-properties officeooo:rsid="00a5291b"/>
    </style:style>
    <style:style style:name="T313" style:family="text">
      <style:text-properties officeooo:rsid="00a6d258"/>
    </style:style>
    <style:style style:name="T314" style:family="text">
      <style:text-properties officeooo:rsid="00a945c1"/>
    </style:style>
    <style:style style:name="T315" style:family="text">
      <style:text-properties officeooo:rsid="00a9be2a"/>
    </style:style>
    <style:style style:name="T316" style:family="text">
      <style:text-properties officeooo:rsid="00aaf28d"/>
    </style:style>
    <style:style style:name="T317" style:family="text">
      <style:text-properties officeooo:rsid="00ab84c1"/>
    </style:style>
    <style:style style:name="T318" style:family="text">
      <style:text-properties officeooo:rsid="00ad41a0"/>
    </style:style>
    <style:style style:name="T319" style:family="text">
      <style:text-properties officeooo:rsid="00af3204"/>
    </style:style>
    <style:style style:name="T320" style:family="text">
      <style:text-properties officeooo:rsid="00b13005"/>
    </style:style>
    <style:style style:name="T321" style:family="text">
      <style:text-properties officeooo:rsid="00b185a9"/>
    </style:style>
    <style:style style:name="T322" style:family="text">
      <style:text-properties officeooo:rsid="00b43067"/>
    </style:style>
    <style:style style:name="T323" style:family="text">
      <style:text-properties officeooo:rsid="00b4eabe"/>
    </style:style>
    <style:style style:name="T324" style:family="text">
      <style:text-properties officeooo:rsid="00b55992"/>
    </style:style>
    <style:style style:name="T325" style:family="text">
      <style:text-properties officeooo:rsid="00b58e56"/>
    </style:style>
    <style:style style:name="T326" style:family="text">
      <style:text-properties officeooo:rsid="00b77f06"/>
    </style:style>
    <style:style style:name="T327" style:family="text">
      <style:text-properties officeooo:rsid="00b94d9c"/>
    </style:style>
    <style:style style:name="T328" style:family="text">
      <style:text-properties officeooo:rsid="00b99665"/>
    </style:style>
    <style:style style:name="T329" style:family="text">
      <style:text-properties officeooo:rsid="00ba2c3f"/>
    </style:style>
    <style:style style:name="T330" style:family="text">
      <style:text-properties officeooo:rsid="00bb5037"/>
    </style:style>
    <style:style style:name="T331" style:family="text">
      <style:text-properties officeooo:rsid="00bd39f7"/>
    </style:style>
    <style:style style:name="T332" style:family="text">
      <style:text-properties officeooo:rsid="00bf92fb"/>
    </style:style>
    <style:style style:name="T333" style:family="text">
      <style:text-properties officeooo:rsid="00c04c37"/>
    </style:style>
    <style:style style:name="T334" style:family="text">
      <style:text-properties officeooo:rsid="00c1849a"/>
    </style:style>
    <style:style style:name="T335" style:family="text">
      <style:text-properties officeooo:rsid="00c3bf51"/>
    </style:style>
    <style:style style:name="T336" style:family="text">
      <style:text-properties officeooo:rsid="00c41ae9"/>
    </style:style>
    <style:style style:name="T337" style:family="text">
      <style:text-properties officeooo:rsid="00c586c3"/>
    </style:style>
    <style:style style:name="T338" style:family="text">
      <style:text-properties officeooo:rsid="00c60346"/>
    </style:style>
    <style:style style:name="T339" style:family="text">
      <style:text-properties officeooo:rsid="00c94374"/>
    </style:style>
    <style:style style:name="T340" style:family="text">
      <style:text-properties officeooo:rsid="00cb2274"/>
    </style:style>
    <style:style style:name="T341" style:family="text">
      <style:text-properties officeooo:rsid="00d2265d"/>
    </style:style>
    <style:style style:name="T342" style:family="text">
      <style:text-properties officeooo:rsid="00d2c54b"/>
    </style:style>
    <style:style style:name="T343" style:family="text">
      <style:text-properties officeooo:rsid="00d4a178"/>
    </style:style>
    <style:style style:name="T344" style:family="text">
      <style:text-properties officeooo:rsid="00d4a952"/>
    </style:style>
    <style:style style:name="T345" style:family="text">
      <style:text-properties officeooo:rsid="00d6056d"/>
    </style:style>
    <style:style style:name="T346" style:family="text">
      <style:text-properties officeooo:rsid="00d74253"/>
    </style:style>
    <style:style style:name="T347" style:family="text">
      <style:text-properties officeooo:rsid="00d8ddbf"/>
    </style:style>
    <style:style style:name="T348" style:family="text">
      <style:text-properties officeooo:rsid="00d8ee0e"/>
    </style:style>
    <style:style style:name="T349" style:family="text">
      <style:text-properties officeooo:rsid="00daa9c2"/>
    </style:style>
    <style:style style:name="T350" style:family="text">
      <style:text-properties officeooo:rsid="00dbc470"/>
    </style:style>
    <style:style style:name="T351" style:family="text">
      <style:text-properties officeooo:rsid="00dd2dc9"/>
    </style:style>
    <style:style style:name="T352" style:family="text">
      <style:text-properties officeooo:rsid="00de660a"/>
    </style:style>
    <style:style style:name="T353" style:family="text">
      <style:text-properties officeooo:rsid="00df735b"/>
    </style:style>
    <style:style style:name="T354" style:family="text">
      <style:text-properties officeooo:rsid="00df77cf"/>
    </style:style>
    <style:style style:name="T355" style:family="text">
      <style:text-properties officeooo:rsid="00e09b4d"/>
    </style:style>
    <style:style style:name="T356" style:family="text">
      <style:text-properties officeooo:rsid="00e1814d"/>
    </style:style>
    <style:style style:name="T357" style:family="text">
      <style:text-properties officeooo:rsid="00e2cf55"/>
    </style:style>
    <style:style style:name="T358" style:family="text">
      <style:text-properties officeooo:rsid="00e2e9ac"/>
    </style:style>
    <style:style style:name="T359" style:family="text">
      <style:text-properties officeooo:rsid="00e36c45"/>
    </style:style>
    <style:style style:name="T360" style:family="text">
      <style:text-properties officeooo:rsid="00e72c48"/>
    </style:style>
    <style:style style:name="T361" style:family="text">
      <style:text-properties officeooo:rsid="00e91e91"/>
    </style:style>
    <style:style style:name="T362" style:family="text">
      <style:text-properties officeooo:rsid="00e9f42c"/>
    </style:style>
    <style:style style:name="T363" style:family="text">
      <style:text-properties officeooo:rsid="00eb6764"/>
    </style:style>
    <style:style style:name="T364" style:family="text">
      <style:text-properties officeooo:rsid="00ebf129"/>
    </style:style>
    <style:style style:name="T365" style:family="text">
      <style:text-properties officeooo:rsid="00ed8ab8"/>
    </style:style>
    <style:style style:name="T366" style:family="text">
      <style:text-properties officeooo:rsid="00f06419"/>
    </style:style>
    <style:style style:name="T367" style:family="text">
      <style:text-properties officeooo:rsid="00f1e4d1"/>
    </style:style>
    <style:style style:name="T368" style:family="text">
      <style:text-properties officeooo:rsid="00f27947"/>
    </style:style>
    <style:style style:name="T369" style:family="text">
      <style:text-properties fo:color="#ff5454" loext:opacity="100%" fo:font-weight="bold" fo:background-color="#ffffff" loext:char-shading-value="0"/>
    </style:style>
    <style:style style:name="T370" style:family="text">
      <style:text-properties officeooo:rsid="00f2e25c"/>
    </style:style>
    <style:style style:name="T371" style:family="text">
      <style:text-properties officeooo:rsid="00f301e7"/>
    </style:style>
    <style:style style:name="T372" style:family="text">
      <style:text-properties officeooo:rsid="00f38132"/>
    </style:style>
    <style:style style:name="T373" style:family="text">
      <style:text-properties officeooo:rsid="00f48725"/>
    </style:style>
    <style:style style:name="T374" style:family="text">
      <style:text-properties officeooo:rsid="00fa351f"/>
    </style:style>
    <style:style style:name="T375" style:family="text">
      <style:text-properties officeooo:rsid="00fbb65c"/>
    </style:style>
    <style:style style:name="T376" style:family="text">
      <style:text-properties officeooo:rsid="00fd1f9f"/>
    </style:style>
    <style:style style:name="T377" style:family="text">
      <style:text-properties officeooo:rsid="00fdbfbd"/>
    </style:style>
    <style:style style:name="T378" style:family="text">
      <style:text-properties officeooo:rsid="00fe124c"/>
    </style:style>
    <style:style style:name="T379" style:family="text">
      <style:text-properties officeooo:rsid="01012faa"/>
    </style:style>
    <style:style style:name="T380" style:family="text">
      <style:text-properties officeooo:rsid="01028b9e"/>
    </style:style>
    <style:style style:name="T381" style:family="text">
      <style:text-properties officeooo:rsid="010484fc"/>
    </style:style>
    <style:style style:name="T382" style:family="text">
      <style:text-properties officeooo:rsid="01074371"/>
    </style:style>
    <style:style style:name="T383" style:family="text">
      <style:text-properties officeooo:rsid="01086c41"/>
    </style:style>
    <style:style style:name="T384" style:family="text">
      <style:text-properties officeooo:rsid="010964fd"/>
    </style:style>
    <style:style style:name="T385" style:family="text">
      <style:text-properties officeooo:rsid="010ae9f0"/>
    </style:style>
    <style:style style:name="T386" style:family="text">
      <style:text-properties officeooo:rsid="010ba017"/>
    </style:style>
    <style:style style:name="T387" style:family="text">
      <style:text-properties style:text-position="super 58%"/>
    </style:style>
    <style:style style:name="T388" style:family="text">
      <style:text-properties officeooo:rsid="010ebe58"/>
    </style:style>
    <style:style style:name="T389" style:family="text">
      <style:text-properties officeooo:rsid="010ec03e"/>
    </style:style>
    <style:style style:name="T390" style:family="text">
      <style:text-properties officeooo:rsid="01100fbc"/>
    </style:style>
    <style:style style:name="T391" style:family="text">
      <style:text-properties officeooo:rsid="011178dc"/>
    </style:style>
    <style:style style:name="T392" style:family="text">
      <style:text-properties officeooo:rsid="01127369"/>
    </style:style>
    <style:style style:name="T393" style:family="text">
      <style:text-properties officeooo:rsid="01132c0c"/>
    </style:style>
    <style:style style:name="T394" style:family="text">
      <style:text-properties officeooo:rsid="01147c51"/>
    </style:style>
    <style:style style:name="T395" style:family="text">
      <style:text-properties officeooo:rsid="011518da"/>
    </style:style>
    <style:style style:name="T396" style:family="text">
      <style:text-properties officeooo:rsid="01154e96"/>
    </style:style>
    <style:style style:name="T397" style:family="text">
      <style:text-properties officeooo:rsid="0115b6a5"/>
    </style:style>
    <style:style style:name="T398" style:family="text">
      <style:text-properties officeooo:rsid="011a9437"/>
    </style:style>
    <style:style style:name="T399" style:family="text">
      <style:text-properties officeooo:rsid="011aac0f"/>
    </style:style>
    <style:style style:name="T400" style:family="text">
      <style:text-properties officeooo:rsid="011e66f7"/>
    </style:style>
    <style:style style:name="T401" style:family="text">
      <style:text-properties officeooo:rsid="011fb655"/>
    </style:style>
    <style:style style:name="T402" style:family="text">
      <style:text-properties officeooo:rsid="0122bc96"/>
    </style:style>
    <style:style style:name="T403" style:family="text">
      <style:text-properties officeooo:rsid="01230c49"/>
    </style:style>
    <style:style style:name="T404" style:family="text">
      <style:text-properties officeooo:rsid="0123c418"/>
    </style:style>
    <style:style style:name="T405" style:family="text">
      <style:text-properties officeooo:rsid="0124cc27"/>
    </style:style>
    <style:style style:name="T406" style:family="text">
      <style:text-properties officeooo:rsid="01257e2a"/>
    </style:style>
    <style:style style:name="T407" style:family="text">
      <style:text-properties officeooo:rsid="0125be6e"/>
    </style:style>
    <style:style style:name="T408" style:family="text">
      <style:text-properties officeooo:rsid="012743df"/>
    </style:style>
    <style:style style:name="T409" style:family="text">
      <style:text-properties officeooo:rsid="012894fd"/>
    </style:style>
    <style:style style:name="T410" style:family="text">
      <style:text-properties officeooo:rsid="012a47b3"/>
    </style:style>
    <style:style style:name="T411" style:family="text">
      <style:text-properties officeooo:rsid="012b03a1"/>
    </style:style>
    <style:style style:name="T412" style:family="text">
      <style:text-properties officeooo:rsid="012c8ab3"/>
    </style:style>
    <style:style style:name="T413" style:family="text">
      <style:text-properties officeooo:rsid="012d6568"/>
    </style:style>
    <style:style style:name="T414" style:family="text">
      <style:text-properties officeooo:rsid="012d827c"/>
    </style:style>
    <style:style style:name="T415" style:family="text">
      <style:text-properties officeooo:rsid="012f30ac"/>
    </style:style>
    <style:style style:name="T416" style:family="text">
      <style:text-properties officeooo:rsid="012f3225"/>
    </style:style>
    <style:style style:name="T417" style:family="text">
      <style:text-properties officeooo:rsid="0131b1e4"/>
    </style:style>
    <style:style style:name="T418" style:family="text">
      <style:text-properties officeooo:rsid="01330635"/>
    </style:style>
    <style:style style:name="T419" style:family="text">
      <style:text-properties officeooo:rsid="01347634"/>
    </style:style>
    <style:style style:name="T420" style:family="text">
      <style:text-properties officeooo:rsid="01353978"/>
    </style:style>
    <style:style style:name="T421" style:family="text">
      <style:text-properties officeooo:rsid="01356ae1"/>
    </style:style>
    <style:style style:name="T422" style:family="text">
      <style:text-properties officeooo:rsid="01366ff7"/>
    </style:style>
    <style:style style:name="T423" style:family="text">
      <style:text-properties officeooo:rsid="0136d6af"/>
    </style:style>
    <style:style style:name="T424" style:family="text">
      <style:text-properties officeooo:rsid="01384537"/>
    </style:style>
    <style:style style:name="T425" style:family="text">
      <style:text-properties officeooo:rsid="013946b2"/>
    </style:style>
    <style:style style:name="T426" style:family="text">
      <style:text-properties officeooo:rsid="013b130e"/>
    </style:style>
    <style:style style:name="T427" style:family="text">
      <style:text-properties officeooo:rsid="013c1462"/>
    </style:style>
    <style:style style:name="T428" style:family="text">
      <style:text-properties officeooo:rsid="013c5ca8"/>
    </style:style>
    <style:style style:name="T429" style:family="text">
      <style:text-properties officeooo:rsid="013e97e9"/>
    </style:style>
    <style:style style:name="T430" style:family="text">
      <style:text-properties officeooo:rsid="0140361b"/>
    </style:style>
    <style:style style:name="T431" style:family="text">
      <style:text-properties officeooo:rsid="0082a824"/>
    </style:style>
    <style:style style:name="T432" style:family="text">
      <style:text-properties officeooo:rsid="004b7ac4"/>
    </style:style>
    <style:style style:name="T433" style:family="text">
      <style:text-properties officeooo:rsid="00e2db30"/>
    </style:style>
    <style:style style:name="T434" style:family="text">
      <style:text-properties officeooo:rsid="0144c9b1"/>
    </style:style>
    <style:style style:name="T435" style:family="text">
      <style:text-properties officeooo:rsid="0147a710"/>
    </style:style>
    <style:style style:name="T436" style:family="text">
      <style:text-properties officeooo:rsid="014a1c05"/>
    </style:style>
    <style:style style:name="T437" style:family="text">
      <style:text-properties officeooo:rsid="014c1c50"/>
    </style:style>
    <style:style style:name="T438" style:family="text">
      <style:text-properties officeooo:rsid="014e16a7"/>
    </style:style>
    <style:style style:name="T439" style:family="text">
      <style:text-properties officeooo:rsid="014f21fd"/>
    </style:style>
    <style:style style:name="T440" style:family="text">
      <style:text-properties officeooo:rsid="0150212e"/>
    </style:style>
    <style:style style:name="T441" style:family="text">
      <style:text-properties officeooo:rsid="01518850"/>
    </style:style>
    <style:style style:name="T442" style:family="text">
      <style:text-properties officeooo:rsid="01528868"/>
    </style:style>
    <style:style style:name="T443" style:family="text">
      <style:text-properties officeooo:rsid="0152f99c"/>
    </style:style>
    <style:style style:name="T444" style:family="text">
      <style:text-properties officeooo:rsid="0154b916"/>
    </style:style>
    <style:style style:name="T445" style:family="text">
      <style:text-properties officeooo:rsid="015589ea"/>
    </style:style>
    <style:style style:name="T446" style:family="text">
      <style:text-properties officeooo:rsid="0155cd72"/>
    </style:style>
    <style:style style:name="T447" style:family="text">
      <style:text-properties officeooo:rsid="01571c7c"/>
    </style:style>
    <style:style style:name="T448" style:family="text">
      <style:text-properties officeooo:rsid="01574542"/>
    </style:style>
    <style:style style:name="T449" style:family="text">
      <style:text-properties officeooo:rsid="01587fd1"/>
    </style:style>
    <style:style style:name="T450" style:family="text">
      <style:text-properties officeooo:rsid="0159b322"/>
    </style:style>
    <style:style style:name="T451" style:family="text">
      <style:text-properties officeooo:rsid="015a55a8"/>
    </style:style>
    <style:style style:name="T452" style:family="text">
      <style:text-properties style:text-underline-style="none"/>
    </style:style>
    <style:style style:name="T453" style:family="text">
      <style:text-properties style:text-underline-style="none" officeooo:rsid="0035d2f2"/>
    </style:style>
    <style:style style:name="T454" style:family="text">
      <style:text-properties style:text-underline-style="none" officeooo:rsid="0125be6e"/>
    </style:style>
    <style:style style:name="T455" style:family="text">
      <style:text-properties officeooo:rsid="015b160f"/>
    </style:style>
    <style:style style:name="T456" style:family="text">
      <style:text-properties officeooo:rsid="015c580a"/>
    </style:style>
    <style:style style:name="T457" style:family="text">
      <style:text-properties officeooo:rsid="015d2012"/>
    </style:style>
    <style:style style:name="T458" style:family="text">
      <style:text-properties officeooo:rsid="015eaf5f"/>
    </style:style>
    <style:style style:name="T459" style:family="text">
      <style:text-properties officeooo:rsid="01601121"/>
    </style:style>
    <style:style style:name="T460" style:family="text">
      <style:text-properties officeooo:rsid="0160301c"/>
    </style:style>
    <style:style style:name="T461" style:family="text">
      <style:text-properties officeooo:rsid="0160b24f"/>
    </style:style>
    <style:style style:name="T462" style:family="text">
      <style:text-properties officeooo:rsid="0161e2ab"/>
    </style:style>
    <style:style style:name="T463" style:family="text">
      <style:text-properties officeooo:rsid="0162607a"/>
    </style:style>
    <style:style style:name="T464" style:family="text">
      <style:text-properties officeooo:rsid="0163624e"/>
    </style:style>
    <style:style style:name="T465" style:family="text">
      <style:text-properties officeooo:rsid="0167c4a5"/>
    </style:style>
    <style:style style:name="T466" style:family="text">
      <style:text-properties officeooo:rsid="01692453"/>
    </style:style>
    <style:style style:name="T467" style:family="text">
      <style:text-properties officeooo:rsid="016a7291"/>
    </style:style>
    <style:style style:name="T468" style:family="text">
      <style:text-properties officeooo:rsid="016bd41e"/>
    </style:style>
    <style:style style:name="T469" style:family="text">
      <style:text-properties officeooo:rsid="016be5bf"/>
    </style:style>
    <style:style style:name="T470" style:family="text">
      <style:text-properties officeooo:rsid="016c8ab2"/>
    </style:style>
    <style:style style:name="T471" style:family="text">
      <style:text-properties officeooo:rsid="016db416"/>
    </style:style>
    <style:style style:name="T472" style:family="text">
      <style:text-properties officeooo:rsid="016f0976"/>
    </style:style>
    <style:style style:name="T473" style:family="text">
      <style:text-properties fo:color="#0000ff" loext:opacity="100%"/>
    </style:style>
    <style:style style:name="T474" style:family="text">
      <style:text-properties officeooo:rsid="016f8d83"/>
    </style:style>
    <style:style style:name="T475" style:family="text">
      <style:text-properties officeooo:rsid="0171b90e"/>
    </style:style>
    <style:style style:name="T476" style:family="text">
      <style:text-properties officeooo:rsid="0173098a"/>
    </style:style>
    <style:style style:name="T477" style:family="text">
      <style:text-properties officeooo:rsid="0174a334"/>
    </style:style>
    <style:style style:name="T478" style:family="text">
      <style:text-properties officeooo:rsid="0177cdba"/>
    </style:style>
    <style:style style:name="T479" style:family="text">
      <style:text-properties officeooo:rsid="017a2d63"/>
    </style:style>
    <style:style style:name="T480" style:family="text">
      <style:text-properties officeooo:rsid="017b3d2f"/>
    </style:style>
    <style:style style:name="T481" style:family="text">
      <style:text-properties officeooo:rsid="017d3ff5"/>
    </style:style>
    <style:style style:name="T482" style:family="text">
      <style:text-properties officeooo:rsid="017efd5f"/>
    </style:style>
    <style:style style:name="T483" style:family="text">
      <style:text-properties officeooo:rsid="01804ff3"/>
    </style:style>
    <style:style style:name="T484" style:family="text">
      <style:text-properties officeooo:rsid="01809b3c"/>
    </style:style>
    <style:style style:name="T485" style:family="text">
      <style:text-properties officeooo:rsid="01821a74"/>
    </style:style>
    <style:style style:name="T486" style:family="text">
      <style:text-properties officeooo:rsid="0185afef"/>
    </style:style>
    <style:style style:name="T487" style:family="text">
      <style:text-properties officeooo:rsid="0185d219"/>
    </style:style>
    <style:style style:name="T488" style:family="text">
      <style:text-properties officeooo:rsid="018a07c7"/>
    </style:style>
    <style:style style:name="T489" style:family="text">
      <style:text-properties officeooo:rsid="018ad05a"/>
    </style:style>
    <style:style style:name="T490" style:family="text">
      <style:text-properties officeooo:rsid="018af4c2"/>
    </style:style>
    <style:style style:name="T491" style:family="text">
      <style:text-properties officeooo:rsid="002743e2"/>
    </style:style>
    <style:style style:name="T492" style:family="text">
      <style:text-properties officeooo:rsid="0062389a"/>
    </style:style>
    <style:style style:name="T493" style:family="text">
      <style:text-properties officeooo:rsid="018dd386"/>
    </style:style>
    <style:style style:name="T494" style:family="text">
      <style:text-properties officeooo:rsid="018e2224"/>
    </style:style>
    <style:style style:name="T495" style:family="text">
      <style:text-properties officeooo:rsid="018faa89"/>
    </style:style>
    <style:style style:name="T496" style:family="text">
      <style:text-properties officeooo:rsid="0191c5c5"/>
    </style:style>
    <style:style style:name="T497" style:family="text">
      <style:text-properties officeooo:rsid="0191e7a4"/>
    </style:style>
    <style:style style:name="T498" style:family="text">
      <style:text-properties officeooo:rsid="01938924"/>
    </style:style>
    <style:style style:name="T499" style:family="text">
      <style:text-properties officeooo:rsid="01939b43"/>
    </style:style>
    <style:style style:name="T500" style:family="text">
      <style:text-properties officeooo:rsid="0193fe58"/>
    </style:style>
    <style:style style:name="T501" style:family="text">
      <style:text-properties officeooo:rsid="0194c3db"/>
    </style:style>
    <style:style style:name="T502" style:family="text">
      <style:text-properties officeooo:rsid="019647ee"/>
    </style:style>
    <style:style style:name="T503" style:family="text">
      <style:text-properties officeooo:rsid="0196d72a"/>
    </style:style>
    <style:style style:name="T504" style:family="text">
      <style:text-properties officeooo:rsid="0198da60"/>
    </style:style>
    <style:style style:name="T505" style:family="text">
      <style:text-properties officeooo:rsid="019c117c"/>
    </style:style>
    <style:style style:name="T506" style:family="text">
      <style:text-properties officeooo:rsid="019d2e20"/>
    </style:style>
    <style:style style:name="T507" style:family="text">
      <style:text-properties officeooo:rsid="019e426e"/>
    </style:style>
    <style:style style:name="T508" style:family="text">
      <style:text-properties officeooo:rsid="019e6f4d"/>
    </style:style>
    <style:style style:name="T509" style:family="text">
      <style:text-properties officeooo:rsid="019fd217"/>
    </style:style>
    <style:style style:name="T510" style:family="text">
      <style:text-properties officeooo:rsid="019fd78e"/>
    </style:style>
    <style:style style:name="T511" style:family="text">
      <style:text-properties officeooo:rsid="01a03e8a"/>
    </style:style>
    <style:style style:name="T512" style:family="text">
      <style:text-properties officeooo:rsid="01a124a9"/>
    </style:style>
    <style:style style:name="T513" style:family="text">
      <style:text-properties officeooo:rsid="01a3783a"/>
    </style:style>
    <style:style style:name="T514" style:family="text">
      <style:text-properties officeooo:rsid="01a5377e"/>
    </style:style>
    <style:style style:name="T515" style:family="text">
      <style:text-properties officeooo:rsid="01a5fafe"/>
    </style:style>
    <style:style style:name="T516" style:family="text">
      <style:text-properties officeooo:rsid="01a76578"/>
    </style:style>
    <style:style style:name="T517" style:family="text">
      <style:text-properties officeooo:rsid="01a8a6bf"/>
    </style:style>
    <style:style style:name="T518" style:family="text">
      <style:text-properties officeooo:rsid="01a9d3f3"/>
    </style:style>
    <style:style style:name="T519" style:family="text">
      <style:text-properties officeooo:rsid="01a9d45f"/>
    </style:style>
    <style:style style:name="T520" style:family="text">
      <style:text-properties officeooo:rsid="01aae81d"/>
    </style:style>
    <style:style style:name="T521" style:family="text">
      <style:text-properties officeooo:rsid="01ab787c"/>
    </style:style>
    <style:style style:name="T522" style:family="text">
      <style:text-properties officeooo:rsid="01ad6aae"/>
    </style:style>
    <style:style style:name="T523" style:family="text">
      <style:text-properties officeooo:rsid="01aef592"/>
    </style:style>
    <style:style style:name="T524" style:family="text">
      <style:text-properties officeooo:rsid="01aeffd7"/>
    </style:style>
    <style:style style:name="T525" style:family="text">
      <style:text-properties officeooo:rsid="01b0e11a"/>
    </style:style>
    <style:style style:name="T526" style:family="text">
      <style:text-properties officeooo:rsid="01b2c87e"/>
    </style:style>
    <style:style style:name="T527" style:family="text">
      <style:text-properties officeooo:rsid="01b4c67e"/>
    </style:style>
    <style:style style:name="T528" style:family="text">
      <style:text-properties officeooo:rsid="01b6dc80"/>
    </style:style>
    <style:style style:name="T529" style:family="text">
      <style:text-properties officeooo:rsid="01b73d37"/>
    </style:style>
    <style:style style:name="T530" style:family="text">
      <style:text-properties officeooo:rsid="01b7ac2f"/>
    </style:style>
    <style:style style:name="T531" style:family="text">
      <style:text-properties officeooo:rsid="01b99cce"/>
    </style:style>
    <style:style style:name="T532" style:family="text">
      <style:text-properties officeooo:rsid="01bd7ee4"/>
    </style:style>
    <style:style style:name="T533" style:family="text">
      <style:text-properties officeooo:rsid="01bd807f"/>
    </style:style>
    <style:style style:name="T534" style:family="text">
      <style:text-properties officeooo:rsid="01be2f5f"/>
    </style:style>
    <style:style style:name="T535" style:family="text">
      <style:text-properties officeooo:rsid="01bef21c"/>
    </style:style>
    <style:style style:name="T536" style:family="text">
      <style:text-properties officeooo:rsid="01bfaf65"/>
    </style:style>
    <style:style style:name="T537" style:family="text">
      <style:text-properties officeooo:rsid="01c0a3eb"/>
    </style:style>
    <style:style style:name="T538" style:family="text">
      <style:text-properties officeooo:rsid="01c1d233"/>
    </style:style>
    <style:style style:name="T539" style:family="text">
      <style:text-properties officeooo:rsid="01c2ff30"/>
    </style:style>
    <style:style style:name="T540" style:family="text">
      <style:text-properties officeooo:rsid="01c42ac8"/>
    </style:style>
    <style:style style:name="T541" style:family="text">
      <style:text-properties officeooo:rsid="01c5555e"/>
    </style:style>
    <style:style style:name="T542" style:family="text">
      <style:text-properties officeooo:rsid="01c70268"/>
    </style:style>
    <style:style style:name="T543" style:family="text">
      <style:text-properties officeooo:rsid="01c866a9"/>
    </style:style>
    <style:style style:name="T544" style:family="text">
      <style:text-properties officeooo:rsid="01cb60e9"/>
    </style:style>
    <style:style style:name="T545" style:family="text">
      <style:text-properties officeooo:rsid="01cc2998"/>
    </style:style>
    <style:style style:name="T546" style:family="text">
      <style:text-properties officeooo:rsid="01cc98aa"/>
    </style:style>
    <style:style style:name="T547" style:family="text">
      <style:text-properties officeooo:rsid="01ce7858"/>
    </style:style>
    <style:style style:name="T548" style:family="text">
      <style:text-properties officeooo:rsid="01cebefd"/>
    </style:style>
    <style:style style:name="T549" style:family="text">
      <style:text-properties officeooo:rsid="01d096bd"/>
    </style:style>
    <style:style style:name="T550" style:family="text">
      <style:text-properties officeooo:rsid="01d4d6a5"/>
    </style:style>
    <style:style style:name="T551" style:family="text">
      <style:text-properties officeooo:rsid="01d7e0e1"/>
    </style:style>
    <style:style style:name="T552" style:family="text">
      <style:text-properties officeooo:rsid="01db06e6"/>
    </style:style>
    <style:style style:name="T553" style:family="text">
      <style:text-properties officeooo:rsid="01dc851b"/>
    </style:style>
    <style:style style:name="T554" style:family="text">
      <style:text-properties style:font-name="Liberation Sans"/>
    </style:style>
    <style:style style:name="T555" style:family="text">
      <style:text-properties style:font-name="Liberation Sans" fo:font-style="italic" officeooo:rsid="01ab787c" style:font-style-asian="italic" style:font-style-complex="italic"/>
    </style:style>
    <style:style style:name="T556" style:family="text">
      <style:text-properties style:font-name="Liberation Sans" fo:font-style="normal" officeooo:rsid="01ab787c" style:font-style-asian="normal" style:font-style-complex="normal"/>
    </style:style>
    <style:style style:name="T557" style:family="text">
      <style:text-properties style:font-name="Liberation Sans" fo:font-size="7pt" style:font-size-asian="7pt" style:font-size-complex="7pt"/>
    </style:style>
    <style:style style:name="T558" style:family="text">
      <style:text-properties officeooo:rsid="01dcae51"/>
    </style:style>
    <style:style style:name="T559" style:family="text">
      <style:text-properties fo:font-size="10.5pt" style:font-size-asian="10.5pt" style:font-size-complex="10.5pt"/>
    </style:style>
    <style:style style:name="T560" style:family="text">
      <style:text-properties officeooo:rsid="01dd3fd4"/>
    </style:style>
    <style:style style:name="T561" style:family="text">
      <style:text-properties officeooo:rsid="01de51ff"/>
    </style:style>
    <style:style style:name="T562" style:family="text">
      <style:text-properties officeooo:rsid="01dfc75d"/>
    </style:style>
    <style:style style:name="T563" style:family="text">
      <style:text-properties officeooo:rsid="01e29f1f"/>
    </style:style>
    <style:style style:name="T564" style:family="text">
      <style:text-properties officeooo:rsid="01e5279f"/>
    </style:style>
    <style:style style:name="T565" style:family="text">
      <style:text-properties officeooo:rsid="01e52bb3"/>
    </style:style>
    <style:style style:name="T566" style:family="text">
      <style:text-properties officeooo:rsid="01e5e5b1"/>
    </style:style>
    <style:style style:name="T567" style:family="text">
      <style:text-properties officeooo:rsid="01e72eda"/>
    </style:style>
    <style:style style:name="T568" style:family="text">
      <style:text-properties officeooo:rsid="01e78945"/>
    </style:style>
    <style:style style:name="T569" style:family="text">
      <style:text-properties officeooo:rsid="01e8b619"/>
    </style:style>
    <style:style style:name="T570" style:family="text">
      <style:text-properties officeooo:rsid="01ea8baf"/>
    </style:style>
    <style:style style:name="T571" style:family="text">
      <style:text-properties officeooo:rsid="01ec689e"/>
    </style:style>
    <style:style style:name="T572" style:family="text">
      <style:text-properties officeooo:rsid="01ee138b"/>
    </style:style>
    <style:style style:name="T573" style:family="text">
      <style:text-properties officeooo:rsid="01f0e360"/>
    </style:style>
    <style:style style:name="T574" style:family="text">
      <style:text-properties officeooo:rsid="01f1d0a2"/>
    </style:style>
    <style:style style:name="T575" style:family="text">
      <style:text-properties officeooo:rsid="01f4eac9"/>
    </style:style>
    <style:style style:name="T576" style:family="text">
      <style:text-properties officeooo:rsid="01f6154c"/>
    </style:style>
    <style:style style:name="T577" style:family="text">
      <style:text-properties officeooo:rsid="01f6ff85"/>
    </style:style>
    <style:style style:name="T578" style:family="text">
      <style:text-properties officeooo:rsid="01fd0fd2"/>
    </style:style>
    <style:style style:name="T579" style:family="text">
      <style:text-properties officeooo:rsid="020048cc"/>
    </style:style>
    <style:style style:name="T580" style:family="text">
      <style:text-properties officeooo:rsid="0202f27d"/>
    </style:style>
    <style:style style:name="T581" style:family="text">
      <style:text-properties officeooo:rsid="02053e65"/>
    </style:style>
    <style:style style:name="T582" style:family="text">
      <style:text-properties officeooo:rsid="0205ce9f"/>
    </style:style>
    <style:style style:name="T583" style:family="text">
      <style:text-properties officeooo:rsid="02070ed5"/>
    </style:style>
    <style:style style:name="T584" style:family="text">
      <style:text-properties officeooo:rsid="0208ff7d"/>
    </style:style>
    <style:style style:name="T585" style:family="text">
      <style:text-properties officeooo:rsid="0209b73a"/>
    </style:style>
    <style:style style:name="T586" style:family="text">
      <style:text-properties officeooo:rsid="0209fa3c"/>
    </style:style>
    <style:style style:name="T587" style:family="text">
      <style:text-properties officeooo:rsid="020b690a"/>
    </style:style>
    <style:style style:name="T588" style:family="text">
      <style:text-properties officeooo:rsid="020b6ce7"/>
    </style:style>
    <style:style style:name="T589" style:family="text">
      <style:text-properties officeooo:rsid="020d2e14"/>
    </style:style>
    <style:style style:name="T590" style:family="text">
      <style:text-properties officeooo:rsid="020ea963"/>
    </style:style>
    <style:style style:name="T591" style:family="text">
      <style:text-properties officeooo:rsid="021210e4"/>
    </style:style>
    <style:style style:name="T592" style:family="text">
      <style:text-properties officeooo:rsid="02131dc7"/>
    </style:style>
    <style:style style:name="T593" style:family="text">
      <style:text-properties officeooo:rsid="0213c8a3"/>
    </style:style>
    <style:style style:name="T594" style:family="text">
      <style:text-properties officeooo:rsid="0214eced"/>
    </style:style>
    <style:style style:name="T595" style:family="text">
      <style:text-properties officeooo:rsid="0216a57e"/>
    </style:style>
    <style:style style:name="T596" style:family="text">
      <style:text-properties officeooo:rsid="02186e3b"/>
    </style:style>
    <style:style style:name="T597" style:family="text">
      <style:text-properties officeooo:rsid="021983da"/>
    </style:style>
    <style:style style:name="T598" style:family="text">
      <style:text-properties officeooo:rsid="021b422f"/>
    </style:style>
    <style:style style:name="T599" style:family="text">
      <style:text-properties officeooo:rsid="021ed038"/>
    </style:style>
    <style:style style:name="T600" style:family="text">
      <style:text-properties officeooo:rsid="022091ab"/>
    </style:style>
    <style:style style:name="T601" style:family="text">
      <style:text-properties officeooo:rsid="0221558b"/>
    </style:style>
    <style:style style:name="T602" style:family="text">
      <style:text-properties officeooo:rsid="022325cc"/>
    </style:style>
    <style:style style:name="T603" style:family="text">
      <style:text-properties officeooo:rsid="022471b8"/>
    </style:style>
    <style:style style:name="T604" style:family="text">
      <style:text-properties officeooo:rsid="022509d1"/>
    </style:style>
    <style:style style:name="T605" style:family="text">
      <style:text-properties officeooo:rsid="0225b2ed"/>
    </style:style>
    <style:style style:name="T606" style:family="text">
      <style:text-properties officeooo:rsid="022715fd"/>
    </style:style>
    <style:style style:name="T607" style:family="text">
      <style:text-properties officeooo:rsid="02290621"/>
    </style:style>
    <style:style style:name="T608" style:family="text">
      <style:text-properties officeooo:rsid="022a1851"/>
    </style:style>
    <style:style style:name="T609" style:family="text">
      <style:text-properties officeooo:rsid="022a4ff1"/>
    </style:style>
    <style:style style:name="T610" style:family="text">
      <style:text-properties officeooo:rsid="022afb76"/>
    </style:style>
    <style:style style:name="T611" style:family="text">
      <style:text-properties officeooo:rsid="022cb552"/>
    </style:style>
    <style:style style:name="T612" style:family="text">
      <style:text-properties officeooo:rsid="022e9a76"/>
    </style:style>
    <style:style style:name="T613" style:family="text">
      <style:text-properties officeooo:rsid="022f54de"/>
    </style:style>
    <style:style style:name="T614" style:family="text">
      <style:text-properties officeooo:rsid="023038ab"/>
    </style:style>
    <style:style style:name="T615" style:family="text">
      <style:text-properties officeooo:rsid="0231f929"/>
    </style:style>
    <style:style style:name="T616" style:family="text">
      <style:text-properties officeooo:rsid="0233ccbf"/>
    </style:style>
    <style:style style:name="T617" style:family="text">
      <style:text-properties officeooo:rsid="0234a727"/>
    </style:style>
    <style:style style:name="T618" style:family="text">
      <style:text-properties officeooo:rsid="0235069a"/>
    </style:style>
    <style:style style:name="T619" style:family="text">
      <style:text-properties officeooo:rsid="0235ffbe"/>
    </style:style>
    <style:style style:name="T620" style:family="text">
      <style:text-properties officeooo:rsid="0236c687"/>
    </style:style>
    <style:style style:name="T621" style:family="text">
      <style:text-properties officeooo:rsid="023754ab"/>
    </style:style>
    <style:style style:name="T622" style:family="text">
      <style:text-properties officeooo:rsid="02376fba"/>
    </style:style>
    <style:style style:name="T623" style:family="text">
      <style:text-properties officeooo:rsid="0238e4af"/>
    </style:style>
    <style:style style:name="T624" style:family="text">
      <style:text-properties officeooo:rsid="023d7446"/>
    </style:style>
    <style:style style:name="T625" style:family="text">
      <style:text-properties officeooo:rsid="023f5e3b"/>
    </style:style>
    <style:style style:name="T626" style:family="text">
      <style:text-properties officeooo:rsid="023f67aa"/>
    </style:style>
    <style:style style:name="T627" style:family="text">
      <style:text-properties officeooo:rsid="012ff265"/>
    </style:style>
    <style:style style:name="T628" style:family="text">
      <style:text-properties officeooo:rsid="02443128"/>
    </style:style>
    <style:style style:name="T629" style:family="text">
      <style:text-properties officeooo:rsid="02461945"/>
    </style:style>
    <style:style style:name="T630" style:family="text">
      <style:text-properties officeooo:rsid="0246cbe8"/>
    </style:style>
    <style:style style:name="T631" style:family="text">
      <style:text-properties officeooo:rsid="02476d03"/>
    </style:style>
    <style:style style:name="T632" style:family="text">
      <style:text-properties officeooo:rsid="0248d0b9"/>
    </style:style>
    <style:style style:name="T633" style:family="text">
      <style:text-properties officeooo:rsid="024a8ee7"/>
    </style:style>
    <style:style style:name="T634" style:family="text">
      <style:text-properties officeooo:rsid="024be79a"/>
    </style:style>
    <style:style style:name="T635" style:family="text">
      <style:text-properties officeooo:rsid="0252a203"/>
    </style:style>
    <style:style style:name="T636" style:family="text">
      <style:text-properties officeooo:rsid="02536a10"/>
    </style:style>
    <style:style style:name="T637" style:family="text">
      <style:text-properties officeooo:rsid="0254df29"/>
    </style:style>
    <style:style style:name="T638" style:family="text">
      <style:text-properties officeooo:rsid="02577077"/>
    </style:style>
    <style:style style:name="T639" style:family="text">
      <style:text-properties officeooo:rsid="02581eb1"/>
    </style:style>
    <style:style style:name="T640" style:family="text">
      <style:text-properties fo:background-color="#ffffff" loext:char-shading-value="0"/>
    </style:style>
    <style:style style:name="T641" style:family="text">
      <style:text-properties officeooo:rsid="0170168f" fo:background-color="#ffffff" loext:char-shading-value="0"/>
    </style:style>
    <style:style style:name="T642" style:family="text">
      <style:text-properties officeooo:rsid="0210b493" fo:background-color="#ffffff" loext:char-shading-value="0"/>
    </style:style>
    <style:style style:name="T643" style:family="text">
      <style:text-properties officeooo:rsid="02581eb1" fo:background-color="#ffffff" loext:char-shading-value="0"/>
    </style:style>
    <style:style style:name="T644" style:family="text">
      <style:text-properties officeooo:rsid="01c70268" fo:background-color="#ffffff" loext:char-shading-value="0"/>
    </style:style>
    <style:style style:name="T645" style:family="text">
      <style:text-properties officeooo:rsid="0144c9b1" fo:background-color="#ffffff" loext:char-shading-value="0"/>
    </style:style>
    <style:style style:name="T646" style:family="text">
      <style:text-properties officeooo:rsid="0148b320" fo:background-color="#ffffff" loext:char-shading-value="0"/>
    </style:style>
    <style:style style:name="T647" style:family="text">
      <style:text-properties officeooo:rsid="02590cf3"/>
    </style:style>
    <style:style style:name="T648" style:family="text">
      <style:text-properties officeooo:rsid="02599abf"/>
    </style:style>
    <style:style style:name="T649" style:family="text">
      <style:text-properties officeooo:rsid="025b9c94"/>
    </style:style>
    <style:style style:name="T650" style:family="text">
      <style:text-properties officeooo:rsid="025d4922"/>
    </style:style>
    <style:style style:name="T651" style:family="text">
      <style:text-properties officeooo:rsid="025f2bfb"/>
    </style:style>
    <style:style style:name="T652" style:family="text">
      <style:text-properties officeooo:rsid="02603cff"/>
    </style:style>
    <style:style style:name="T653" style:family="text">
      <style:text-properties officeooo:rsid="02624722"/>
    </style:style>
    <style:style style:name="T654" style:family="text">
      <style:text-properties officeooo:rsid="02652783"/>
    </style:style>
    <style:style style:name="T655" style:family="text">
      <style:text-properties officeooo:rsid="0266211a"/>
    </style:style>
    <style:style style:name="T656" style:family="text">
      <style:text-properties officeooo:rsid="0267ba9d"/>
    </style:style>
    <style:style style:name="T657" style:family="text">
      <style:text-properties officeooo:rsid="02693d14"/>
    </style:style>
    <style:style style:name="T658" style:family="text">
      <style:text-properties officeooo:rsid="0269c1de"/>
    </style:style>
    <style:style style:name="T659" style:family="text">
      <style:text-properties officeooo:rsid="0269f90e"/>
    </style:style>
    <style:style style:name="T660" style:family="text">
      <style:text-properties officeooo:rsid="026d60e1"/>
    </style:style>
    <style:style style:name="T661" style:family="text">
      <style:text-properties officeooo:rsid="026f2051"/>
    </style:style>
    <style:style style:name="T662" style:family="text">
      <style:text-properties officeooo:rsid="026f985a"/>
    </style:style>
    <style:style style:name="T663" style:family="text">
      <style:text-properties officeooo:rsid="02745a3b"/>
    </style:style>
    <style:style style:name="T664" style:family="text">
      <style:text-properties officeooo:rsid="027636b3"/>
    </style:style>
    <style:style style:name="T665" style:family="text">
      <style:text-properties officeooo:rsid="0277cd3b"/>
    </style:style>
    <style:style style:name="T666" style:family="text">
      <style:text-properties officeooo:rsid="027922da"/>
    </style:style>
    <style:style style:name="T667" style:family="text">
      <style:text-properties officeooo:rsid="027ad737"/>
    </style:style>
    <style:style style:name="T668" style:family="text">
      <style:text-properties officeooo:rsid="027cf041"/>
    </style:style>
    <style:style style:name="T669" style:family="text">
      <style:text-properties officeooo:rsid="027daf51"/>
    </style:style>
    <style:style style:name="T670" style:family="text">
      <style:text-properties officeooo:rsid="027f8ba1"/>
    </style:style>
    <style:style style:name="T671" style:family="text">
      <style:text-properties officeooo:rsid="027fcd86"/>
    </style:style>
    <style:style style:name="T672" style:family="text">
      <style:text-properties officeooo:rsid="02814fd4"/>
    </style:style>
    <style:style style:name="T673" style:family="text">
      <style:text-properties officeooo:rsid="028254be"/>
    </style:style>
    <style:style style:name="T674" style:family="text">
      <style:text-properties officeooo:rsid="02870cc2"/>
    </style:style>
    <style:style style:name="T675" style:family="text">
      <style:text-properties officeooo:rsid="02882585"/>
    </style:style>
    <style:style style:name="T676" style:family="text">
      <style:text-properties officeooo:rsid="02893f5b"/>
    </style:style>
    <style:style style:name="T677" style:family="text">
      <style:text-properties officeooo:rsid="028a2d1b"/>
    </style:style>
    <style:style style:name="T678" style:family="text">
      <style:text-properties officeooo:rsid="028a32fa"/>
    </style:style>
    <style:style style:name="T679" style:family="text">
      <style:text-properties officeooo:rsid="028a5d60"/>
    </style:style>
    <style:style style:name="T680" style:family="text">
      <style:text-properties officeooo:rsid="028daa6b"/>
    </style:style>
    <style:style style:name="T681" style:family="text">
      <style:text-properties officeooo:rsid="028f085b"/>
    </style:style>
    <style:style style:name="T682" style:family="text">
      <style:text-properties officeooo:rsid="02900491"/>
    </style:style>
    <style:style style:name="T683" style:family="text">
      <style:text-properties officeooo:rsid="029191f9"/>
    </style:style>
    <style:style style:name="T684" style:family="text">
      <style:text-properties officeooo:rsid="0291fd46"/>
    </style:style>
    <style:style style:name="T685" style:family="text">
      <style:text-properties officeooo:rsid="0293c485"/>
    </style:style>
    <style:style style:name="T686" style:family="text">
      <style:text-properties officeooo:rsid="0294b903"/>
    </style:style>
    <style:style style:name="T687" style:family="text">
      <style:text-properties officeooo:rsid="029692b0"/>
    </style:style>
    <style:style style:name="T688" style:family="text">
      <style:text-properties officeooo:rsid="029a0fdf"/>
    </style:style>
    <style:style style:name="T689" style:family="text">
      <style:text-properties officeooo:rsid="029b42ef"/>
    </style:style>
    <style:style style:name="T690" style:family="text">
      <style:text-properties officeooo:rsid="029dd7c6"/>
    </style:style>
    <style:style style:name="T691" style:family="text">
      <style:text-properties officeooo:rsid="029fb1d4"/>
    </style:style>
    <style:style style:name="T692" style:family="text">
      <style:text-properties officeooo:rsid="02a16760"/>
    </style:style>
    <style:style style:name="T693" style:family="text">
      <style:text-properties officeooo:rsid="02a22cd5"/>
    </style:style>
    <style:style style:name="T694" style:family="text">
      <style:text-properties officeooo:rsid="02a3922a"/>
    </style:style>
    <style:style style:name="T695" style:family="text">
      <style:text-properties officeooo:rsid="02a3f731"/>
    </style:style>
    <style:style style:name="T696" style:family="text">
      <style:text-properties officeooo:rsid="02a72bff"/>
    </style:style>
    <style:style style:name="T697" style:family="text">
      <style:text-properties officeooo:rsid="02a73c5a"/>
    </style:style>
    <style:style style:name="T698" style:family="text">
      <style:text-properties officeooo:rsid="02a77caa"/>
    </style:style>
    <style:style style:name="T699" style:family="text">
      <style:text-properties officeooo:rsid="02a89518"/>
    </style:style>
    <style:style style:name="T700" style:family="text">
      <style:text-properties officeooo:rsid="02a9a554"/>
    </style:style>
    <style:style style:name="T701" style:family="text">
      <style:text-properties officeooo:rsid="02abafb7"/>
    </style:style>
    <style:style style:name="T702" style:family="text">
      <style:text-properties officeooo:rsid="02acf586"/>
    </style:style>
    <style:style style:name="T703" style:family="text">
      <style:text-properties officeooo:rsid="02aebc87"/>
    </style:style>
    <style:style style:name="T704" style:family="text">
      <style:text-properties officeooo:rsid="02b0a798"/>
    </style:style>
    <style:style style:name="T705" style:family="text">
      <style:text-properties officeooo:rsid="02b289ea"/>
    </style:style>
    <style:style style:name="T706" style:family="text">
      <style:text-properties officeooo:rsid="02b2d8f9"/>
    </style:style>
    <style:style style:name="T707" style:family="text">
      <style:text-properties officeooo:rsid="02b35ffb"/>
    </style:style>
    <style:style style:name="T708" style:family="text">
      <style:text-properties officeooo:rsid="02b47795"/>
    </style:style>
    <style:style style:name="T709" style:family="text">
      <style:text-properties officeooo:rsid="02b5fcce"/>
    </style:style>
    <style:style style:name="T710" style:family="text">
      <style:text-properties officeooo:rsid="02b732f4"/>
    </style:style>
    <style:style style:name="T711" style:family="text">
      <style:text-properties officeooo:rsid="02b8717f"/>
    </style:style>
    <style:style style:name="T712" style:family="text">
      <style:text-properties officeooo:rsid="02b8835a"/>
    </style:style>
    <style:style style:name="T713" style:family="text">
      <style:text-properties officeooo:rsid="02ba626d"/>
    </style:style>
    <style:style style:name="T714" style:family="text">
      <style:text-properties officeooo:rsid="02bfcec6"/>
    </style:style>
    <style:style style:name="T715" style:family="text">
      <style:text-properties fo:color="#0099ff" loext:opacity="100%"/>
    </style:style>
    <style:style style:name="T716" style:family="text">
      <style:text-properties officeooo:rsid="02c06500"/>
    </style:style>
    <style:style style:name="T717" style:family="text">
      <style:text-properties officeooo:rsid="004f9c0c"/>
    </style:style>
    <style:style style:name="T718" style:family="text">
      <style:text-properties officeooo:rsid="02c42c1c"/>
    </style:style>
    <style:style style:name="T719" style:family="text">
      <style:text-properties officeooo:rsid="02c4e25e"/>
    </style:style>
    <style:style style:name="T720" style:family="text">
      <style:text-properties officeooo:rsid="0208c8b7"/>
    </style:style>
    <style:style style:name="T721" style:family="text">
      <style:text-properties officeooo:rsid="02c524bc"/>
    </style:style>
    <style:style style:name="T722" style:family="text">
      <style:text-properties officeooo:rsid="02c660b1"/>
    </style:style>
    <style:style style:name="T723" style:family="text">
      <style:text-properties officeooo:rsid="02c68408"/>
    </style:style>
    <style:style style:name="T724" style:family="text">
      <style:text-properties officeooo:rsid="02c96881"/>
    </style:style>
    <style:style style:name="T725" style:family="text">
      <style:text-properties officeooo:rsid="02cb013b"/>
    </style:style>
    <style:style style:name="T726" style:family="text">
      <style:text-properties officeooo:rsid="02cb4d34"/>
    </style:style>
    <style:style style:name="T727" style:family="text">
      <style:text-properties officeooo:rsid="02cd4a54"/>
    </style:style>
    <style:style style:name="T728" style:family="text">
      <style:text-properties officeooo:rsid="02ce5359"/>
    </style:style>
    <style:style style:name="T729" style:family="text">
      <style:text-properties officeooo:rsid="02cebb8c"/>
    </style:style>
    <style:style style:name="T730" style:family="text">
      <style:text-properties officeooo:rsid="02d09593"/>
    </style:style>
    <style:style style:name="T731" style:family="text">
      <style:text-properties officeooo:rsid="02d248b2"/>
    </style:style>
    <style:style style:name="T732" style:family="text">
      <style:text-properties officeooo:rsid="02d3fae9"/>
    </style:style>
    <style:style style:name="T733" style:family="text">
      <style:text-properties officeooo:rsid="02d4f3c7"/>
    </style:style>
    <style:style style:name="T734" style:family="text">
      <style:text-properties officeooo:rsid="02d757c2"/>
    </style:style>
    <style:style style:name="T735" style:family="text">
      <style:text-properties officeooo:rsid="02d8f619"/>
    </style:style>
    <style:style style:name="fr1" style:family="graphic" style:parent-style-name="Graphics">
      <style:graphic-properties style:vertical-pos="from-top" style:vertical-rel="paragraph" style:horizontal-pos="from-left" style:horizontal-rel="paragraph" style:mirror="none" fo:clip="rect(0.86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6">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ilots Flight Log Book</text:p>
      <text:p text:style-name="P508"/>
      <text:p text:style-name="P508">Including <text:span text:style-name="T346">full </text:span>support for Engineer<text:span text:style-name="T565">s</text:span>, <text:span text:style-name="T564">Navigators, Radar and Radio technicians and </text:span>GIB <text:span text:style-name="T565">flight crew, </text:span>record<text:span text:style-name="T48">ing on all aircraft types</text:span></text:p>
      <text:p text:style-name="P508"/>
      <text:p text:style-name="P508"/>
      <text:p text:style-name="P509">For release v2.0<text:span text:style-name="T580">2</text:span></text:p>
      <text:p text:style-name="P510"/>
      <text:p text:style-name="P510"/>
      <text:p text:style-name="P510"/>
      <text:section text:style-name="Sect1" text:name="Section 2">
        <text:p text:style-name="P49"/>
      </text:section>
      <text:p text:style-name="P48">This document forms part of the <text:span text:style-name="T18">Pilot Flight Log Book</text:span> and is : </text:p>
      <text:p text:style-name="P48">Copyright © <text:span text:style-name="T546">1986 – 20</text:span><text:span text:style-name="T698">2</text:span><text:span text:style-name="T721">6</text:span><text:span text:style-name="T546">,</text:span> <text:span text:style-name="T346">Jointly </text:span>Applewood Computers <text:span text:style-name="T18">and Vincent B Coen, FBCS.</text:span></text:p>
      <text:p text:style-name="P51">along with the Flightlog software.</text:p>
      <text:p text:style-name="P48"/>
      <text:p text:style-name="P108"/>
      <text:p text:style-name="P40"/>
      <text:p text:style-name="P47">17 Stag Green Ave<text:span text:style-name="T48">nue</text:span></text:p>
      <text:p text:style-name="P47">Hatfield</text:p>
      <text:p text:style-name="P47">Hertfordshire</text:p>
      <text:p text:style-name="P47">AL9 5EB</text:p>
      <text:p text:style-name="P47">United Kingdom</text:p>
      <text:p text:style-name="P40"/>
      <text:p text:style-name="P40"><text:span text:style-name="T460">General s</text:span>upport email: <text:s/><text:a xlink:type="simple" xlink:href="mailto:vbcoen@gmail.com" text:style-name="Internet_20_link" text:visited-style-name="Visited_20_Internet_20_Link">vbcoen@<text:span text:style-name="T1">gmail</text:span>.com</text:a></text:p>
      <text:p text:style-name="P46">For sending CSV files/data only use <text:a xlink:type="simple" xlink:href="mailto:vbcoen@btconnect.com" text:style-name="Internet_20_link" text:visited-style-name="Visited_20_Internet_20_Link">vbcoen@btconnect.com</text:a> as it has higher limits for size of file attachments but still only send <text:span text:style-name="T496">compressed </text:span>archive file/s with your surname, initials and license number i.e., coenvb-atpl123456.zip with subject as Flightlog CSV. Th<text:span text:style-name="T495">is h</text:span>elp<text:span text:style-name="T495">s</text:span> prevent <text:span text:style-name="T496">duplicated </text:span>file name<text:span text:style-name="T565">s</text:span> arriving.</text:p>
      <text:p text:style-name="P46"/>
      <text:p text:style-name="P45"><text:span text:style-name="T460">Otherwise u</text:span>se Flightlog in subject line then software or manual as needed along with BUG, <text:s/>FEATURE request <text:span text:style-name="T366">or registrations</text:span>.</text:p>
      <text:p text:style-name="P15"/>
      <text:p text:style-name="P43">Registrations <text:span text:style-name="T718">should</text:span> include: User<text:span text:style-name="T723">s</text:span> name, Town and Country as well as your email address that can receive updates as email archived attachments <text:span text:style-name="T403">and these will be around 10Mb in size</text:span>.</text:p>
      <text:p text:style-name="P43">Archives used are produced using RAR, ZIP and *nix’s <text:span text:style-name="T723">tar</text:span> – your choice.</text:p>
      <text:p text:style-name="P50"><text:span text:style-name="T721">I</text:span> <text:span text:style-name="T547">do </text:span><text:span text:style-name="T23">NOT</text:span> pass on such details to anyone<text:span text:style-name="T723">, period</text:span>.</text:p>
      <text:p text:style-name="P50"/>
      <text:p text:style-name="P42">See the section of <text:span text:style-name="T403">Appendix R - </text:span>Registrations in this manual for more details.</text:p>
      <text:p text:style-name="P42"/>
      <text:p text:style-name="P42"/>
      <text:p text:style-name="P40"><text:span text:style-name="T18">W</text:span>ritten <text:s/><text:tab/><text:span text:style-name="T346">Started 6th</text:span> <text:span text:style-name="T18">November</text:span> 20<text:span text:style-name="T1">18</text:span></text:p>
      <text:p text:style-name="P41">LibreOffice <text:tab/>v<text:span text:style-name="T719">7.4</text:span> or later.</text:p>
      <text:p text:style-name="P40"/>
      <text:p text:style-name="P40"><text:span text:style-name="T7">1</text:span><text:span text:style-name="T2"> </text:span><text:span text:style-name="T7">3</text:span><text:span text:style-name="T2"> 5 7 9 </text:span><text:span text:style-name="T7">0</text:span><text:span text:style-name="T2"> </text:span><text:span text:style-name="T8">2</text:span> <text:span text:style-name="T7">4</text:span> 6 8</text:p>
      <text:p text:style-name="P616"/>
      <text:p text:style-name="P616"><text:span text:style-name="T9">Rel</text:span><text:span text:style-name="T12">ease</text:span><text:span text:style-name="T9">. </text:span><text:span text:style-name="T10">2.0</text:span><text:span text:style-name="T13">2</text:span><text:span text:style-name="T9">.</text:span><text:span text:style-name="T14">1</text:span><text:span text:style-name="T15">3</text:span></text:p>
      <text:p text:style-name="P241"/>
      <text:p text:style-name="P140">Author:<text:tab/><text:tab/>Vincent Coen, The author asserts his copyright over this <text:span text:style-name="T717">work.</text:span></text:p>
      <text:p text:style-name="P245"><text:span text:style-name="T17">Latest update: <text:tab/></text:span><text:span text:style-name="T17"><text:modification-date style:data-style-name="N46">22. February 2026</text:modification-date></text:span><text:span text:style-name="T17"> <text:s/></text:span><text:span text:style-name="T17"><text:modification-time style:data-style-name="N61">18:54:14</text:modification-time></text:span></text:p>
      <text:p text:style-name="P241"><text:span text:style-name="T17">Doc. Version<text:tab/><text:tab/></text:span><text:span text:style-name="T17"><text:editing-cycles>142</text:editing-cycles></text:span></text:p>
      <text:p text:style-name="P24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7"><text:a xlink:type="simple" xlink:href="#__RefHeading___Toc10435_694440486" text:style-name="Index_20_Link" text:visited-style-name="Index_20_Link">1 Manual Update Record.<text:tab/>5</text:a></text:p>
          <text:p text:style-name="P647"><text:a xlink:type="simple" xlink:href="#__RefHeading___Toc10437_694440486" text:style-name="Index_20_Link" text:visited-style-name="Index_20_Link">2 Introduction<text:tab/>7</text:a></text:p>
          <text:p text:style-name="P648"><text:a xlink:type="simple" xlink:href="#__RefHeading___Toc18869_2548604501" text:style-name="Index_20_Link" text:visited-style-name="Index_20_Link">2.1 Overview of Flightlog<text:tab/>8</text:a></text:p>
          <text:p text:style-name="P649"><text:a xlink:type="simple" xlink:href="#__RefHeading___Toc11708_573098382" text:style-name="Index_20_Link" text:visited-style-name="Index_20_Link">2.1.1 Flightlog Facilities and Overview<text:tab/>8</text:a></text:p>
          <text:p text:style-name="P649"><text:a xlink:type="simple" xlink:href="#__RefHeading___Toc13742_573098382" text:style-name="Index_20_Link" text:visited-style-name="Index_20_Link">2.1.2 Flightlog sources<text:tab/>8</text:a></text:p>
          <text:p text:style-name="P649"><text:a xlink:type="simple" xlink:href="#__RefHeading___Toc13744_573098382" text:style-name="Index_20_Link" text:visited-style-name="Index_20_Link">2.1.3 Registration of Flightlog<text:tab/>9</text:a></text:p>
          <text:p text:style-name="P649"><text:a xlink:type="simple" xlink:href="#__RefHeading___Toc11710_573098382" text:style-name="Index_20_Link" text:visited-style-name="Index_20_Link">2.1.4 Files used<text:tab/>10</text:a></text:p>
          <text:p text:style-name="P649"><text:a xlink:type="simple" xlink:href="#__RefHeading___Toc11712_573098382" text:style-name="Index_20_Link" text:visited-style-name="Index_20_Link">2.1.5 Backing up the Flightlog files<text:tab/>11</text:a></text:p>
          <text:p text:style-name="P647"><text:a xlink:type="simple" xlink:href="#__RefHeading___Toc10561_694440486" text:style-name="Index_20_Link" text:visited-style-name="Index_20_Link">3 Pre-Operations<text:tab/>12</text:a></text:p>
          <text:p text:style-name="P648"><text:a xlink:type="simple" xlink:href="#__RefHeading___Toc13746_573098382" text:style-name="Index_20_Link" text:visited-style-name="Index_20_Link">3.1 Preparations before using Flightlog<text:tab/>12</text:a></text:p>
          <text:p text:style-name="P647"><text:a xlink:type="simple" xlink:href="#__RefHeading___Toc1035_2548604501" text:style-name="Index_20_Link" text:visited-style-name="Index_20_Link">4 Normal Flightlog Processes<text:tab/>13</text:a></text:p>
          <text:p text:style-name="P648"><text:a xlink:type="simple" xlink:href="#__RefHeading___Toc13748_573098382" text:style-name="Index_20_Link" text:visited-style-name="Index_20_Link">4.1 Menu Options and Functions<text:tab/>13</text:a></text:p>
          <text:p text:style-name="P647"><text:a xlink:type="simple" xlink:href="#__RefHeading___Toc1037_2548604501" text:style-name="Index_20_Link" text:visited-style-name="Index_20_Link">5 Work Flow Overview<text:tab/>15</text:a></text:p>
          <text:p text:style-name="P647"><text:a xlink:type="simple" xlink:href="#__RefHeading___Toc14510_2548604501" text:style-name="Index_20_Link" text:visited-style-name="Index_20_Link">6 Flight Log Menu<text:tab/>19</text:a></text:p>
          <text:p text:style-name="P648"><text:a xlink:type="simple" xlink:href="#__RefHeading___Toc14512_2548604501" text:style-name="Index_20_Link" text:visited-style-name="Index_20_Link">6.1 Option A &amp; B – Flight log Data Entry and Amend Functions<text:tab/>19</text:a></text:p>
          <text:p text:style-name="P648"><text:a xlink:type="simple" xlink:href="#__RefHeading___Toc14514_2548604501" text:style-name="Index_20_Link" text:visited-style-name="Index_20_Link">6.2 Option C and D – Flight Log Reporting<text:tab/>24</text:a></text:p>
          <text:p text:style-name="P648"><text:a xlink:type="simple" xlink:href="#__RefHeading___Toc14516_2548604501" text:style-name="Index_20_Link" text:visited-style-name="Index_20_Link">6.3 Option E – Analysis &amp; Totals Report<text:tab/>27</text:a></text:p>
          <text:p text:style-name="P648"><text:a xlink:type="simple" xlink:href="#__RefHeading___Toc14518_2548604501" text:style-name="Index_20_Link" text:visited-style-name="Index_20_Link">6.4 Option F – Analysis &amp; Totals Display<text:tab/>27</text:a></text:p>
          <text:p text:style-name="P648"><text:a xlink:type="simple" xlink:href="#__RefHeading___Toc14520_2548604501" text:style-name="Index_20_Link" text:visited-style-name="Index_20_Link">6.5 Option G – Cert of Ext. Analysis Report<text:tab/>28</text:a></text:p>
          <text:p text:style-name="P648"><text:a xlink:type="simple" xlink:href="#__RefHeading___Toc14522_2548604501" text:style-name="Index_20_Link" text:visited-style-name="Index_20_Link">6.6 Option H – Change Log Book Airfield Code<text:tab/>29</text:a></text:p>
          <text:p text:style-name="P648"><text:a xlink:type="simple" xlink:href="#__RefHeading___Toc14524_2548604501" text:style-name="Index_20_Link" text:visited-style-name="Index_20_Link">6.7 Option J – Change Log Book Aircraft Type<text:tab/>30</text:a></text:p>
          <text:p text:style-name="P648"><text:a xlink:type="simple" xlink:href="#__RefHeading___Toc10426_2406473622" text:style-name="Index_20_Link" text:visited-style-name="Index_20_Link">6.8 Option K - Edit Airfield Name<text:tab/>31</text:a></text:p>
          <text:p text:style-name="P648"><text:a xlink:type="simple" xlink:href="#__RefHeading___Toc10428_2406473622" text:style-name="Index_20_Link" text:visited-style-name="Index_20_Link">6.9 Option S - Create Sequential files from ISAM<text:tab/>33</text:a></text:p>
          <text:p text:style-name="P648"><text:a xlink:type="simple" xlink:href="#__RefHeading___Toc14526_2548604501" text:style-name="Index_20_Link" text:visited-style-name="Index_20_Link">6.10 Option T – Import CSV Data and Parameters<text:tab/>34</text:a></text:p>
          <text:p text:style-name="P648"><text:a xlink:type="simple" xlink:href="#__RefHeading___Toc14528_2548604501" text:style-name="Index_20_Link" text:visited-style-name="Index_20_Link">6.11 Option U – Enter User details for Reports<text:tab/>35</text:a></text:p>
          <text:p text:style-name="P648"><text:a xlink:type="simple" xlink:href="#__RefHeading___Toc10430_2406473622" text:style-name="Index_20_Link" text:visited-style-name="Index_20_Link">6.12 Option X - Quit Log Book System<text:tab/>35</text:a></text:p>
          <text:p text:style-name="P647"><text:a xlink:type="simple" xlink:href="#__RefHeading___Toc1039_2548604501" text:style-name="Index_20_Link" text:visited-style-name="Index_20_Link">7 CSV Parameter Structure<text:tab/>36</text:a></text:p>
          <text:p text:style-name="P648"><text:a xlink:type="simple" xlink:href="#__RefHeading___Toc16585_2548604501" text:style-name="Index_20_Link" text:visited-style-name="Index_20_Link">7.1 CSV Overview<text:tab/>36</text:a></text:p>
          <text:p text:style-name="P648"><text:a xlink:type="simple" xlink:href="#__RefHeading___Toc10432_2406473622" text:style-name="Index_20_Link" text:visited-style-name="Index_20_Link">7.2 Testing your CSV parameter configuration with CSV data<text:tab/>37</text:a></text:p>
          <text:p text:style-name="P648"><text:a xlink:type="simple" xlink:href="#__RefHeading___Toc16587_2548604501" text:style-name="Index_20_Link" text:visited-style-name="Index_20_Link">7.3 CSV Prerequisites<text:tab/>39</text:a></text:p>
          <text:p text:style-name="P648"><text:a xlink:type="simple" xlink:href="#__RefHeading___Toc1041_2548604501" text:style-name="Index_20_Link" text:visited-style-name="Index_20_Link">7.4 CSV Configuration Overview<text:tab/>40</text:a></text:p>
          <text:p text:style-name="P648"><text:a xlink:type="simple" xlink:href="#__RefHeading___Toc1043_2548604501" text:style-name="Index_20_Link" text:visited-style-name="Index_20_Link">7.5 CSV Definition Record Types<text:tab/>42</text:a></text:p>
          <text:p text:style-name="P649"><text:a xlink:type="simple" xlink:href="#__RefHeading___Toc10434_2406473622" text:style-name="Index_20_Link" text:visited-style-name="Index_20_Link">7.5.1 Record 1<text:tab/>42</text:a></text:p>
          <text:p text:style-name="P649"><text:a xlink:type="simple" xlink:href="#__RefHeading___Toc10436_2406473622" text:style-name="Index_20_Link" text:visited-style-name="Index_20_Link">7.5.2 Record 2<text:tab/>43</text:a></text:p>
          <text:p text:style-name="P649"><text:a xlink:type="simple" xlink:href="#__RefHeading___Toc10438_2406473622" text:style-name="Index_20_Link" text:visited-style-name="Index_20_Link">7.5.3 Record 3<text:tab/>44</text:a></text:p>
          <text:p text:style-name="P649"><text:a xlink:type="simple" xlink:href="#__RefHeading___Toc10440_2406473622" text:style-name="Index_20_Link" text:visited-style-name="Index_20_Link">7.5.4 Record 4<text:tab/>45</text:a></text:p>
          <text:p text:style-name="P649"><text:a xlink:type="simple" xlink:href="#__RefHeading___Toc10442_2406473622" text:style-name="Index_20_Link" text:visited-style-name="Index_20_Link">7.5.5 Record 5<text:tab/>46</text:a></text:p>
          <text:p text:style-name="P649"><text:a xlink:type="simple" xlink:href="#__RefHeading___Toc10444_2406473622" text:style-name="Index_20_Link" text:visited-style-name="Index_20_Link">7.5.6 Record 6<text:tab/>47</text:a></text:p>
          <text:p text:style-name="P648"><text:a xlink:type="simple" xlink:href="#__RefHeading___Toc1045_2548604501" text:style-name="Index_20_Link" text:visited-style-name="Index_20_Link">7.6 Configuration File Example<text:tab/>49</text:a></text:p>
          <text:p text:style-name="P649"><text:a xlink:type="simple" xlink:href="#__RefHeading___Toc13056_2548604501" text:style-name="Index_20_Link" text:visited-style-name="Index_20_Link">7.6.1 Example CSV data file<text:tab/>51</text:a></text:p>
          <text:p text:style-name="P649"><text:a xlink:type="simple" xlink:href="#__RefHeading___Toc11320_2857818006" text:style-name="Index_20_Link" text:visited-style-name="Index_20_Link">Figure 12 - Post CSV data import<text:tab/>54</text:a></text:p>
          <text:p text:style-name="P649"><text:a xlink:type="simple" xlink:href="#__RefHeading___Toc13911_2548604501" text:style-name="Index_20_Link" text:visited-style-name="Index_20_Link">7.6.2 Delimiters and data formats<text:tab/>54</text:a></text:p>
          <text:p text:style-name="P647"><text:a xlink:type="simple" xlink:href="#__RefHeading___Toc14777_2548604501" text:style-name="Index_20_Link" text:visited-style-name="Index_20_Link">8 Appendix A - Keyboard operations or actions during data entry.<text:tab/>55</text:a></text:p>
          <text:p text:style-name="P647"><text:a xlink:type="simple" xlink:href="#__RefHeading___Toc12906_2548604501" text:style-name="Index_20_Link" text:visited-style-name="Index_20_Link">9 Appendix B – Warning and Error messages<text:tab/>56</text:a></text:p>
          <text:p text:style-name="P648"><text:a xlink:type="simple" xlink:href="#__RefHeading___Toc22960_957585968" text:style-name="Index_20_Link" text:visited-style-name="Index_20_Link">9.1 Overview<text:tab/>56</text:a></text:p>
          <text:p text:style-name="P648"><text:a xlink:type="simple" xlink:href="#__RefHeading___Toc30893_2548604501" text:style-name="Index_20_Link" text:visited-style-name="Index_20_Link">9.2 SSDs and Garbage Collection<text:tab/>56</text:a></text:p>
          <text:p text:style-name="P648"><text:a xlink:type="simple" xlink:href="#__RefHeading___Toc30895_2548604501" text:style-name="Index_20_Link" text:visited-style-name="Index_20_Link">9.3 Warning and Error messages produced by Flightlog<text:tab/>58</text:a></text:p>
          <text:p text:style-name="P649"><text:a xlink:type="simple" xlink:href="#__RefHeading___Toc22962_957585968" text:style-name="Index_20_Link" text:visited-style-name="Index_20_Link">9.3.1 Extra guidance on specific messages which detail fixes for the source file<text:tab/>65</text:a></text:p>
          <text:p text:style-name="P650"><text:a xlink:type="simple" xlink:href="#__RefHeading___Toc9332_957585968" text:style-name="Index_20_Link" text:visited-style-name="Index_20_Link">9.3.1.1 Changing settings for CSV field limits<text:tab/>65</text:a></text:p>
          <text:p text:style-name="P650"><text:a xlink:type="simple" xlink:href="#__RefHeading___Toc9334_957585968" text:style-name="Index_20_Link" text:visited-style-name="Index_20_Link"><text:soft-page-break/>9.3.1.2 Changing settings for Aircraft or Airfield Tables<text:tab/>65</text:a></text:p>
          <text:p text:style-name="P648"><text:a xlink:type="simple" xlink:href="#__RefHeading___Toc12321_957585968" text:style-name="Index_20_Link" text:visited-style-name="Index_20_Link">9.4 File handling status codes and their meaning<text:tab/>67</text:a></text:p>
          <text:p text:style-name="P649"><text:a xlink:type="simple" xlink:href="#__RefHeading___Toc22964_957585968" text:style-name="Index_20_Link" text:visited-style-name="Index_20_Link">9.4.1 File Access Error numbers.<text:tab/>67</text:a></text:p>
          <text:p text:style-name="P648"><text:a xlink:type="simple" xlink:href="#__RefHeading___Toc22966_957585968" text:style-name="Index_20_Link" text:visited-style-name="Index_20_Link">9.5 RDBMS error codes<text:tab/>68</text:a></text:p>
          <text:p text:style-name="P649"><text:a xlink:type="simple" xlink:href="#__RefHeading___Toc43670_1813075902" text:style-name="Index_20_Link" text:visited-style-name="Index_20_Link">9.5.1 MySQL SQL Status messages<text:tab/>68</text:a></text:p>
          <text:p text:style-name="P647"><text:a xlink:type="simple" xlink:href="#__RefHeading___Toc1109_2548604501" text:style-name="Index_20_Link" text:visited-style-name="Index_20_Link">10 <text:s/>Appendix C – Installing the Cobol Compiler<text:tab/>69</text:a></text:p>
          <text:p text:style-name="P648"><text:a xlink:type="simple" xlink:href="#__RefHeading___Toc11539_2548604501" text:style-name="Index_20_Link" text:visited-style-name="Index_20_Link">10.1 Install the Cobol compiler<text:tab/>69</text:a></text:p>
          <text:p text:style-name="P649"><text:a xlink:type="simple" xlink:href="#__RefHeading___Toc12348_1090335569" text:style-name="Index_20_Link" text:visited-style-name="Index_20_Link">10.1.1 Compiler Install Option 2.<text:tab/>70</text:a></text:p>
          <text:p text:style-name="P648"><text:a xlink:type="simple" xlink:href="#__RefHeading___Toc11038_792484039" text:style-name="Index_20_Link" text:visited-style-name="Index_20_Link">10.2 Cobol compiler extra required libraries packages.<text:tab/>71</text:a></text:p>
          <text:p text:style-name="P648"><text:a xlink:type="simple" xlink:href="#__RefHeading___Toc19977_2548604501" text:style-name="Index_20_Link" text:visited-style-name="Index_20_Link">10.3 Set up and build the Cobol compiler<text:tab/>73</text:a></text:p>
          <text:p text:style-name="P648"><text:a xlink:type="simple" xlink:href="#__RefHeading___Toc19979_2548604501" text:style-name="Index_20_Link" text:visited-style-name="Index_20_Link">10.4 Test the Cobol compiler<text:tab/>73</text:a></text:p>
          <text:p text:style-name="P649"><text:a xlink:type="simple" xlink:href="#__RefHeading___Toc12011_3306186750" text:style-name="Index_20_Link" text:visited-style-name="Index_20_Link">10.4.1 Compiler Testing<text:tab/>73</text:a></text:p>
          <text:p text:style-name="P649"><text:a xlink:type="simple" xlink:href="#__RefHeading___Toc11692_3306186750" text:style-name="Index_20_Link" text:visited-style-name="Index_20_Link">10.4.2 Setting the Linker<text:tab/>74</text:a></text:p>
          <text:p text:style-name="P648"><text:a xlink:type="simple" xlink:href="#__RefHeading__11524_177439401" text:style-name="Index_20_Link" text:visited-style-name="Index_20_Link">10.5 Validating the Cobol compiler<text:tab/>76</text:a></text:p>
          <text:p text:style-name="P647"><text:a xlink:type="simple" xlink:href="#__RefHeading__11526_177439401" text:style-name="Index_20_Link" text:visited-style-name="Index_20_Link">11 Appendix D - Flightlog Build and Installation<text:tab/>77</text:a></text:p>
          <text:p text:style-name="P648"><text:a xlink:type="simple" xlink:href="#__RefHeading___Toc19665_2548604501" text:style-name="Index_20_Link" text:visited-style-name="Index_20_Link">11.1 Installing the Flightlog executable or binaries<text:tab/>77</text:a></text:p>
          <text:p text:style-name="P648"><text:a xlink:type="simple" xlink:href="#__RefHeading___Toc47411_2548604501" text:style-name="Index_20_Link" text:visited-style-name="Index_20_Link">11.2 Installing other optional Packages<text:tab/>78</text:a></text:p>
          <text:p text:style-name="P648"><text:a xlink:type="simple" xlink:href="#__RefHeading__11530_177439401" text:style-name="Index_20_Link" text:visited-style-name="Index_20_Link">11.3 Compiling the Source code<text:tab/>78</text:a></text:p>
          <text:p text:style-name="P648"><text:a xlink:type="simple" xlink:href="#__RefHeading__11532_177439401" text:style-name="Index_20_Link" text:visited-style-name="Index_20_Link">11.4 Installing Flightlog<text:tab/>79</text:a></text:p>
          <text:p text:style-name="P649"><text:a xlink:type="simple" xlink:href="#__RefHeading___Toc14210_2442113812" text:style-name="Index_20_Link" text:visited-style-name="Index_20_Link">11.4.1 Setting the path to find executable programs<text:tab/>79</text:a></text:p>
          <text:p text:style-name="P649"><text:a xlink:type="simple" xlink:href="#__RefHeading___Toc14212_2442113812" text:style-name="Index_20_Link" text:visited-style-name="Index_20_Link">11.4.2 Setting the terminal (konsole) program<text:tab/>80</text:a></text:p>
          <text:p text:style-name="P649"><text:a xlink:type="simple" xlink:href="#__RefHeading___Toc14214_2442113812" text:style-name="Index_20_Link" text:visited-style-name="Index_20_Link">11.4.3 Screen<text:tab/>80</text:a></text:p>
          <text:p text:style-name="P649"><text:a xlink:type="simple" xlink:href="#__RefHeading___Toc13668_2442113812" text:style-name="Index_20_Link" text:visited-style-name="Index_20_Link">11.4.4 Script for running flightlog<text:tab/>80</text:a></text:p>
          <text:p text:style-name="P649"><text:a xlink:type="simple" xlink:href="#__RefHeading___Toc14216_2442113812" text:style-name="Index_20_Link" text:visited-style-name="Index_20_Link">11.4.5 Backup archive created by run-flightlog.sh<text:tab/>81</text:a></text:p>
          <text:p text:style-name="P648"><text:a xlink:type="simple" xlink:href="#__RefHeading___Toc19843_2548604501" text:style-name="Index_20_Link" text:visited-style-name="Index_20_Link">11.5 Preparation for running Flightlog<text:tab/>82</text:a></text:p>
          <text:p text:style-name="P649"><text:a xlink:type="simple" xlink:href="#__RefHeading___Toc12350_1090335569" text:style-name="Index_20_Link" text:visited-style-name="Index_20_Link">11.5.1 Actual Steps for Linux.<text:tab/>82</text:a></text:p>
          <text:p text:style-name="P648"><text:a xlink:type="simple" xlink:href="#__RefHeading___Toc20390_2548604501" text:style-name="Index_20_Link" text:visited-style-name="Index_20_Link">11.6 Running Flightlog Manually<text:tab/>83</text:a></text:p>
          <text:p text:style-name="P649"><text:a xlink:type="simple" xlink:href="#__RefHeading___Toc19981_2548604501" text:style-name="Index_20_Link" text:visited-style-name="Index_20_Link">11.6.1 Parameter 1 (P1):<text:tab/>83</text:a></text:p>
          <text:p text:style-name="P649"><text:a xlink:type="simple" xlink:href="#__RefHeading___Toc19983_2548604501" text:style-name="Index_20_Link" text:visited-style-name="Index_20_Link">11.6.2 Parameter 2 (P2):<text:tab/>84</text:a></text:p>
          <text:p text:style-name="P649"><text:a xlink:type="simple" xlink:href="#__RefHeading___Toc20392_2548604501" text:style-name="Index_20_Link" text:visited-style-name="Index_20_Link">11.6.3 Parameter 3 (P3)<text:tab/>84</text:a></text:p>
          <text:p text:style-name="P649"><text:a xlink:type="simple" xlink:href="#__RefHeading___Toc10977_2975102684" text:style-name="Index_20_Link" text:visited-style-name="Index_20_Link">11.6.4 Setting of LC_TIME for your preferred date format.<text:tab/>84</text:a></text:p>
          <text:p text:style-name="P649"><text:a xlink:type="simple" xlink:href="#__RefHeading___Toc15052_2735134579" text:style-name="Index_20_Link" text:visited-style-name="Index_20_Link">11.6.5 Running Flightlog<text:tab/>85</text:a></text:p>
          <text:p text:style-name="P647"><text:a xlink:type="simple" xlink:href="#__RefHeading___Toc19015_2548604501" text:style-name="Index_20_Link" text:visited-style-name="Index_20_Link">12 Appendix R - Registering Flightlog<text:tab/>86</text:a></text:p>
        </text:index-body>
      </text:table-of-content>
      <text:h text:style-name="P651" text:outline-level="1"/>
      <text:p text:style-name="P363"/>
      <text:h text:style-name="P654" text:outline-level="1"><text:bookmark-start text:name="__RefHeading___Toc10435_694440486"/>Manual <text:span text:style-name="T481">U</text:span>pdate <text:span text:style-name="T481">R</text:span>ecord.<text:bookmark-end text:name="__RefHeading___Toc10435_694440486"/></text:h>
      <text:p text:style-name="P311"/>
      <text:p text:style-name="P597">Because no manual much like any software will be free of typo’s, contain only valid or perfect details or just plan miss information, <text:span text:style-name="T366">w</text:span>e have the <text:span text:style-name="T647">m</text:span>anual update facility and log file. Here is a detailed list of all fixe<text:span text:style-name="T366">s</text:span> to the <text:span text:style-name="T647">software and </text:span>manual as found or reported by users <text:span text:style-name="T347">or the development team.</text:span></text:p>
      <text:p text:style-name="P597"/>
      <text:p text:style-name="P597">So, if you find any, please report them. <text:s/>To <text:span text:style-name="T347">help </text:span>a<text:span text:style-name="T366">i</text:span>d this, the first few versions of this manual is only supplied as A4 format so every one is reporting to the same standard least of all when <text:span text:style-name="T366">users</text:span> specif<text:span text:style-name="T408">y</text:span> a page within a chapter. <text:s/><text:span text:style-name="T366">A </text:span>US letter formatted version <text:span text:style-name="T366">will be also be issued later or if requested</text:span>. <text:span text:style-name="T660"><text:s/></text:span>Hey, it is less pages to print :)</text:p>
      <text:p text:style-name="P59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13">Date</text:p>
          </table:table-cell>
          <table:table-cell table:style-name="Table1.A1" office:value-type="string">
            <text:p text:style-name="P413">Who </text:p>
          </table:table-cell>
          <table:table-cell table:style-name="Table1.A1" office:value-type="string">
            <text:p text:style-name="P413">Version</text:p>
          </table:table-cell>
          <table:table-cell table:style-name="Table1.D1" office:value-type="string">
            <text:p text:style-name="P413">What</text:p>
          </table:table-cell>
        </table:table-row>
        <table:table-row>
          <table:table-cell table:style-name="Table1.A2" office:value-type="string">
            <text:p text:style-name="P402"><text:span text:style-name="T19">06</text:span>/<text:span text:style-name="T19">11/20</text:span>18</text:p>
          </table:table-cell>
          <table:table-cell table:style-name="Table1.A2" office:value-type="string">
            <text:p text:style-name="P403">vbc</text:p>
          </table:table-cell>
          <table:table-cell table:style-name="Table1.A2" office:value-type="string">
            <text:p text:style-name="P403">2.0</text:p>
          </table:table-cell>
          <table:table-cell table:style-name="Table1.D2" office:value-type="string">
            <text:p text:style-name="P598"><text:span text:style-name="T19">Initial written document with details taken from program specifications, </text:span>source notes <text:span text:style-name="T314">and source code</text:span>. <text:span text:style-name="T403">This version is a major upgrade from </text:span><text:span text:style-name="T236">release v1.0 containing many new features and bug fixes.</text:span></text:p>
          </table:table-cell>
        </table:table-row>
        <table:table-row>
          <table:table-cell table:style-name="Table1.A2" office:value-type="string">
            <text:p text:style-name="P404">20/11/2018</text:p>
          </table:table-cell>
          <table:table-cell table:style-name="Table1.A2" office:value-type="string">
            <text:p text:style-name="P404">vbc</text:p>
          </table:table-cell>
          <table:table-cell table:style-name="Table1.A2" office:value-type="string">
            <text:p text:style-name="P414">2.01</text:p>
          </table:table-cell>
          <table:table-cell table:style-name="Table1.D2" office:value-type="string">
            <text:p text:style-name="P404">Added extra crew capacities to P1, 2, 3 by including E1, 2, N1, 2, R1, 2, T1, 2.<text:span text:style-name="T638"> More text for Flightlog functions.</text:span></text:p>
          </table:table-cell>
        </table:table-row>
        <table:table-row>
          <table:table-cell table:style-name="Table1.A2" office:value-type="string">
            <text:p text:style-name="P405">23/11/2018</text:p>
          </table:table-cell>
          <table:table-cell table:style-name="Table1.A2" office:value-type="string">
            <text:p text:style-name="P413">vbc</text:p>
          </table:table-cell>
          <table:table-cell table:style-name="Table1.A2" office:value-type="string">
            <text:p text:style-name="P413">2.01.25</text:p>
          </table:table-cell>
          <table:table-cell table:style-name="Table1.D2" office:value-type="string">
            <text:p text:style-name="P599">Added help and optional parameter fields. Made <text:span text:style-name="T403">it use only one </text:span>menu.<text:span text:style-name="T638"> </text:span>Changed manual to match.</text:p>
          </table:table-cell>
        </table:table-row>
        <table:table-row>
          <table:table-cell table:style-name="Table1.A2" office:value-type="string">
            <text:p text:style-name="P406">2<text:span text:style-name="T404">7</text:span>/11/2018</text:p>
          </table:table-cell>
          <table:table-cell table:style-name="Table1.A2" office:value-type="string">
            <text:p text:style-name="P413">vbc</text:p>
          </table:table-cell>
          <table:table-cell table:style-name="Table1.A2" office:value-type="string">
            <text:p text:style-name="P407">2.01.27</text:p>
          </table:table-cell>
          <table:table-cell table:style-name="Table1.D2" office:value-type="string">
            <text:p text:style-name="P406"><text:span text:style-name="T638">N</text:span>ow uses line sequential back up files for ease of use.<text:span text:style-name="T638"> More layout clean ups.</text:span></text:p>
          </table:table-cell>
        </table:table-row>
        <table:table-row>
          <table:table-cell table:style-name="Table1.A2" office:value-type="string">
            <text:p text:style-name="P408">30/11/2018</text:p>
          </table:table-cell>
          <table:table-cell table:style-name="Table1.A2" office:value-type="string">
            <text:p text:style-name="P414">vbc</text:p>
          </table:table-cell>
          <table:table-cell table:style-name="Table1.A2" office:value-type="string">
            <text:p text:style-name="P410"/>
          </table:table-cell>
          <table:table-cell table:style-name="Table1.D2" office:value-type="string">
            <text:p text:style-name="P409"><text:span text:style-name="T639">Added comments for install of enscript and postscript-common for printing as needs </text:span><text:span text:style-name="T640">ps2pdfwr,</text:span><text:span text:style-name="T645"> ps2pdf and ps2pdf14 to</text:span><text:span text:style-name="T643"> </text:span><text:span text:style-name="T645">work with supplied script prtpdf. </text:span><text:span text:style-name="T646">Updated comp-Flightlog.sh.</text:span></text:p>
          </table:table-cell>
        </table:table-row>
        <table:table-row>
          <table:table-cell table:style-name="Table1.A2" office:value-type="string">
            <text:p text:style-name="P414">10/12/2018</text:p>
          </table:table-cell>
          <table:table-cell table:style-name="Table1.A2" office:value-type="string">
            <text:p text:style-name="P414">vbc</text:p>
          </table:table-cell>
          <table:table-cell table:style-name="Table1.A2" office:value-type="string">
            <text:p text:style-name="P410"/>
          </table:table-cell>
          <table:table-cell table:style-name="Table1.D2" office:value-type="string">
            <text:p text:style-name="P600"><text:span text:style-name="T215">Proof read results.</text:span><text:span text:style-name="T223"> </text:span><text:span text:style-name="T218">Extra notes regarding </text:span><text:span text:style-name="T220">CDF (comma Delim</text:span><text:span text:style-name="T221">i</text:span><text:span text:style-name="T220">ted File)</text:span><text:span text:style-name="T218"> data file formats as</text:span><text:span text:style-name="T223"> </text:span><text:span text:style-name="T218">used with CSV file.</text:span></text:p>
            <text:p text:style-name="P411"><text:span text:style-name="T641">CSV is the correct term for </text:span><text:span text:style-name="T642">CDF</text:span><text:span text:style-name="T641">. <text:s/>- <text:s/>Must change it here.</text:span></text:p>
          </table:table-cell>
        </table:table-row>
        <table:table-row>
          <table:table-cell table:style-name="Table1.A2" office:value-type="string">
            <text:p text:style-name="P414">12/12/2018</text:p>
          </table:table-cell>
          <table:table-cell table:style-name="Table1.A2" office:value-type="string">
            <text:p text:style-name="P414">vbc</text:p>
          </table:table-cell>
          <table:table-cell table:style-name="Table1.A2" office:value-type="string">
            <text:p text:style-name="P410"/>
          </table:table-cell>
          <table:table-cell table:style-name="Table1.D2" office:value-type="string">
            <text:p text:style-name="P601"><text:span text:style-name="T215">All references to CDF changed to CSV.</text:span><text:span text:style-name="T223"> </text:span><text:span text:style-name="T219">Menu screen shot replaced for change of CDF to CSV.</text:span><text:span text:style-name="T223">. </text:span><text:span text:style-name="T237">B</text:span><text:span text:style-name="T238">ugs</text:span><text:span text:style-name="T237"> #001 </text:span><text:span text:style-name="T239">&amp; 002 fixed. </text:span><text:span text:style-name="T240">Changed CSV data to reflect the config file.</text:span></text:p>
          </table:table-cell>
        </table:table-row>
        <table:table-row>
          <table:table-cell table:style-name="Table1.A2" office:value-type="string">
            <text:p text:style-name="P414">17/12/2018</text:p>
          </table:table-cell>
          <table:table-cell table:style-name="Table1.A2" office:value-type="string">
            <text:p text:style-name="P414">vbc</text:p>
          </table:table-cell>
          <table:table-cell table:style-name="Table1.A2" office:value-type="string">
            <text:p text:style-name="P414">2.01.40</text:p>
          </table:table-cell>
          <table:table-cell table:style-name="Table1.D2" office:value-type="string">
            <text:p text:style-name="P412"><text:span text:style-name="T640">Bug #003 finally found, but left in </text:span><text:span text:style-name="T643">csv-test</text:span><text:span text:style-name="T640"> code. </text:span><text:span text:style-name="T644">More content clean ups.</text:span></text:p>
          </table:table-cell>
        </table:table-row>
        <table:table-row>
          <table:table-cell table:style-name="Table1.A2" office:value-type="string">
            <text:p text:style-name="P414">18/12/2018</text:p>
          </table:table-cell>
          <table:table-cell table:style-name="Table1.A2" office:value-type="string">
            <text:p text:style-name="P414">vbc</text:p>
          </table:table-cell>
          <table:table-cell table:style-name="Table1.A2" office:value-type="string">
            <text:p text:style-name="P410"/>
          </table:table-cell>
          <table:table-cell table:style-name="Table1.D2" office:value-type="string">
            <text:p text:style-name="P421">Update for Parameter CSV= (.44).</text:p>
          </table:table-cell>
        </table:table-row>
        <table:table-row>
          <table:table-cell table:style-name="Table1.A2" office:value-type="string">
            <text:p text:style-name="P414">26/12/2018</text:p>
          </table:table-cell>
          <table:table-cell table:style-name="Table1.A2" office:value-type="string">
            <text:p text:style-name="P414">vbc</text:p>
          </table:table-cell>
          <table:table-cell table:style-name="Table1.A2" office:value-type="string">
            <text:p text:style-name="P414">2.02</text:p>
          </table:table-cell>
          <table:table-cell table:style-name="Table1.D2" office:value-type="string">
            <text:p text:style-name="P422">Updates and tidy ups</text:p>
          </table:table-cell>
        </table:table-row>
        <table:table-row>
          <table:table-cell table:style-name="Table1.A2" office:value-type="string">
            <text:p text:style-name="P414">29/12/2018</text:p>
          </table:table-cell>
          <table:table-cell table:style-name="Table1.A2" office:value-type="string">
            <text:p text:style-name="P414">vbc</text:p>
          </table:table-cell>
          <table:table-cell table:style-name="Table1.A2" office:value-type="string">
            <text:p text:style-name="P410"/>
          </table:table-cell>
          <table:table-cell table:style-name="Table1.D2" office:value-type="string">
            <text:p text:style-name="P423">Removed the CSV EBCDIC convert feature. <text:span text:style-name="T607">Removed Appendix T as unneeded clutter. Format / move text from place to place.</text:span></text:p>
          </table:table-cell>
        </table:table-row>
        <table:table-row>
          <table:table-cell table:style-name="Table1.A2" office:value-type="string">
            <text:p text:style-name="P414">02/01/2019</text:p>
          </table:table-cell>
          <table:table-cell table:style-name="Table1.A2" office:value-type="string">
            <text:p text:style-name="P414">vbc</text:p>
          </table:table-cell>
          <table:table-cell table:style-name="Table1.A2" office:value-type="string">
            <text:p text:style-name="P410"/>
          </table:table-cell>
          <table:table-cell table:style-name="Table1.D2" office:value-type="string">
            <text:p text:style-name="P424">Added msg F<text:span text:style-name="T647">L</text:span>016 when no data exists on selecting option C,D,3,4.</text:p>
          </table:table-cell>
        </table:table-row>
        <table:table-row>
          <table:table-cell table:style-name="Table1.A2" office:value-type="string">
            <text:p text:style-name="P414">06/02/2019</text:p>
          </table:table-cell>
          <table:table-cell table:style-name="Table1.A2" office:value-type="string">
            <text:p text:style-name="P414">vbc</text:p>
          </table:table-cell>
          <table:table-cell table:style-name="Table1.A2" office:value-type="string">
            <text:p text:style-name="P410"/>
          </table:table-cell>
          <table:table-cell table:style-name="Table1.D2" office:value-type="string">
            <text:p text:style-name="P425">Extra packages recommended was wrong the second should have been<text:span text:style-name="T639"> </text:span>ghost<text:span text:style-name="T434">script</text:span> and not printscript.</text:p>
          </table:table-cell>
        </table:table-row>
        <table:table-row>
          <table:table-cell table:style-name="Table1.A2" office:value-type="string">
            <text:p text:style-name="P415">19/09/2019</text:p>
          </table:table-cell>
          <table:table-cell table:style-name="Table1.A2" office:value-type="string">
            <text:p text:style-name="P415">vbc</text:p>
          </table:table-cell>
          <table:table-cell table:style-name="Table1.A2" office:value-type="string">
            <text:p text:style-name="P415">2.02.08</text:p>
          </table:table-cell>
          <table:table-cell table:style-name="Table1.D2" office:value-type="string">
            <text:p text:style-name="P415">Cleared out 2 bugs, monthly totals with junk at end of line when using options 3 &amp; 4 and bug #5. More comments regarding hidden options 3 and 4.</text:p>
          </table:table-cell>
        </table:table-row>
        <table:table-row>
          <table:table-cell table:style-name="Table1.A2" office:value-type="string">
            <text:p text:style-name="P416">19/11/2019</text:p>
          </table:table-cell>
          <table:table-cell table:style-name="Table1.A2" office:value-type="string">
            <text:p text:style-name="P416">vbc</text:p>
          </table:table-cell>
          <table:table-cell table:style-name="Table1.A2" office:value-type="string">
            <text:p text:style-name="P410"/>
          </table:table-cell>
          <table:table-cell table:style-name="Table1.D2" office:value-type="string">
            <text:p text:style-name="P416">Fixing typos in manual.<text:span text:style-name="T673"> Fix bugs see Changelog for info.</text:span></text:p>
          </table:table-cell>
        </table:table-row>
        <table:table-row>
          <table:table-cell table:style-name="Table1.A2" office:value-type="string">
            <text:p text:style-name="P417">17/08/2022</text:p>
          </table:table-cell>
          <table:table-cell table:style-name="Table1.A2" office:value-type="string">
            <text:p text:style-name="P417">vbc</text:p>
          </table:table-cell>
          <table:table-cell table:style-name="Table1.A2" office:value-type="string">
            <text:p text:style-name="P417">2.02.12</text:p>
          </table:table-cell>
          <table:table-cell table:style-name="Table1.D2" office:value-type="string">
            <text:p text:style-name="P417">Added option to print running totals after each month totals. Created pilot name detail file holding the reporting details for name, licence etc that can be updated/changed each time and auto saved.<text:span text:style-name="T703"> changes README, UPDATES.</text:span></text:p>
            <text:p text:style-name="P418">Updated the notes regarding getting the Cobol compiler.</text:p>
          </table:table-cell>
        </table:table-row>
        <table:table-row>
          <table:table-cell table:style-name="Table1.A2" office:value-type="string">
            <text:p text:style-name="P419">17/11/2023</text:p>
          </table:table-cell>
          <table:table-cell table:style-name="Table1.A2" office:value-type="string">
            <text:p text:style-name="P419">vbc</text:p>
          </table:table-cell>
          <table:table-cell table:style-name="Table1.A2" office:value-type="string">
            <text:p text:style-name="P410"/>
          </table:table-cell>
          <table:table-cell table:style-name="Table1.D2" office:value-type="string">
            <text:p text:style-name="P419">Updated CR for 2024 - yes I know still a month to go but just in case I forget.</text:p>
            <text:p text:style-name="P419">Check details for obtaining the GnuCOBOL compiler etc.</text:p>
          </table:table-cell>
        </table:table-row>
        <table:table-row>
          <table:table-cell table:style-name="Table1.A2" office:value-type="string">
            <text:p text:style-name="P420">23/09/2025</text:p>
          </table:table-cell>
          <table:table-cell table:style-name="Table1.A2" office:value-type="string">
            <text:p text:style-name="P420">vbc</text:p>
          </table:table-cell>
          <table:table-cell table:style-name="Table1.A2" office:value-type="string">
            <text:p text:style-name="P410"/>
          </table:table-cell>
          <table:table-cell table:style-name="Table1.D2" office:value-type="string">
            <text:p text:style-name="P420">Updated CR for 2026<text:span text:style-name="T727"> and increased this table</text:span>.</text:p>
          </table:table-cell>
        </table:table-row>
        <table:table-row>
          <table:table-cell table:style-name="Table1.A2" office:value-type="string">
            <text:p text:style-name="P420"/>
          </table:table-cell>
          <table:table-cell table:style-name="Table1.A2" office:value-type="string">
            <text:p text:style-name="P420"/>
          </table:table-cell>
          <table:table-cell table:style-name="Table1.A2" office:value-type="string">
            <text:p text:style-name="P410"/>
          </table:table-cell>
          <table:table-cell table:style-name="Table1.D2" office:value-type="string">
            <text:p text:style-name="P420"/>
          </table:table-cell>
        </table:table-row>
        <text:soft-page-break/>
        <table:table-row>
          <table:table-cell table:style-name="Table1.A2" office:value-type="string">
            <text:p text:style-name="P420"/>
          </table:table-cell>
          <table:table-cell table:style-name="Table1.A2" office:value-type="string">
            <text:p text:style-name="P420"/>
          </table:table-cell>
          <table:table-cell table:style-name="Table1.A2" office:value-type="string">
            <text:p text:style-name="P410"/>
          </table:table-cell>
          <table:table-cell table:style-name="Table1.D2" office:value-type="string">
            <text:p text:style-name="P420"/>
          </table:table-cell>
        </table:table-row>
        <table:table-row>
          <table:table-cell table:style-name="Table1.A2" office:value-type="string">
            <text:p text:style-name="P420"/>
          </table:table-cell>
          <table:table-cell table:style-name="Table1.A2" office:value-type="string">
            <text:p text:style-name="P420"/>
          </table:table-cell>
          <table:table-cell table:style-name="Table1.A2" office:value-type="string">
            <text:p text:style-name="P410"/>
          </table:table-cell>
          <table:table-cell table:style-name="Table1.D2" office:value-type="string">
            <text:p text:style-name="P420"/>
          </table:table-cell>
        </table:table-row>
      </table:table>
      <text:p text:style-name="P426"/>
      <text:h text:style-name="P655" text:outline-level="1"><text:bookmark-start text:name="__RefHeading___Toc10437_694440486"/>Introduction<text:bookmark-end text:name="__RefHeading___Toc10437_694440486"/></text:h>
      <text:p text:style-name="P622"/>
      <text:p text:style-name="P263">The Flight<text:span text:style-name="T591">l</text:span>og <text:span text:style-name="T48">software </text:span>allows <text:span text:style-name="T84">all</text:span><text:span text:style-name="T366"> <text:s/>flight crews, P</text:span>ilots, <text:span text:style-name="T48">F</text:span>light <text:span text:style-name="T48">E</text:span>ngineers, <text:span text:style-name="T48">REO</text:span>’s and other GIB’<text:span text:style-name="T54">s</text:span> <text:span text:style-name="T20">etc,</text:span> to record their flight time in a unified location namely their computer, <text:span text:style-name="T20">regardless of platform, i.e., Linux, OSX, and other *nix systems as well as Windows.</text:span></text:p>
      <text:p text:style-name="P263"/>
      <text:p text:style-name="P263">This is the only purpose of Flightlog, it does not do other functions such as flight planning, weight <text:span text:style-name="T542">&amp;</text:span> balance etc. as there are plenty of tools around if needed, to help do these functions.</text:p>
      <text:p text:style-name="P289"/>
      <text:p text:style-name="P455">This version <text:span text:style-name="T623">of Flightlog </text:span>was created in 1986 and has been in operation ever since<text:span text:style-name="T663">,</text:span> on a range of different computers. It has undergone some significant upgrades over the last <text:span text:style-name="T663">year or so</text:span> to improve and provide extra functionality including the import of airline and other commercial operators supplied flight log information so that the need to actually enter flights is reduced.<text:span text:style-name="T663"> This was previously done with a separate program.</text:span></text:p>
      <text:p text:style-name="P289"/>
      <text:p text:style-name="P454">The <text:span text:style-name="T596">free </text:span>OS (Open Source) version allows users to <text:span text:style-name="T548">build and i</text:span>nstall <text:span text:style-name="T548">Flightlog having</text:span> <text:span text:style-name="T548">also installed (or built) </text:span>the free Cobol compiler <text:span text:style-name="T548">GnuCOBOL.</text:span> <text:span text:style-name="T542">This is free as in beer, too.</text:span></text:p>
      <text:p text:style-name="P263"/>
      <text:p text:style-name="P263"><text:span text:style-name="T20">For detailed instructions on doing this, see chapter </text:span><text:span text:style-name="T20"><text:bookmark-ref text:reference-format="chapter" text:ref-name="__RefHeading___Toc1109_2548604501">10</text:bookmark-ref></text:span><text:span text:style-name="T20"><text:s/></text:span><text:span text:style-name="T20"><text:bookmark-ref text:reference-format="text" text:ref-name="__RefHeading___Toc1109_2548604501"> Appendix C – Installing the Cobol Compiler</text:bookmark-ref></text:span><text:span text:style-name="T20"><text:s text:c="2"/>page </text:span><text:span text:style-name="T20"><text:bookmark-ref text:reference-format="page" text:ref-name="__RefHeading___Toc1109_2548604501">70</text:bookmark-ref></text:span><text:span text:style-name="T20"><text:s/>onwards along with instructions for installing Flightlog executables and other useful tools for the reports. </text:span></text:p>
      <text:p text:style-name="P263"/>
      <text:p text:style-name="P722">While normal usage is via a desktop, laptop or notebook it is also possible to run it on a tablet providing you can install the GCC C compiler and the various tools related to it and then build and install the Cobol compiler and yes I have even tried it on a mobile phone but have no intention of using it as screen too small for my eyes but do sometimes use a notebook ( very small laptop) and copy over the updated data files to my desktop.</text:p>
      <text:p text:style-name="P722"/>
      <text:p text:style-name="P722">There is nothing stopping you storing the data files in the cloud where you access them on all computers if you have a need.</text:p>
      <text:p text:style-name="P258"/>
      <text:p text:style-name="P258"/>
      <text:h text:style-name="P660" text:outline-level="2"><text:bookmark-start text:name="__RefHeading___Toc18869_2548604501"/>Overview <text:span text:style-name="T435">of Flightlog</text:span><text:bookmark-end text:name="__RefHeading___Toc18869_2548604501"/></text:h>
      <text:p text:style-name="P248"/>
      <text:h text:style-name="P685" text:outline-level="3"><text:bookmark-start text:name="__RefHeading___Toc11708_573098382"/>Flightlog Facilities and Overview<text:bookmark-end text:name="__RefHeading___Toc11708_573098382"/></text:h>
      <text:p text:style-name="P641"/>
      <text:p text:style-name="P68">The <text:span text:style-name="T50">Flightlog </text:span>software supports <text:span text:style-name="T402">P</text:span>rivate, <text:span text:style-name="T402">C</text:span>ommercial <text:span text:style-name="T727">(ATPL &amp; CPL) </text:span>and <text:span text:style-name="T402">M</text:span>ilitary pilots as well other crew members such as <text:span text:style-name="T595">F</text:span>light <text:span text:style-name="T595">E</text:span>ngineers, <text:span text:style-name="T595">R</text:span>adar <text:span text:style-name="T663">targeting</text:span> <text:span text:style-name="T595">O</text:span>fficers also known <text:span text:style-name="T51">(mostly by pilots) </text:span>as <text:span text:style-name="T647">GIB</text:span>’<text:span text:style-name="T51">s, Navigators, Radio Officers etc.,</text:span> <text:span text:style-name="T544">all</text:span> with their own capacity designators. Therefore for crew moving over <text:span text:style-name="T595">to a different role on the flight deck, </text:span>say to becoming pilots etc, the same <text:span text:style-name="T51">F</text:span>lightlog system can be used to record all <text:span text:style-name="T348">of their </text:span>flights. <text:span text:style-name="T597">Flightlog supports flight operations using all aircraft types, i.e., fixed wing, rotor (helicopters, giro's), gliders etc.</text:span></text:p>
      <text:p text:style-name="P68"/>
      <text:p text:style-name="P68">For reports, a listing of all flights or between two dates <text:span text:style-name="T46">with an option of totals by month</text:span>, <text:span text:style-name="T46">listings of all airfields visited, all aircraft types flown both with dates last visited or used. There is an option to restrict the report of airfields to only those that have been entered in a flight log record, i.e., you have flown it.</text:span></text:p>
      <text:p text:style-name="P68"/>
      <text:p text:style-name="P68">In addition, an option<text:span text:style-name="T52">al</text:span> short report containing CoE (<text:span text:style-name="T663">C</text:span>ertificates of <text:span text:style-name="T663">E</text:span>xperience) for the following periods, 1, 3, 6 and 13 months which can be passed to the examiner as a separate sheet along with an aircraft type report <text:span text:style-name="T438">when needed</text:span>. <text:span text:style-name="T314">This is created after accepting a start date for which Flightlog looks at flight records and counts backwards for the various month periods.</text:span></text:p>
      <text:p text:style-name="P68"/>
      <text:p text:style-name="P68">So a CoE for one month counts backward from the entered date for one whole month. Likewise for the other periods producing a report line for each one in turn. Sa<text:span text:style-name="T348">v</text:span>e<text:span text:style-name="T348">s</text:span> trying to count the totals in your log book/s. Just provide th<text:span text:style-name="T370">e CoE</text:span> report page along with the aircraft type report so that the examiner can easily check and then sign <text:span text:style-name="T348">and stamp</text:span> your license or paper log book.</text:p>
      <text:p text:style-name="P68"/>
      <text:p text:style-name="P68">Of course this does not avoid the requirement for type ratings every six months (I wish) <text:span text:style-name="T370">but as Flightlog</text:span><text:span text:style-name="T727">,</text:span><text:span text:style-name="T370"> records flights by aircraft types it does help to validate such</text:span>.</text:p>
      <text:p text:style-name="P68"/>
      <text:p text:style-name="P68">Flightlog can also be used to record <text:span text:style-name="T348">f</text:span>light simulator training conducted in an approved trainer or software package <text:span text:style-name="T348">and here use the aircraft type to show the simulator used along with the remarks field to specify the process or procedures conducted.</text:span></text:p>
      <text:p text:style-name="P68"/>
      <text:p text:style-name="P100">Now ‘Approved’ does depend on your licensing authority and you need to contact them for what is approved but 3 and 2 axis simulators should be there. For ma<text:span text:style-name="T400">n</text:span>y authorities, single <text:span text:style-name="T400">axis</text:span><text:span text:style-name="T727"> and even </text:span>D-Link <text:span text:style-name="T371">(D-4)</text:span> is also <text:span text:style-name="T727">OK</text:span>. <text:span text:style-name="T371">Software based simulators may be a bit more difficult as it does depend on what is being practised and using what facilities etc., and here I would suggest that only using a keyboard is not going to cut it, so a wheel/stick and pedals are kind of important as well as a printed log / report of what processes and procedures was conducted and these should be retained. Very useful for refresh of specific airport IFR arrival, departure procedures and routes.</text:span></text:p>
      <text:p text:style-name="P68"/>
      <text:p text:style-name="P68"><text:bookmark-start text:name="__RefHeading___Toc16583_2548604501"/>Likewise emergency procedures for specific a/c types although a 3 axis simulator would be some what better <text:span text:style-name="T727">although that said I do use a fixed 737-800NG sim for practice and refresh training etc., and yes it looks and behaves like the real aircraft just a lot cheaper to use.</text:span><text:bookmark-end text:name="__RefHeading___Toc16583_2548604501"/></text:p>
      <text:p text:style-name="P68"/>
      <text:p text:style-name="P68"/>
      <text:h text:style-name="Heading_20_3" text:outline-level="3"><text:bookmark-start text:name="__RefHeading___Toc13742_573098382"/>Flightlog sources<text:bookmark-end text:name="__RefHeading___Toc13742_573098382"/></text:h>
      <text:p text:style-name="Text_20_body"/>
      <text:p text:style-name="P76">Flightlog is supplied as Open Source, that is the source for the program is included <text:span text:style-name="T544">and is supplied totally free of any charges</text:span><text:span text:style-name="T718"> for use on as many computers as you need.</text:span></text:p>
      <text:p text:style-name="P101"/>
      <text:p text:style-name="P76"><text:soft-page-break/>If you cannot find a<text:span text:style-name="T475">n</text:span> archive containing the executable copy of Flightlog then you can install the free GnuCOBOL compiler <text:span text:style-name="T544">as </text:span>sources, build and install it on your computer the<text:span text:style-name="T475">n</text:span> compile / build Flightlog and install on your computer ready to use. See Appendix <text:span text:style-name="T490">D</text:span> and onwards for detailed instructions to do this. <text:span text:style-name="T475">Note that any updates to Flightlog will have to be compiled again before use.</text:span></text:p>
      <text:p text:style-name="P76"/>
      <text:p text:style-name="P102">If you run under Linux or similar, one option instead of downloading and building the Cobol compiler is to install it via your <text:span text:style-name="T718">distributions </text:span>software<text:span text:style-name="T718"> </text:span>manager, which if nothing else will install the extra packages required for it. <text:s/>If the version of the installed Cobol compiler is very old such as <text:s/>version 1 <text:span text:style-name="T596">or 1.1</text:span> releases, you can install it (which will also install the required packages) then <text:span text:style-name="T648">only </text:span>uninstall <text:span text:style-name="T648">the compiler</text:span> which should leave the extra packages present and therefore saving some extra steps <text:span text:style-name="T596">and this does work for Ubuntu, Debian and most if not all, Redhat variations</text:span>.<text:span text:style-name="T718"> This trick may not work for some distributions as all element may be linked together.</text:span></text:p>
      <text:p text:style-name="P102"/>
      <text:p text:style-name="P102">Note that here, the current full release is v3.<text:span text:style-name="T704">2</text:span> <text:span text:style-name="T718">and </text:span>is available from their website</text:p>
      <text:p text:style-name="P103">see <text:bookmark-ref text:reference-format="chapter" text:ref-name="__RefHeading___Toc1109_2548604501">10</text:bookmark-ref><text:s/><text:bookmark-ref text:reference-format="text" text:ref-name="__RefHeading___Toc1109_2548604501"> Appendix C – Installing the Cobol Compiler</text:bookmark-ref><text:s/>page <text:bookmark-ref text:reference-format="page" text:ref-name="__RefHeading___Toc1109_2548604501">70</text:bookmark-ref><text:s/>for details.</text:p>
      <text:p text:style-name="P76"/>
      <text:p text:style-name="P76"/>
      <text:h text:style-name="Heading_20_3" text:outline-level="3"><text:bookmark-start text:name="__RefHeading___Toc13744_573098382"/>Registration <text:span text:style-name="T598">of Flightlog</text:span><text:bookmark-end text:name="__RefHeading___Toc13744_573098382"/></text:h>
      <text:p text:style-name="Text_20_body"/>
      <text:p text:style-name="P76">While Flightlog is supplied as free <text:span text:style-name="T545">(as in beer) with</text:span> <text:span text:style-name="T596">the (</text:span>open<text:span text:style-name="T596">)</text:span> source, it is appreciated that some users would prefer to have a full update and support service just like any other piece of software they <text:span text:style-name="T596">use</text:span>. This is where you can register your use of Flightlog with <text:span text:style-name="T728">me</text:span> and <text:span text:style-name="T596">optionally </text:span>for a small fee get updates and support when required. See the inside front cover of this manual for the contact email address<text:span text:style-name="T476">es</text:span> for doing so.</text:p>
      <text:p text:style-name="P97"/>
      <text:p text:style-name="P97">All users are encouraged to register their use of the software regardless of requiring the support and update service and doing so, will show <text:span text:style-name="T704">me</text:span> the number of users and the computer platforms (Linux, OSX, Windows, etc.) used.<text:span text:style-name="T648"> Your information will NOT be passed on to any one, period.</text:span></text:p>
      <text:p text:style-name="P76"/>
      <text:p text:style-name="P76"><text:span text:style-name="T545">See section</text:span> <text:bookmark-ref text:reference-format="chapter" text:ref-name="__RefHeading___Toc19015_2548604501">12</text:bookmark-ref><text:s/><text:bookmark-ref text:reference-format="text" text:ref-name="__RefHeading___Toc19015_2548604501">Appendix R -  Registering Flightlog</text:bookmark-ref><text:s/><text:span text:style-name="T545">on page</text:span> <text:bookmark-ref text:reference-format="page" text:ref-name="__RefHeading___Toc19015_2548604501">87</text:bookmark-ref><text:s text:c="2"/><text:span text:style-name="T545">that </text:span>cover<text:span text:style-name="T438">s</text:span> this, i<text:span text:style-name="T545">n</text:span> more detail.</text:p>
      <text:p text:style-name="P288"/>
      <text:h text:style-name="P686" text:outline-level="3"/>
      <text:h text:style-name="P688" text:outline-level="3"><text:bookmark-start text:name="__RefHeading___Toc11710_573098382"/>Files used<text:bookmark-end text:name="__RefHeading___Toc11710_573098382"/></text:h>
      <text:p text:style-name="Text_20_body"/>
      <text:p text:style-name="P248">Flightlog <text:span text:style-name="T314">is a user specific tool and </text:span>u<text:span text:style-name="T728"> </text:span>ses <text:span text:style-name="T704">four</text:span> <text:span text:style-name="T49">primary </text:span>files per user <text:span text:style-name="T401">in one directory </text:span>namely :</text:p>
      <text:p text:style-name="P248"/>
      <text:p text:style-name="P248">1. <text:s/><text:span text:style-name="T21">A</text:span>ircraft : <text:span text:style-name="T648"><text:s/></text:span><text:span text:style-name="T718"><text:tab/></text:span><text:span text:style-name="T648">T</text:span>o record aircraft types <text:span text:style-name="T49">flown</text:span>, last registration flown and the last flight date.</text:p>
      <text:p text:style-name="P248">2. <text:s/><text:span text:style-name="T21">A</text:span>irfield : <text:s/><text:span text:style-name="T718"><text:tab/></text:span><text:span text:style-name="T160">T</text:span>o record the <text:span text:style-name="T665">ICAO</text:span> coded airfield with the name, date last used <text:span text:style-name="T591">&amp; usage count</text:span>.</text:p>
      <text:p text:style-name="P309">3. <text:span text:style-name="T724"><text:s/></text:span><text:span text:style-name="T21">F</text:span>litelog : <text:span text:style-name="T718"><text:tab/></text:span><text:span text:style-name="T160">T</text:span>o record all flight details including date, start and end times, <text:span text:style-name="T21">airfields used, flight</text:span></text:p>
      <text:p text:style-name="P309"><text:span text:style-name="T718"><text:tab/><text:tab/></text:span><text:span text:style-name="T21">capacity, captains name and other details including flight by IFR and multi-engine</text:span></text:p>
      <text:p text:style-name="P309"><text:span text:style-name="T718"><text:tab/><text:tab/></text:span><text:span text:style-name="T21">etc.</text:span></text:p>
      <text:p text:style-name="P630">4. <text:span text:style-name="T724"><text:s/></text:span>Crew : <text:span text:style-name="T705"><text:s/></text:span><text:span text:style-name="T718"><text:tab/></text:span>To record the name details as entered for the report and can be updated for the</text:p>
      <text:p text:style-name="P630"><text:span text:style-name="T718"><text:tab/><text:tab/></text:span>next report.</text:p>
      <text:p text:style-name="P628"/>
      <text:p text:style-name="P370">These files, like a paper flight log book <text:span text:style-name="T437">are</text:span> for one user / crew member only, and therefore cannot be shared.</text:p>
      <text:p text:style-name="P370"/>
      <text:p text:style-name="P286">Clearly these file<text:span text:style-name="T437">s,</text:span> record the aircraft <text:span text:style-name="T367">and</text:span> airfields used as entered into Flightlog over the many more that exist in the world. <text:span text:style-name="T166">Note that the airfield file can be pre-loaded with every airfield in a country, continent or even the world but most if not all pilots only use a very small fraction even within one country so this is not included as a standard option but you can use the CSV data file processing to create one see later (</text:span><text:span text:style-name="T166"><text:bookmark-ref text:reference-format="chapter" text:ref-name="__RefHeading___Toc14526_2548604501">6.10</text:bookmark-ref></text:span><text:span text:style-name="T166"> and </text:span><text:span text:style-name="T166"><text:bookmark-ref text:reference-format="chapter" text:ref-name="__RefHeading___Toc1039_2548604501">7</text:bookmark-ref></text:span><text:span text:style-name="T166">).</text:span></text:p>
      <text:p text:style-name="P248"/>
      <text:p text:style-name="P304">The<text:span text:style-name="T705"> first three </text:span>files <text:span text:style-name="T592">(</text:span>that have the extension of dat<text:span text:style-name="T592">)</text:span>, <text:span text:style-name="T54">hold their data in an indexed file structure to keep the speed of access as fast as possible by only accessing the required record/s.</text:span></text:p>
      <text:p text:style-name="P631">The last one holds the crew members details as printed on the reports as entered or amended.</text:p>
      <text:p text:style-name="P304"><text:span text:style-name="T54">Depending on the file handler used for the compiler, you might also have </text:span><text:span text:style-name="T705">up to four</text:span><text:span text:style-name="T54"> files with *.dat.dd</text:span><text:span text:style-name="T718"> </text:span><text:span text:style-name="T54">as well. <text:s/>You can ignore these, as size is under 50 bytes each. They are used with the Oracle Berkeley file handler libraries</text:span><text:span text:style-name="T705"> under some conditions depending on version of the library</text:span><text:span text:style-name="T54">.</text:span></text:p>
      <text:p text:style-name="P642">Again it is possible to also have three extra files with the extension of .idx and these only hold the indexes and these are linked to the data files, this can occur when using some file handlers.</text:p>
      <text:p text:style-name="P266"/>
      <text:p text:style-name="P506">Disk storage wise, the requirements is very modest :<text:span text:style-name="T718"> </text:span></text:p>
      <text:p text:style-name="P506"/>
      <text:p text:style-name="P506"><text:span text:style-name="T592">A</text:span>irfield file<text:span text:style-name="T704">,</text:span> record size is <text:span text:style-name="T592">48</text:span> bytes <text:span text:style-name="T543">and holds one airfield</text:span>.</text:p>
      <text:p text:style-name="P506"><text:span text:style-name="T592">A</text:span>ircraft file<text:span text:style-name="T704">,</text:span> record size is 24 bytes <text:span text:style-name="T543">and holds the details of one aircraft type</text:span>.</text:p>
      <text:p text:style-name="P506"><text:span text:style-name="T592">F</text:span>litelog file<text:span text:style-name="T704">,</text:span> record size is 112 bytes <text:span text:style-name="T543">and hold the details of one flight</text:span>.</text:p>
      <text:p text:style-name="P629">Crew file, record<text:span text:style-name="T705"> / file</text:span> size is <text:span text:style-name="T705">40 bytes and holds </text:span>one record <text:span text:style-name="T705">with the </text:span>crew members details</text:p>
      <text:p text:style-name="P628"/>
      <text:p text:style-name="P507">A byte is the equivalent of one character <text:span text:style-name="T592">in size</text:span>.</text:p>
      <text:p text:style-name="P506"/>
      <text:p text:style-name="P506">So for a 30,000 hour pilot, say with the same number of flights (it would be less, and very much so, for long haul) is under <text:span text:style-name="T664">32</text:span> MB (megabytes) with the other two only adding at most, say 2 Mb. <text:s/>There is also the size of the indexes but lets assume a<text:span text:style-name="T475">n</text:span> extra <text:span text:style-name="T592">1</text:span>0% so all in all, total size would be under <text:span text:style-name="T664">40</text:span>MB. A very small amount that could be backed up on to a memory stick, SD card or even your mobile phone or tablet.<text:span text:style-name="T648"> A Megabyte is equal to a million bytes or characters.</text:span></text:p>
      <text:p text:style-name="P266"/>
      <text:p text:style-name="P515">In addition to these <text:span text:style-name="T705">four</text:span> files, there is a menu option that allows you to <text:span text:style-name="T705">all </text:span>copy <text:span text:style-name="T705">the three</text:span> <text:span text:style-name="T705">primary <text:s/></text:span><text:span text:style-name="T718">files </text:span>to a line sequential <text:span text:style-name="T664">(text) </text:span>file which allows all files to be transferred to another computer system, platform or even Cobol compiler with minimum issues. These sequential files can be examined if really needed, using any text editor or system command like ‘less’ or ‘cat’ in *Nix (Linux, Mac OSX, BSD or Unix) or ‘type’ in Windows or via a file manager but you <text:span text:style-name="T648">should</text:span> not change them. Likewise if running Flightlog in a mainframe environment there are also plenty of <text:soft-page-break/>tools, one can use to view the records.<text:span text:style-name="T705"> The last file</text:span><text:span text:style-name="T718">,</text:span><text:span text:style-name="T705"> Crew can be recreated just by entering the crew members details </text:span><text:span text:style-name="T718">requested when printing for </text:span><text:span text:style-name="T705">the first time.</text:span></text:p>
      <text:p text:style-name="P258"/>
      <text:p text:style-name="P258"><text:span text:style-name="T54">Normally these three sequential files do </text:span><text:span text:style-name="T29">not</text:span><text:span text:style-name="T54"> need to ever be read by a user – they are there for the two reasons indicated above, i.e., back up or as migration should you ever wish to move to another system or more likely the sub system used with the GnuCOBOL compiler that handles indexed files of which there is at least four different one’s, all with their own ways of storing data and they are </text:span><text:span text:style-name="T29">not</text:span><text:span text:style-name="T54"> compatible. You cannot start using the data files produced from one with another without a migration process such as using the sequential files as input to Flightlog to create the indexed files. Therefore moving from one system to another is to create the sequential files via the menu options. More on this later in the manual.</text:span></text:p>
      <text:p text:style-name="P293"/>
      <text:p text:style-name="P293"/>
      <text:h text:style-name="Heading_20_3" text:outline-level="3"><text:bookmark-start text:name="__RefHeading___Toc11712_573098382"/>Backing up the Flightlog files<text:bookmark-end text:name="__RefHeading___Toc11712_573098382"/></text:h>
      <text:p text:style-name="Text_20_body"/>
      <text:p text:style-name="P287"><text:span text:style-name="T437">All of these files, should</text:span> be backed up after a session <text:span text:style-name="T160">of data entry</text:span> and it is recommended to use an arch<text:span text:style-name="T49">iv</text:span>ing program such as ZIP, RAR or for *nix system<text:span text:style-name="T49">s,</text:span> tar. The archive name should be say, <text:span text:style-name="T49">something similar to </text:span><text:s text:c="2"/>backup-yyyy-mm-dd.ext where ext is zip, rar, or tar and <text:span text:style-name="T475">the </text:span>date is <text:span text:style-name="T592">the </text:span>date of <text:span text:style-name="T592">the </text:span>last flight <text:span text:style-name="T593">enter</text:span>ed. Here, see <text:span text:style-name="T475">the </text:span>sample script<text:span text:style-name="T593">s</text:span> for running the <text:span text:style-name="T54">F</text:span>lightlog program <text:span text:style-name="T594">using dates for the UK, USA and International formats styles. See </text:span><text:span text:style-name="T594"><text:bookmark-ref text:reference-format="chapter" text:ref-name="__RefHeading___Toc19843_2548604501">11.5</text:bookmark-ref></text:span><text:span text:style-name="T594"><text:s/></text:span><text:span text:style-name="T594"><text:bookmark-ref text:reference-format="text" text:ref-name="__RefHeading___Toc19843_2548604501">Preparation for running Flightlog</text:bookmark-ref></text:span><text:span text:style-name="T594"><text:s/>page </text:span><text:span text:style-name="T594"><text:bookmark-ref text:reference-format="page" text:ref-name="__RefHeading___Toc19843_2548604501">83</text:bookmark-ref></text:span><text:span text:style-name="T594"><text:s/>for more details on this</text:span><text:span text:style-name="T718"> but note</text:span><text:span text:style-name="T729">,</text:span><text:span text:style-name="T718"> these scripts are for *Nix type systems and for Windows using the Linux sub system</text:span><text:span text:style-name="T729"> (WSL)</text:span><text:span text:style-name="T718"> again</text:span><text:span text:style-name="T729">,</text:span><text:span text:style-name="T718"> see the above section for more information.</text:span><text:span text:style-name="T594">.</text:span></text:p>
      <text:p text:style-name="P287"/>
      <text:h text:style-name="P652" text:outline-level="1"/>
      <text:h text:style-name="P655" text:outline-level="1"><text:bookmark-start text:name="__RefHeading___Toc10561_694440486"/>Pre-<text:span text:style-name="T47">O</text:span>perations<text:bookmark-end text:name="__RefHeading___Toc10561_694440486"/></text:h>
      <text:p text:style-name="P621"/>
      <text:h text:style-name="Heading_20_2" text:outline-level="2"><text:bookmark-start text:name="__RefHeading___Toc13746_573098382"/>Preparations before using Flightlog<text:bookmark-end text:name="__RefHeading___Toc13746_573098382"/></text:h>
      <text:p text:style-name="Text_20_body"/>
      <text:p text:style-name="P289"><text:span text:style-name="T315">I</text:span>n order to <text:span text:style-name="T402">help </text:span>validate data entered using <text:span text:style-name="T53">F</text:span>lightlog, your primary log book<text:span text:style-name="T55">s</text:span> need to be totalled on each page with counts <text:span text:style-name="T439">shown</text:span> for brought forward and carried forward figures, e.g., totals at the top and bottom of each page for all <text:span text:style-name="T161">flight capacities such as </text:span>P1, P2 <text:span text:style-name="T161">etc,</text:span> day and night, instrument/IFR &amp; multi engine <text:span text:style-name="T315">etc,</text:span> if so rated, <text:span text:style-name="T52">but you should be doing this for your own usage to avoid mistakes and for CoE records anyway. If you also total by month – assuming you fly often enough for it, then these figures too can be compared to the monthly computed figures from Flightlog.</text:span></text:p>
      <text:p text:style-name="P559">Doing so, <text:s/>you can verify the entered data and last entry report totals against your log books to confirm data has been correctly entered. If not, it just a case of selecting the menu option of ‘Amend Log book’ and change the element/s in error<text:span text:style-name="T706">,</text:span> having spotted what the discrepancies are, and most likely<text:span text:style-name="T718">,</text:span> they will be an equal lower total on one column <text:span text:style-name="T665">say P1 </text:span>and the same amount higher in another<text:span text:style-name="T665"> such as P2</text:span>, again more on this later in this manual.</text:p>
      <text:p text:style-name="P248"/>
      <text:p text:style-name="P290">These <text:span text:style-name="T161">above mentioned </text:span>totals, are produced by <text:span text:style-name="T161">Flightlog</text:span> on the report listing by month <text:span text:style-name="T53">(menu option D) and at the start and end of each report page, </text:span>so you can verify all flight data entered to match your paper log books. Where you have more than one log book, only enter them one at a time and in date order <text:span text:style-name="T315">when possible </text:span>by log book if you can, i.e., starting with the oldest book first. <text:s/>It does not matter if dates are not in order other than to help confirm valid data by comparing the totals by <text:span text:style-name="T161">log book </text:span>page <text:span text:style-name="T371">and option C, D (or F to just display) reports, see figure 2 for an example. </text:span></text:p>
      <text:p text:style-name="P372"/>
      <text:p text:style-name="P372">Personally, I checked after each completed log book page when entering historic data (from old log books) to validate the totals as I have found it saves a lot of time if I do make a mistake, so I stop data entry, run option F and if needed D, then use another virtual screen and examine the logbook.rpt file by going close to the end of the report, for the last set of totals and use this to match against the paper log book. Often using option F to display the closing totals is enough to indicate if there is a problem and then, if needed use D for a full report. However it does sometimes show up errors in my mental arithmetic during log book totalling :). Maybe, I should stop entering flight info into my flight books, on a long, getting boring flight<text:span text:style-name="T665">s</text:span>? And yes I do maintain master log books that never leave the house.</text:p>
      <text:p text:style-name="P248"/>
      <text:p text:style-name="P294">Some minor but important points, do not do <text:span text:style-name="T546">major </text:span>data entry when tired or when getting that way<text:span text:style-name="T665">,</text:span> so just do <text:span text:style-name="T162">1</text:span> – <text:span text:style-name="T599">2</text:span> log book pages at a time<text:span text:style-name="T162">. This I f</text:span>ound, when entering my <text:span text:style-name="T349">own log </text:span>books in<text:span text:style-name="T55">to the system and yes I have over </text:span><text:span text:style-name="T706">sev</text:span><text:span text:style-name="T55">e</text:span><text:span text:style-name="T706">n</text:span><text:span text:style-name="T55"> books. I have also been known to use flying diaries which has log book pages at the back (from IALPA and others, just for rough notes on flights) which at some time I then update my main log books when I remember, or more likely when I have a check coming up. <text:s/>When working for a couple of airlines they provide</text:span><text:span text:style-name="T706">d</text:span><text:span text:style-name="T55"> flight log data and this I entered into Flightlog using the CSV input menu option but alas</text:span><text:span text:style-name="T729">,</text:span><text:span text:style-name="T55"> not all do this.</text:span></text:p>
      <text:p text:style-name="P574"/>
      <text:p text:style-name="P574">That said, it is now a lot easier just maintaining Flightlog data but I do believe in double record keeping as I have lost log books in the past and no doubt will again. Mostly moving homes !</text:p>
      <text:p text:style-name="P563">Flightlog actually dates back to 1976 when it was written in Basic but was totally rewritten in Cobol in the early 80’s so it has been around for <text:span text:style-name="T666">a long</text:span> time running <text:span text:style-name="T649">on</text:span> a range of different <text:span text:style-name="T649">computer </text:span>systems<text:span text:style-name="T649"> including IBM and ICL mainframes as different Flightlog versions, special for each system</text:span>.<text:span text:style-name="T729"> When micro computer first appeared in the late 70's I switched to using them and have ever since. Once or twice I have been asked to present my log book/s to the UK CAA and they get a shock when I turn up with a laptop or notebook :)</text:span></text:p>
      <text:h text:style-name="P655" text:outline-level="1"><text:bookmark-start text:name="__RefHeading___Toc1035_2548604501"/>Normal Flightlog Processes<text:bookmark-end text:name="__RefHeading___Toc1035_2548604501"/></text:h>
      <text:p text:style-name="Standard"/>
      <text:p text:style-name="P248"><text:span text:style-name="T371">All Flightlog functions are selected via the </text:span>menu.</text:p>
      <text:p text:style-name="P248"/>
      <text:p text:style-name="P248"><text:span text:style-name="T439">Menu options</text:span> only require the letter being entered, <text:span text:style-name="T666">i.e., no return key used. The </text:span>keys such as the Escape and function keys F1, 2, 3, 4, 5 and 10 <text:span text:style-name="T342">are </text:span>used within data entry or amend. There are other options within data entry <text:span text:style-name="T342">or amend</text:span> which are described in that section. These <text:span text:style-name="T342">function keys </text:span>help speed up data entry. <text:span text:style-name="T600">The program name and version number is shown top left of the screen along with the current date and time as set in your computer. This version number must always be used to report a defect / bug in the program along with your operating system (Windows, Linux, OSX, <text:s/>other *nix, OS/2 etc with its version).</text:span></text:p>
      <text:p text:style-name="P248"/>
      <text:p text:style-name="P371">Now to cover the <text:span text:style-name="T600">various </text:span>menu options and what they do.</text:p>
      <text:p text:style-name="P371"/>
      <text:p text:style-name="P254"><text:span text:style-name="T371">Looking at Figure 1 – Menu, </text:span>you can see <text:span text:style-name="T371">that it </text:span>provides access to the following functions where the first <text:span text:style-name="T371">one is the </text:span>primary one and the other<text:span text:style-name="T57">s,</text:span> on a<text:span text:style-name="T57">n</text:span> as needed basis </text:p>
      <text:p text:style-name="P248"/>
      <text:p text:style-name="P312"><draw:frame draw:style-name="fr3" draw:name="Image1" text:anchor-type="paragraph" svg:width="14.49cm" svg:height="11.571cm" draw:z-index="0"><draw:image xlink:href="Pictures/1000000000000352000002D4501DF203.jpg" xlink:type="simple" xlink:show="embed" xlink:actuate="onLoad" draw:mime-type="image/jpeg"/></draw:frame>Figure 1 Menu.</text:p>
      <text:p text:style-name="P248"/>
      <text:h text:style-name="Heading_20_2" text:outline-level="2"><text:bookmark-start text:name="__RefHeading___Toc13748_573098382"/>Menu Options and Functions<text:bookmark-end text:name="__RefHeading___Toc13748_573098382"/></text:h>
      <text:p text:style-name="P248"/>
      <text:p text:style-name="P248"><text:span text:style-name="T649">Here</text:span> is the <text:span text:style-name="T372">list of all menu functions with a brief description</text:span>:</text:p>
      <text:p text:style-name="P248"/>
      <text:p text:style-name="P248">A <text:s/>-<text:tab/>Enter Log Book Data<text:tab/><text:span text:style-name="T601">Used to enter your flight record data.</text:span></text:p>
      <text:p text:style-name="P291">B <text:s/>-<text:tab/>Amend Log Book Data<text:tab/><text:span text:style-name="T601">Amend a flight log record created from (A) or via </text:span><text:span text:style-name="T718">the </text:span><text:span text:style-name="T601">CSV</text:span></text:p>
      <text:p text:style-name="P560"><text:tab/><text:tab/><text:tab/><text:tab/><text:tab/>imported data.</text:p>
      <text:p text:style-name="P248">C <text:s/>-<text:tab/>Log Book Reports<text:tab/><text:tab/><text:span text:style-name="T58">Simple report of all flight entries or date selective.</text:span></text:p>
      <text:p text:style-name="P354"/>
      <text:p text:style-name="P303">D <text:s/>-<text:tab/>Log Book Report &amp; Monthly Analysis</text:p>
      <text:p text:style-name="P248"><text:tab/><text:tab/><text:tab/><text:tab/><text:tab/><text:span text:style-name="T58">Like (C) but includes monthly sub totals as well aircraft and</text:span></text:p>
      <text:p text:style-name="P248"><text:tab/><text:tab/><text:tab/><text:tab/><text:tab/>airfield reporting.</text:p>
      <text:p text:style-name="P248">E <text:s/>-<text:tab/>Analysis &amp; Totals Report<text:tab/><text:span text:style-name="T58">Like (D) but without flight data, i.e., Analysis only.</text:span></text:p>
      <text:p text:style-name="P291">F <text:s/>-<text:tab/>Analysis &amp; Totals Display<text:tab/><text:span text:style-name="T58">As for (E) but displayed only. Useful to validate totals <text:tab/>against</text:span></text:p>
      <text:p text:style-name="P561"><text:tab/><text:tab/><text:tab/><text:tab/><text:tab/>your paper log book.</text:p>
      <text:p text:style-name="P248">G <text:s/>-<text:tab/>Cert of Ext. Analysis Report</text:p>
      <text:p text:style-name="P248"><text:tab/><text:tab/><text:tab/><text:tab/><text:tab/><text:span text:style-name="T58">Will produce CoE (Certificate of Experience) details for</text:span></text:p>
      <text:p text:style-name="P291"><text:tab/><text:tab/><text:tab/><text:tab/><text:tab/>1, 3, 6 and 13 months <text:span text:style-name="T372">if flights go back that far. If any do not fit</text:span></text:p>
      <text:p text:style-name="P373"><text:tab/><text:tab/><text:tab/><text:tab/><text:tab/>within these periods the specific report line will be omitted.</text:p>
      <text:p text:style-name="P248">H <text:s/>-<text:tab/>Change Log Book Airfield <text:span text:style-name="T666">C</text:span>ode</text:p>
      <text:p text:style-name="P291"><text:tab/><text:tab/><text:tab/><text:tab/><text:tab/><text:span text:style-name="T58">Changes </text:span><text:span text:style-name="T28">all</text:span><text:span text:style-name="T58"> flight entry records replacing one airfield </text:span>(ICAO</text:p>
      <text:p text:style-name="P291"><text:tab/><text:tab/><text:tab/><text:tab/><text:tab/>code) for another <text:span text:style-name="T666">and</text:span> update the airfield record.</text:p>
      <text:p text:style-name="P248">J <text:s/>-<text:tab/>Change Log Book Aircraft Type</text:p>
      <text:p text:style-name="P291"><text:tab/><text:tab/><text:tab/><text:tab/><text:tab/><text:span text:style-name="T477">Change </text:span><text:span text:style-name="T28">all</text:span><text:span text:style-name="T58"> flight entry records for a specific aircraft type </text:span>as</text:p>
      <text:p text:style-name="P291"><text:tab/><text:tab/><text:tab/><text:tab/><text:tab/>well as the aircraft file. Useful when you entered <text:span text:style-name="T477">it </text:span>wrong</text:p>
      <text:p text:style-name="P291"><text:span text:style-name="T372"><text:tab/><text:tab/><text:tab/><text:tab/><text:tab/>during data entry</text:span> and only spotted it <text:span text:style-name="T601">years </text:span>later, i.e., PA28-235</text:p>
      <text:p text:style-name="P291"><text:tab/><text:tab/><text:tab/><text:tab/><text:tab/>should have been PA28-236.</text:p>
      <text:p text:style-name="P248"><text:tab/><text:tab/><text:tab/><text:tab/><text:tab/>Yes, got that tea shirt <text:span text:style-name="T316">and likewise for the odd heavy</text:span> :)</text:p>
      <text:p text:style-name="P248"><text:tab/><text:tab/><text:tab/><text:tab/><text:tab/><text:span text:style-name="T318">Wonder why this was included ?</text:span></text:p>
      <text:p text:style-name="P296"><text:span text:style-name="T350">K</text:span> <text:s/>-<text:tab/>Edit Airfield Name<text:tab/><text:tab/><text:span text:style-name="T350">For one or more airfields to Amend</text:span> <text:span text:style-name="T372">(</text:span>the name<text:span text:style-name="T372">)</text:span>, <text:span text:style-name="T666">also Insert,</text:span></text:p>
      <text:p text:style-name="P296"><text:span text:style-name="T666"><text:tab/><text:tab/><text:tab/><text:tab/><text:tab/>D</text:span>elete,<text:span text:style-name="T666"> V</text:span>iew or <text:span text:style-name="T350">L</text:span>ist <text:span text:style-name="T342">one or more </text:span>to print<text:span text:style-name="T372">ed</text:span> output.</text:p>
      <text:p text:style-name="P252">S <text:s/>-<text:tab/>Create Sequential files from ISAM</text:p>
      <text:p text:style-name="P291"><text:tab/><text:tab/><text:tab/><text:tab/><text:tab/>Create <text:span text:style-name="T317">transferable and </text:span>readable copies of all three <text:span text:style-name="T372">data files</text:span></text:p>
      <text:p text:style-name="P291"><text:span text:style-name="T372"><text:tab/><text:tab/><text:tab/><text:tab/><text:tab/>(indexed) to line sequential (text) data format</text:span>.</text:p>
      <text:p text:style-name="P360">T <text:s/>-<text:tab/>Import CSV <text:span text:style-name="T483">D</text:span>ata and <text:span text:style-name="T483">Parameters)</text:span></text:p>
      <text:p text:style-name="P367"><text:tab/><text:tab/><text:tab/><text:tab/><text:tab/><text:span text:style-name="T372">Import a company supplied file containing your flights flown</text:span></text:p>
      <text:p text:style-name="P375"><text:tab/><text:tab/><text:tab/><text:tab/><text:tab/>over a period of time provided in CSV format.</text:p>
      <text:p text:style-name="P360">U <text:s/>-<text:tab/>Enter User details for Reports</text:p>
      <text:p text:style-name="P291"><text:tab/><text:tab/><text:tab/><text:tab/><text:tab/><text:span text:style-name="T58">Although this information will be requested after you r</text:span>equest</text:p>
      <text:p text:style-name="P291"><text:tab/><text:tab/><text:tab/><text:tab/><text:tab/>options D through G this acts as one place to <text:span text:style-name="T319">do </text:span>the same.</text:p>
      <text:p text:style-name="P291"><text:tab/><text:tab/><text:tab/><text:tab/><text:tab/>Limited use but could be handy.</text:p>
      <text:p text:style-name="P292">X <text:s/>-<text:tab/>Quit <text:span text:style-name="T56">Log Book </text:span>System<text:tab/><text:span text:style-name="T351">Closes all files <text:s/>included print report and return to the O/S</text:span></text:p>
      <text:p text:style-name="P292"><text:span text:style-name="T351"><text:tab/><text:tab/><text:tab/><text:tab/><text:tab/></text:span>(operating system) <text:span text:style-name="T350">prompt</text:span>.</text:p>
      <text:p text:style-name="P374">The Escape key does the same as <text:span text:style-name="T439">the </text:span>‘X’ <text:span text:style-name="T439">key</text:span>.</text:p>
      <text:p text:style-name="P248"/>
      <text:p text:style-name="P591">Special hidden menu options:</text:p>
      <text:p text:style-name="P591">3 <text:s/>-<text:tab/>As menu option C but using airfield<text:span text:style-name="T666">,</text:span> names not the ICAO coding.</text:p>
      <text:p text:style-name="P591">4. <text:s/>-<text:tab/>As menu option D but using airfield<text:span text:style-name="T666">,</text:span> names not the ICAO coding.</text:p>
      <text:p text:style-name="P591">These <text:span text:style-name="T718">are </text:span>more of an experiment to see if users prefer this format.<text:span text:style-name="T666"> Let </text:span><text:span text:style-name="T707">me</text:span><text:span text:style-name="T666"> know.</text:span></text:p>
      <text:p text:style-name="P339"/>
      <text:p text:style-name="P339">All reports are cumulative e.g., one after the other up to <text:span text:style-name="T350">the point of quitting Flightlog</text:span>.</text:p>
      <text:p text:style-name="P251">More information of these options in detail, later.</text:p>
      <text:p text:style-name="P248"/>
      <text:p text:style-name="P248">Well, that is the top level overview <text:span text:style-name="T319">of the menu</text:span>, now to get in to details <text:span text:style-name="T350">for each</text:span> menu option but lets cover the work flow required to enter data in to the system before doing so, <text:span text:style-name="T439">just in case you are eager to get going</text:span>.</text:p>
      <text:p text:style-name="P248"/>
      <text:p text:style-name="P562"/>
      <text:h text:style-name="P656" text:outline-level="1"><text:bookmark-start text:name="__RefHeading___Toc1037_2548604501"/>Work Flow <text:span text:style-name="T59">O</text:span>verview<text:bookmark-end text:name="__RefHeading___Toc1037_2548604501"/></text:h>
      <text:p text:style-name="Standard"/>
      <text:p text:style-name="P255">Now a description of the work flow start<text:span text:style-name="T320">ing</text:span> at the beginning, <text:span text:style-name="T374">start a terminal program such as konsole</text:span><text:span text:style-name="T707">, qterminal</text:span><text:span text:style-name="T374"> (although there are many others you can use). Available for *nix</text:span><text:span text:style-name="T707"> (including OSX)</text:span><text:span text:style-name="T374">, Linux and Windows but with different names.</text:span></text:p>
      <text:p text:style-name="P379">Adjust the terminal programs settings to be 106 characters wide and 24 <text:span text:style-name="T440">or </text:span>more deep and the <text:span text:style-name="T707">deeper</text:span> the better as <text:span text:style-name="T602">some</text:span> of the data displays will make use of the extra depth<text:span text:style-name="T707"> </text:span><text:span text:style-name="T729">with </text:span><text:span text:style-name="T707">data entry </text:span>. <text:span text:style-name="T602">T</text:span>his is done by using the mouse with the cursor at the left <text:span text:style-name="T602">(or right) edge </text:span>and then bottom of the box and dragging it over until you get the right size which will be displayed while you <text:span text:style-name="T602">are </text:span>drag<text:span text:style-name="T602">ging</text:span> the edge <text:span text:style-name="T602">over</text:span>.<text:span text:style-name="T718"> This sizing display, is not available on all terminal programs.</text:span></text:p>
      <text:p text:style-name="P558"><text:span text:style-name="T243">Assuming you have followed the instructions to compile Flightlog see sections </text:span><text:span text:style-name="T243"><text:bookmark-ref text:reference-format="chapter" text:ref-name="__RefHeading___Toc1109_2548604501">10</text:bookmark-ref></text:span><text:span text:style-name="T243"><text:s/>and </text:span><text:span text:style-name="T243"><text:bookmark-ref text:reference-format="chapter" text:ref-name="__RefHeading__11526_177439401">11</text:bookmark-ref></text:span><text:span text:style-name="T274">, c</text:span><text:span text:style-name="T374">reate the directory that will hold your flight log data such as “Flightlog" do not use the same one</text:span><text:span text:style-name="T707"> as the source code </text:span><text:span text:style-name="T374">!.</text:span></text:p>
      <text:p text:style-name="P379">Move to that directory.</text:p>
      <text:p text:style-name="P379"/>
      <text:p text:style-name="P558">Copy over from the directory holding the Flightlog<text:span text:style-name="T667"> </text:span>program as well as the other files in the archive to the data directory.<text:span text:style-name="T650"> If you have the open source version you will need to build / compile Flightlog first but having done so continue reading.</text:span><text:span text:style-name="T707"> You do not want the source file flightlog.cbl</text:span><text:span text:style-name="T718"> other than for compiling the flightlog program</text:span><text:span text:style-name="T707">.</text:span></text:p>
      <text:p text:style-name="P558"/>
      <text:p text:style-name="P255"><text:span text:style-name="T374">S</text:span>tart the program <text:span text:style-name="T165">by typing flightlog (with or without any parameters) followed by enter.</text:span></text:p>
      <text:p text:style-name="P248"/>
      <text:p text:style-name="P248">For windows do similar, using a <text:span text:style-name="T312">terminal</text:span> box <text:span text:style-name="T343">via Start-&gt;run command,</text:span> and you will be (like Linux) at your home directory so, for the first time <text:span text:style-name="T667">just follow the above steps</text:span></text:p>
      <text:p text:style-name="P248"/>
      <text:p text:style-name="P379">For Linux or variations (including Mac OS<text:span text:style-name="T650">X</text:span>, BSD or any other *nix system) <text:span text:style-name="T603">this is done by:</text:span></text:p>
      <text:p text:style-name="P176"/>
      <text:p text:style-name="P176">mkdir Flightlog<text:span text:style-name="T707"><text:tab/><text:tab/></text:span><text:span text:style-name="T282">Create the folder for the flightlog data.</text:span></text:p>
      <text:p text:style-name="P176">cd Flightlog<text:span text:style-name="T707"><text:tab/><text:tab/><text:tab/></text:span><text:span text:style-name="T282">Now move to that folder / directory</text:span></text:p>
      <text:p text:style-name="P176"/>
      <text:p text:style-name="P104">Copy the files <text:span text:style-name="T605">from </text:span>within the Flightlog source archive to the created directory, by</text:p>
      <text:p text:style-name="P104"><text:span text:style-name="T137">cp -vpr ~/fltlog-src Flightlog<text:tab/><text:tab/></text:span><text:span text:style-name="T605">Change fltlog-src to the one used.</text:span></text:p>
      <text:p text:style-name="P199">rm -f flightlog.cbl<text:tab/><text:tab/><text:tab/><text:tab/><text:tab/><text:span text:style-name="T243">Remove the source code.</text:span></text:p>
      <text:p text:style-name="P139"/>
      <text:p text:style-name="P197"><text:span text:style-name="T650">f</text:span>lightlog</text:p>
      <text:p text:style-name="P248"/>
      <text:p text:style-name="P248">Note above commands <text:span text:style-name="T320">might well be</text:span> different for <text:span text:style-name="T320">your version of W</text:span>indows<text:span text:style-name="T708"> but you can use the file manager to do all this</text:span>.</text:p>
      <text:p text:style-name="P251"/>
      <text:p text:style-name="P442">For the actual steps to run Flightlog (under Linux) see <text:bookmark-ref text:reference-format="text" text:ref-name="__RefHeading___Toc19843_2548604501">Preparation for running Flightlog</text:bookmark-ref><text:s/>on page <text:bookmark-ref text:reference-format="page" text:ref-name="__RefHeading___Toc19843_2548604501">83</text:bookmark-ref><text:s/>for detailed instructions.</text:p>
      <text:p text:style-name="P66"/>
      <text:p text:style-name="P339"><text:span text:style-name="T380">Right, f</text:span>or now <text:span text:style-name="T423">and assuming you have read the above mentioned section, </text:span>just <text:span text:style-name="T379">use </text:span>the name <text:span text:style-name="T650">f</text:span>lightlog and return <text:span text:style-name="T604">as shown above</text:span>.</text:p>
      <text:p text:style-name="P339"/>
      <text:p text:style-name="P428">Warning: <text:s/>If the terminal screen sizes is not =&gt;<text:span text:style-name="T718"> (greater or equal to)</text:span> 106 <text:span text:style-name="T385">wide </text:span>or length =&gt; 24 then you will get an error message <text:s/>SY01<text:span text:style-name="T385">0</text:span> or SY01<text:span text:style-name="T385">2 depending on the error, so before you hit return, adjust the width and/or length then press enter and the program will re-check the settings and start up.</text:span><text:span text:style-name="T718"> For some terminal program</text:span><text:span text:style-name="T725">s</text:span><text:span text:style-name="T718"> this will not work and you will need to exit</text:span><text:span text:style-name="T725">, adjust the terminal sizes</text:span><text:span text:style-name="T718"> and reload flightlog.</text:span></text:p>
      <text:p text:style-name="P248"/>
      <text:p text:style-name="P339"><text:soft-page-break/>The menu will appear see figure 1. Select A to enter your flights with your paper log book by your side turned to <text:span text:style-name="T440">the first flight log page</text:span>.</text:p>
      <text:p text:style-name="P248"/>
      <text:p text:style-name="P339">For details of <text:span text:style-name="T344">d</text:span>ata entry see <text:bookmark-ref text:reference-format="text" text:ref-name="__RefHeading___Toc14512_2548604501">Option A &amp; B – Flight log Data Entry and Amend Functions</text:bookmark-ref><text:s/>on page <text:bookmark-ref text:reference-format="page" text:ref-name="__RefHeading___Toc14512_2548604501">19</text:bookmark-ref>.</text:p>
      <text:p text:style-name="P339"/>
      <text:p text:style-name="P342">Continue adding your paper log book entries but after a page or two and to validate the information entered<text:span text:style-name="T386">, </text:span>quit <text:span text:style-name="T386">D</text:span>ata <text:span text:style-name="T386">E</text:span>ntry when you are asked for a new flight date <text:span text:style-name="T380">having entered the last entry on a page, </text:span>by hitting the ESCape key. Now select option <text:span text:style-name="T386">F</text:span>, <text:span text:style-name="T386"><text:s/>you will see a display of totals followed by aircraft statistics see Figure 2 for an example.</text:span></text:p>
      <text:p text:style-name="P342"/>
      <text:p text:style-name="P342"/>
      <text:p text:style-name="P429"><draw:frame draw:style-name="fr3" draw:name="Image2" text:anchor-type="paragraph" svg:width="14.49cm" svg:height="14.612cm" draw:z-index="1"><draw:image xlink:href="Pictures/100000000000034F000002D819E94858.jpg" xlink:type="simple" xlink:show="embed" xlink:actuate="onLoad" draw:mime-type="image/jpeg"/></draw:frame>Figure 2 – Menu option F – Analysis &amp; Totals Displayed</text:p>
      <text:p text:style-name="P342"/>
      <text:p text:style-name="P342"/>
      <text:p text:style-name="P342"><text:span text:style-name="T386">Now e</text:span>xamine the <text:span text:style-name="T386">display looking at the first two l</text:span>in<text:span text:style-name="T386">es</text:span> and compare the <text:span text:style-name="T380">totals shown </text:span>with that of your log book page and it should match. <text:s/><text:span text:style-name="T386">As you can see, you have the following values shown from left to right, Grand Total (all your flight hours), then the break down as Day – P1, P2/3 followed by Night – P1, P2/3 totals, IFR, Multi-Engine time. The total for aircraft is split by day P1, 2 &amp; 3 then night P1, 2, 3, IFR, Multi and Instructing and for these last three, they are already within the preceding six totals as it is just total times. For commercial flight crew, you may well not need to keep track of IFR flights as all flying is as such. In which case do not make any </text:span><text:soft-page-break/><text:span text:style-name="T386">entries for it. But for flying on a private license</text:span><text:span text:style-name="T718">,</text:span><text:span text:style-name="T386"> it is useful information when submitting any CoE elements of the report for an examiner.</text:span></text:p>
      <text:p text:style-name="P430"/>
      <text:p text:style-name="P430"><text:span text:style-name="T389">Note that </text:span>If you entered non P(ilot) times, such as E1, 2 or N1, 2 or R1 or, T1, 2 etc (instead of capacity P1 – 3) then these values are so related instead. This means that, i.e., <text:s/>E1 is the 1<text:span text:style-name="T387">st</text:span> and 4<text:span text:style-name="T387">th</text:span> figures, E2 is 2<text:span text:style-name="T387">nd</text:span> and 5<text:span text:style-name="T387">th</text:span>. <text:span text:style-name="T708">e</text:span>tc. <text:span text:style-name="T624">The P totals are shown, as a crew member could change their fight status type if they change crew roles during their career.</text:span></text:p>
      <text:p text:style-name="P430"/>
      <text:p text:style-name="P431">Now back to the displayed total figures, by comparing your paper log book total<text:span text:style-name="T440">s</text:span> with these, you can spot immediately if they are the same.</text:p>
      <text:p text:style-name="P344">If not, it is more often <text:span text:style-name="T668">likely </text:span>than not<text:span text:style-name="T718">,</text:span> to be the fact that you entered a flight as P1 instead of P2 or P3 <text:s/>or more likely, entered it for day when it should be night or the other way around or a mixture of the four and that you forgot that one or more flights have a split between day and night and you did not enter it that way. So from the menu select option C and print out your flights. <text:span text:style-name="T440">Now using the ‘less’ command or a text editor to look at the report output file, logbook.rpt</text:span> </text:p>
      <text:p text:style-name="P343">So find the flight/<text:span text:style-name="T380">s</text:span> in error and then <text:span text:style-name="T388">in </text:span>Flightlog <text:span text:style-name="T388">select </text:span>B for Amend and <text:span text:style-name="T388">change</text:span> the incorrect record entr<text:span text:style-name="T441">ies</text:span>. <text:span text:style-name="T389">During Amend mode you will be asked for the date and time of the flight and you will see the screen refreshed with the flight details with the cursor back on Date. <text:s/>This allows you to change all entries including the date, start and end times along with all other flight data.</text:span></text:p>
      <text:p text:style-name="P343"/>
      <text:p text:style-name="P343"><text:span text:style-name="T388">When you have amended all the flights in error, c</text:span>ome out of Amend mode (Escape key) select C report once more, then quit the program and check the report log file (logbook.rpt) to confirm the totals now match up. <text:span text:style-name="T388">You can of course use option F again to just check the totals and only then</text:span><text:span text:style-name="T718">,</text:span><text:span text:style-name="T388"> if there are still total errors select a C or D report.</text:span> This does of course assume that you have, for each <text:span text:style-name="T380">paper log book p</text:span>age added up each column, added the (top) brought forward totals and create at the bottom of the page the <text:span text:style-name="T380">C</text:span>arried <text:span text:style-name="T380">F</text:span>orward totals. These <text:span text:style-name="T23">must</text:span> match up before entering any more data.</text:p>
      <text:p text:style-name="P341"/>
      <text:p text:style-name="P342">After a few pages of this, you will soon know when typing, if you have made a mistake during entry and you can always go back to the field in error by pressing the Field back key which is F10, just repeat the F10 key until the cursor get to the field in error.</text:p>
      <text:p text:style-name="P342">Now you can re-enter the correct data. If you <text:span text:style-name="T441">are at </text:span>one <text:span text:style-name="T380">of the </text:span>Pn entr<text:span text:style-name="T380">ies</text:span> where the field is non zero but the correct value is zero you can type the value 00.00 or just Z or <text:span text:style-name="T380">z</text:span> in the first position followed by return and the program will change it to – yep 00.00. </text:p>
      <text:p text:style-name="P342">Correct, been there, and got the plantation :)</text:p>
      <text:p text:style-name="P427"/>
      <text:p text:style-name="P427">Many of these short cuts have been added <text:span text:style-name="T441">after </text:span>I encountered time consuming typing and wanted way<text:span text:style-name="T441">s</text:span> to reduce it.</text:p>
      <text:p text:style-name="P341"/>
      <text:p text:style-name="P341">As you are entering new flights, whenever you enter a new airfield<text:span text:style-name="T380">s</text:span> ICAO code you will be asked to confirm <text:span text:style-name="T380">if the entered code </text:span>is correct (if not just Escape) <text:span text:style-name="T380">otherwise </text:span>it will ask for the airfield name.</text:p>
      <text:p text:style-name="P341">Likewise when entering a new aircraft type it will again ask you to confirm it is a new one and not <text:span text:style-name="T345">incorrectly </text:span>type<text:span text:style-name="T345">d</text:span> (<text:span text:style-name="T345">the </text:span>Escape key will return to the <text:span text:style-name="T389">aircraft type </text:span>field) otherwise you will get asked some question<text:span text:style-name="T669">s</text:span> regarding the type like M/S <text:span text:style-name="T650">M</text:span>ulti-engine or Single, Complex type (all Multi <text:span text:style-name="T382">engines</text:span> are complex so this question <text:span text:style-name="T345">will</text:span> be omitted) <text:span text:style-name="T345">but for singles fixed gear &amp; props its N (or space) instead of Y for any other facilities such as retractable gear and/or variable pitched propellers.</text:span> <text:span text:style-name="T380">This is, as applies to the Civil Aviation Authority, but might be different in your country or even the UK in the future. It is therefore more meaningful information when printing out a set of CoE’s along with the aircraft types.</text:span></text:p>
      <text:p text:style-name="P248"/>
      <text:p text:style-name="P345"><text:soft-page-break/>If you find that you made a mistake in entering the Aircraft details you can go into the option that will allow a global change for <text:span text:style-name="T23">all</text:span> flight entries <text:span text:style-name="T381">should it be needed otherwise just amend the record in error.</text:span></text:p>
      <text:p text:style-name="P345"/>
      <text:p text:style-name="P632">Well, that covers “quick let<text:span text:style-name="T441">s</text:span> get it going" and enter flight data, <text:span text:style-name="T390">so n</text:span>ow for a detailed look at each <text:span text:style-name="T441">of the </text:span>menu option<text:span text:style-name="T441">s</text:span>.</text:p>
      <text:p text:style-name="P632"/>
      <text:h text:style-name="P657" text:outline-level="1"><text:bookmark-start text:name="__RefHeading___Toc14510_2548604501"/><text:span text:style-name="T695">Flight Log </text:span>Menu<text:bookmark-end text:name="__RefHeading___Toc14510_2548604501"/></text:h>
      <text:p text:style-name="P256"/>
      <text:h text:style-name="P661" text:outline-level="2"><text:bookmark-start text:name="__RefHeading___Toc14512_2548604501"/><text:span text:style-name="T335">Option A &amp; B</text:span> – Flight log Data Entry and Amend Functions<text:bookmark-end text:name="__RefHeading___Toc14512_2548604501"/></text:h>
      <text:p text:style-name="P248"/>
      <text:p text:style-name="P248"><text:span text:style-name="T390">From the menu, s</text:span>elect <text:span text:style-name="T165">A, after which the data entry screen will appear</text:span>.</text:p>
      <text:p text:style-name="P248">You now get the screen as shown in Figure 3.</text:p>
      <text:p text:style-name="P248"/>
      <text:p text:style-name="P312"><draw:frame draw:style-name="fr3" draw:name="Image3" text:anchor-type="paragraph" svg:width="14.591cm" svg:height="12.504cm" draw:z-index="7"><draw:image xlink:href="Pictures/1000000000000351000002D9AC59F35C.png" xlink:type="simple" xlink:show="embed" xlink:actuate="onLoad" draw:mime-type="image/png"/></draw:frame>Figure 3 – Data Entry.</text:p>
      <text:p text:style-name="Text_20_body"/>
      <text:p text:style-name="P324">Note that the Amend screen is the same, other than the word Amend instead of Entry.</text:p>
      <text:p text:style-name="P249"/>
      <text:p text:style-name="P249">Hopefully the screen layout is clear. <text:span text:style-name="T321">It consists of a title line which provides the program name and version (you will need this if reporting any issues). Next is two blocks for data entry consisting of a heading line then the first data entry line, a two line gap (for caution or information messages) then the next line headings, followed by a data line.</text:span></text:p>
      <text:p text:style-name="P248"/>
      <text:p text:style-name="P565">Now the cursor is on the first of two data entry lines waiting for the date in your chosen format as defined by the system variable LC_TIME. If this is wrong, press escape <text:span text:style-name="T391">twice</text:span> to get back to the prompt. There might a second or two delay depending on <text:span text:style-name="T441">the speed of </text:span>your <text:span text:style-name="T391">computer</text:span>.</text:p>
      <text:p text:style-name="P565"/>
      <text:p text:style-name="P569"><text:span text:style-name="T620">[</text:span>See <text:bookmark-ref text:reference-format="chapter" text:ref-name="__RefHeading___Toc13668_2442113812">11.4.4</text:bookmark-ref><text:s/><text:bookmark-ref text:reference-format="text" text:ref-name="__RefHeading___Toc13668_2442113812">Script for running flightlog</text:bookmark-ref><text:s/><text:span text:style-name="T620">page </text:span><text:bookmark-ref text:reference-format="page" text:ref-name="__RefHeading___Toc13668_2442113812">81</text:bookmark-ref><text:s/>for details of setting this up correctly. Failure to do so <text:span text:style-name="T620">will present significant errors when attempting to run flightlog.]</text:span></text:p>
      <text:p text:style-name="P316"/>
      <text:p text:style-name="P182">chmod +x run-<text:span text:style-name="T608">f</text:span>lightlog.sh</text:p>
      <text:p text:style-name="P314"/>
      <text:p text:style-name="P314"><text:span text:style-name="T392">and this will </text:span>make it executable, <text:span text:style-name="T392">so now</text:span> retype the script <text:span text:style-name="T392">name </text:span><text:s/>again. <text:span text:style-name="T392">It s</text:span>hould now work.</text:p>
      <text:p text:style-name="P313"><text:soft-page-break/></text:p>
      <text:p text:style-name="P313">So back to the data entry screen by <text:span text:style-name="T392">having started flightlog from the script or directly, then having selected option </text:span>A.</text:p>
      <text:p text:style-name="P313"/>
      <text:p text:style-name="P313">So fields from left to right should be self explained, but it is in order<text:span text:style-name="T718"> of</text:span>:</text:p>
      <text:p text:style-name="P313"/>
      <text:p text:style-name="P315">Flite <text:span text:style-name="T392">D</text:span>ate, <text:span text:style-name="T392">A/C T</text:span>ype, <text:s/><text:span text:style-name="T392">A/C</text:span> <text:span text:style-name="T392">R</text:span>eg, Captains <text:span text:style-name="T393">(</text:span>name<text:span text:style-name="T393">)</text:span>, ICAO from <text:span text:style-name="T393">(</text:span>airfield<text:span text:style-name="T393">)</text:span>, ICAO to <text:span text:style-name="T393">(</text:span>airfield<text:span text:style-name="T393">)</text:span>, followed by the Start and End flight times (as a 24 hour clock) and here most pilots use the local time converted as GMT/UTC<text:span text:style-name="T651"> a</text:span>s <text:span text:style-name="T393">are</text:span> flight planning documents.</text:p>
      <text:p text:style-name="P313"/>
      <text:p text:style-name="P432">Abbreviations used here are: Flite = Flight, A/C = Aircraft, Reg = Registration number, Captain is he’s<text:span text:style-name="T718"> </text:span>| her name as surname <text:span text:style-name="T609">&amp; </text:span>initials <text:span text:style-name="T609">(if needed)</text:span>, ICAO = official icao code designation for the airfields name as four <text:span text:style-name="T442">alphabetic characters</text:span>, start and end times in format of <text:span text:style-name="T651"><text:s/></text:span>“hh.mm".</text:p>
      <text:p text:style-name="P432"/>
      <text:p text:style-name="P313">Date format will be in your required format (reports and displays will be the same) as 10 chars (characters) <text:span text:style-name="T393">and </text:span>instead of the ‘/’ symbol you can use <text:span text:style-name="T393">a </text:span>comma, period, ‘\’ <text:s/><text:span text:style-name="T322">or any thing else as it is not checked). If you have other records present on file when starting up Flightlog, the date shown will be of the last (latest) flight you have entered, just in case you did more than one flight for the same date and as a reminder of when you last entered information into the Flightlog system.</text:span></text:p>
      <text:p text:style-name="P320">The date is checked to be a valid date, <text:span text:style-name="T393">i</text:span>.e,., <text:span text:style-name="T393">February</text:span> has 28 <text:span text:style-name="T393">or </text:span>29 <text:span text:style-name="T393">days, </text:span>depending on the year etc <text:span text:style-name="T393">same for all the months, i.e., days is =&lt; 30 or 31, etc</text:span>.</text:p>
      <text:p text:style-name="P320"/>
      <text:p text:style-name="P577"><draw:frame draw:style-name="fr3" draw:name="Image11" text:anchor-type="paragraph" svg:width="14.429cm" svg:height="11.312cm" draw:z-index="9"><draw:image xlink:href="Pictures/100000000000034E000002D71D65FC51.png" xlink:type="simple" xlink:show="embed" xlink:actuate="onLoad" draw:mime-type="image/png"/></draw:frame>Figure 4 – New Aircraft type</text:p>
      <text:p text:style-name="P320"/>
      <text:p text:style-name="P317">Next is A/C type and this allows for 8 chars although most only need 4 however in my days of flying PA28’s<text:span text:style-name="T697"> along with some other types,</text:span> I found it <text:span text:style-name="T697">has</text:span> a wide range of types from very simple like the PA28-140, PA28-180 to the more complex like PA28-236 Dakota (var. prop), PA28R180, PA28R200 (var prop and retractable gear) so I did use all 8 chars for it. Most of the other type<text:span text:style-name="T394">s</text:span> <text:soft-page-break/>was kept for 4 chars though and for commercial <text:span text:style-name="T394">A/C,</text:span> it is <text:span text:style-name="T394">almost </text:span>all 4 char ICAO coding or manufacturers coding although models within types are not very well supported using these coding standards. It will take the type from the last flight and display that<text:span text:style-name="T669">,</text:span> allowing you to change or just <text:span text:style-name="T442">press </text:span>enter to accept it.</text:p>
      <text:p text:style-name="P317"/>
      <text:p text:style-name="P320">If it is a new type you will be asked to confirm it (or <text:span text:style-name="T394">you can </text:span>re-enter the type code <text:span text:style-name="T394">having pressed the escape key</text:span>). <text:span text:style-name="T394">I</text:span>f new, you will be asked some questions such as M/S (Multi or Single engine) and if it is a Complex type (all Multi <text:span text:style-name="T341">engine</text:span>’s are complex)<text:span text:style-name="T651">,</text:span> on completion of these question<text:span text:style-name="T341">s</text:span> it will save the answers for storing on the aircraft file after completing the rest of the flight data for this flight. <text:span text:style-name="T486">See figure 4. </text:span>This also is the same for a new airfield, only here it asks for confirmation and then the Airfield name. <text:span text:style-name="T486">See figure 5.</text:span></text:p>
      <text:p text:style-name="P318"/>
      <text:p text:style-name="P513"><draw:frame draw:style-name="fr3" draw:name="Image5" text:anchor-type="paragraph" svg:width="14.377cm" svg:height="12.243cm" draw:z-index="2"><draw:image xlink:href="Pictures/100000000000034E000002D788DBCF6A.png" xlink:type="simple" xlink:show="embed" xlink:actuate="onLoad" draw:mime-type="image/png"/></draw:frame>Figure 5 – New Airfield</text:p>
      <text:p text:style-name="P318"/>
      <text:p text:style-name="P317">Now Flightlog will take the <text:span text:style-name="T394">A/C R</text:span>eg., from the last flight of that a/c type if flown before and will remember it by a/c type, all to cut down typing, so amend it or press <text:span text:style-name="T442">enter</text:span> to accept it.</text:p>
      <text:p text:style-name="P317"/>
      <text:p text:style-name="P317">An important point regarding the registration, which is nice and simple for all countries other than the USA and here, do <text:span text:style-name="T23">not</text:span> enter the first letter ‘N’, just the other five digits. Don’t worry, it will appear on the reports in full.<text:span text:style-name="T669"> This assumes that the first two characters after 'N' are numeric, i.e., 0 through 9.</text:span></text:p>
      <text:p text:style-name="P317"/>
      <text:p text:style-name="P317">Now <text:span text:style-name="T341">the </text:span>Captain’s <text:span text:style-name="T507">n</text:span>ame, again it will use the name from the previous flight so if <text:span text:style-name="T341">it is </text:span>the same, just <text:span text:style-name="T442">enter</text:span> or <text:span text:style-name="T442">type in</text:span> the full name or if you <text:span text:style-name="T394">are in P1 Capacity, </text:span>just type S and a space then enter, it will replace that with <text:span text:style-name="T341">the text “</text:span>SELF". <text:s/>Correct, I have been known for being lazy, when typing a lot of entries in over a <text:span text:style-name="T394">day or </text:span>week when I was also a flying instructor<text:span text:style-name="T718"> and training captain</text:span>, <text:span text:style-name="T341">which </text:span>tends to be a lot of flights per day. <text:span text:style-name="T341">It is anything to save more data entry.</text:span></text:p>
      <text:p text:style-name="P313"><text:soft-page-break/></text:p>
      <text:p text:style-name="P317">Next four fields, so the ICAO code for the <text:span text:style-name="T507">F</text:span>rom and <text:span text:style-name="T507">T</text:span>o airfields, again it will display the one from the last flights “To field". So if <text:span text:style-name="T341">it is </text:span>wrong change it and it <text:span text:style-name="T341">is </text:span>then copie<text:span text:style-name="T341">d</text:span> it to the To field letting you press enter <text:span text:style-name="T670">if</text:span> correct or change it <text:span text:style-name="T341">if needed</text:span>.</text:p>
      <text:p text:style-name="P317"/>
      <text:p text:style-name="P317">Next is the Start and the End flight times as 24 hour clocks normally as GMT or Zulu.</text:p>
      <text:p text:style-name="P317">If the flight lands after midnight it <text:span text:style-name="T394">will </text:span>handle that correctly but not so sure <text:span text:style-name="T341">i</text:span>f you are flying for over 24 hours. Sorry, no<text:span text:style-name="T341">t</text:span> <text:span text:style-name="T341">had that as an issue as </text:span>managed to avoid <text:span text:style-name="T341">it,</text:span> even flying <text:span text:style-name="T341">direct </text:span>across the pond in twins, <text:span text:style-name="T341">as it is only </text:span>10 – 15 hours max<text:span text:style-name="T718">imum</text:span> <text:span text:style-name="T394">(yes, extra fuel tanks in the cabin)</text:span>.</text:p>
      <text:p text:style-name="P317"/>
      <text:p text:style-name="P318">So now the next data line with fields M/S<text:span text:style-name="T670"> (Multi/Single)</text:span>, Cap<text:span text:style-name="T670"> (capacity)</text:span>, <text:span text:style-name="T394">D</text:span>ay P1, P2/3, <text:span text:style-name="T394">N</text:span>ight P1, P2/3 <text:span text:style-name="T323">followed by Inst. IFR and Remarks.</text:span></text:p>
      <text:p text:style-name="P318"/>
      <text:p text:style-name="P322">M/S is preset for you, based on the a/c type you entered although you can over ride this.</text:p>
      <text:p text:style-name="P322"/>
      <text:p text:style-name="P322">Cap = <text:span text:style-name="T394">Now the f</text:span>irst <text:span text:style-name="T395">of </text:span>the quick keys :</text:p>
      <text:p text:style-name="P322">I <text:s/>= <text:s/>P1I for flying instructor, <text:span text:style-name="T325">this is the letter I or i</text:span></text:p>
      <text:p text:style-name="P322">T = <text:s/>P1T for flight trainer (commercial) Training Captain <text:span text:style-name="T325">and this is the letter T or t</text:span>.</text:p>
      <text:p text:style-name="P322"/>
      <text:p text:style-name="P323">This field will repeat the capacity of the last flight to help speed <text:span text:style-name="T341">up </text:span>typing <text:span text:style-name="T394">so if the last flight was as P1 and this is P1I just enter I and it will replace it correctly. Same for P1T with T or t.</text:span></text:p>
      <text:p text:style-name="P319"/>
      <text:p text:style-name="P323">You can enter any of the following combinations: <text:s/>P1, P2, P3 (If PUT <text:span text:style-name="T341">entered it is </text:span>changed to P3), E1, E2, <text:span text:style-name="T334">N1, N2, </text:span>R1, R2, <text:span text:style-name="T334">T1 and T2</text:span> are all valid as well as P1S (P1 under supervision like a checkout for A/C or airport , route etc<text:span text:style-name="T570">.</text:span>).</text:p>
      <text:p text:style-name="P328">Note that from <text:span text:style-name="T341">the </text:span>above, the first letter classification mean<text:span text:style-name="T341">s</text:span>: </text:p>
      <text:p text:style-name="P328">P=Pi<text:span text:style-name="T651">l</text:span>ot, E=Engineer, N=Navigator, R or T=Radio operator or for military R=R<text:span text:style-name="T651">EO</text:span> or GIB.</text:p>
      <text:p text:style-name="P323">If you enter P2 for a single engine aircraft it will reject it as incompatible with A/c Type coding M/S = S as can’t be second officer on a single eng<text:span text:style-name="T442">ine</text:span> a<text:span text:style-name="T442">ircraft</text:span>.</text:p>
      <text:p text:style-name="P323">There are a few other checks but they should not appear and relate to military crew. These are being upgraded after version testing by <text:span text:style-name="T341">such</text:span> flight crew.</text:p>
      <text:p text:style-name="P319"/>
      <text:p text:style-name="P321"><text:span text:style-name="T395">More for Amend mode but also for Entry, s</text:span>o for each of the Pn <text:span text:style-name="T324">and the IFR </text:span>times it is a five char field in the format hh<text:span text:style-name="T670">.</text:span>mm so enter the leading zeros or if th<text:span text:style-name="T442">ey are </text:span>already <text:span text:style-name="T442">present, </text:span><text:s/>use the right arrow key to move over to the correct position. The period must be present for validation checks. Now a<text:span text:style-name="T395">nother</text:span> fast key option, if the P<text:span text:style-name="T395">n</text:span> field you are on, has a non zero value but you want it as zero enter ‘Z’ or ‘z’ then enter will refresh as 00:00. <text:s/>If you make a mistake after pressing enter, the F10 key will go back one field so doing it twice it will go back two fields and so on.</text:p>
      <text:p text:style-name="P321">Wait<text:span text:style-name="T718">,</text:span> there are more, <text:span text:style-name="T442">but these are shown in </text:span><text:span text:style-name="T442"><text:bookmark-ref text:reference-format="text" text:ref-name="__RefHeading___Toc14777_2548604501">Appendix A -  Keyboard operations or actions during data entry.</text:bookmark-ref></text:span><text:span text:style-name="T442"><text:s/>page </text:span><text:span text:style-name="T442"><text:bookmark-ref text:reference-format="page" text:ref-name="__RefHeading___Toc14777_2548604501">56</text:bookmark-ref></text:span><text:span text:style-name="T442">.</text:span></text:p>
      <text:p text:style-name="P320"/>
      <text:p text:style-name="P320">Namely function keys F1, F2, F3, F4, F<text:span text:style-name="T652">5</text:span> as well as the already mentioned F10.</text:p>
      <text:p text:style-name="P320"/>
      <text:p text:style-name="P320">These keys become available depending on what you are doing i.e., some only appear on the bottom line of screen for Amend mode like when you can delete the current record (F4)</text:p>
      <text:p text:style-name="P320">The other<text:span text:style-name="T395">s</text:span> are most<text:span text:style-name="T718">ly</text:span> always present <text:span text:style-name="T652">but note the word mostly</text:span>.</text:p>
      <text:p text:style-name="P320"/>
      <text:p text:style-name="P320">F1 = Displays a list of airfields <text:span text:style-name="T395">and</text:span> escape at the end returns back to the entry screen exactly where you were.</text:p>
      <text:p text:style-name="P320"/>
      <text:p text:style-name="P320">F3 = Display<text:span text:style-name="T671">s</text:span> a list of Aircraft <text:span text:style-name="T395">and</text:span> escape is exactly the same function <text:span text:style-name="T395">as for F1</text:span>.</text:p>
      <text:p text:style-name="P320"><text:soft-page-break/></text:p>
      <text:p text:style-name="P320">F2 = <text:span text:style-name="T324">During Amend this will appear and be available to get the next record in date/time order.</text:span></text:p>
      <text:p text:style-name="P322">This <text:span text:style-name="T395">will </text:span>no longer <text:span text:style-name="T395">be </text:span>available after the <text:span text:style-name="T395">C</text:span>apacity data entry sequence.</text:p>
      <text:p text:style-name="P320"/>
      <text:p text:style-name="P322">F4 = <text:span text:style-name="T395">D</text:span>elete the current displayed record in Amend mode <text:span text:style-name="T395">only</text:span>.</text:p>
      <text:p text:style-name="P322"/>
      <text:p text:style-name="P322">F5 = In amend mode and at the point for entering P1 day/night values will save the current record then return to enter date <text:span text:style-name="T395">for a new flight</text:span>. <text:span text:style-name="T395">Return here will cancel Amend mode and return to the menu.</text:span></text:p>
      <text:p text:style-name="P322"/>
      <text:p text:style-name="P322">F10 = As explained will jump back one field. <text:span text:style-name="T395">Can be used many time</text:span><text:span text:style-name="T730">s,</text:span><text:span text:style-name="T395"> until back at Date entry.</text:span></text:p>
      <text:p text:style-name="P322"/>
      <text:p text:style-name="P322">ESCape <text:span text:style-name="T395">key</text:span> will go back to <text:span text:style-name="T718">the start of </text:span><text:span text:style-name="T443">date </text:span>entry.</text:p>
      <text:p text:style-name="P322"/>
      <text:p text:style-name="P324">The last field is remarks and it is 32 chars long and <text:span text:style-name="T443">is for </text:span>any character in <text:span text:style-name="T395">the </text:span>range of A to Z, a to z and 0 to 9 along with the standard special keyboard keys like ( ) [ ] { } + = ? &lt; &gt;<text:span text:style-name="T671"> / \</text:span> , . etc.</text:p>
      <text:p text:style-name="P324">For example for P1I, I use<text:span text:style-name="T628">d</text:span> coding for the student exercises <text:span text:style-name="T395">conducted,</text:span> then routing information if IFR <text:span text:style-name="T443">e</text:span>x<text:span text:style-name="T628">ercises</text:span> so use<text:span text:style-name="T628">d</text:span> <text:span text:style-name="T395">symbol coding </text:span>like /&gt;Fnnn climb to level Fnnn or Fnn\<text:span text:style-name="T395">&gt;</text:span> descend to level etc.</text:p>
      <text:p text:style-name="P324">There was a stack of others including opinions of flying skills as these had to be inserted in their training records. <text:span text:style-name="T395">I am sure you have your own.</text:span></text:p>
      <text:p text:style-name="P324"/>
      <text:p text:style-name="P324">Well that ends, Data <text:span text:style-name="T443">E</text:span>ntry.</text:p>
      <text:p text:style-name="P324"/>
      <text:p text:style-name="P324">Amend is very similar except that <text:span text:style-name="T326">it shows ‘Amend’ instead of ‘Entry’ and </text:span>it starts off asking for Flight Date then start time then having found the record (or you get an error message with a return to Date <text:span text:style-name="T443">E</text:span>ntry <text:span text:style-name="T395">to try again). Then check it is what you wanted if not ESC to return to Start Date entry.</text:span></text:p>
      <text:p text:style-name="P324"/>
      <text:p text:style-name="P324">You <text:span text:style-name="T395">then </text:span>go to Date <text:span text:style-name="T443">E</text:span>ntry <text:span text:style-name="T395">again, </text:span>where you can change date and then the rest of the data fields.</text:p>
      <text:p text:style-name="P326">If the date or time has changed it will create a new record and delete the old one otherwise it will update the record entry for that flight. It will also update or create a new record for Aircraft or Airfield if a new one has been entered during the amend process.</text:p>
      <text:p text:style-name="P326"/>
      <text:p text:style-name="P326">For both of these, airfield and aircraft, the flight date entry is updated to the date of the flight <text:span text:style-name="T443">if the date is later than that currently recorded. </text:span>Th<text:span text:style-name="T443">is also</text:span> applies to <text:span text:style-name="T443">D</text:span>ata <text:span text:style-name="T443">E</text:span>ntry.</text:p>
      <text:p text:style-name="P592"/>
      <text:p text:style-name="P592">If you have amended the aircraft type or the airfield and these were new entries for this flight then that data will not be removed, as a safeguard as Flightlog does not know at that point that they are<text:span text:style-name="T718">,</text:span> new data. You will have to manual remove them using the appropriate menu options later, having checked that the aircraft or airfield in error is not needed later on<text:span text:style-name="T718"> or previously.</text:span></text:p>
      <text:p text:style-name="P326"/>
      <text:p text:style-name="P325">Various function keys become <text:span text:style-name="T443">valid by text appearing</text:span> <text:span text:style-name="T326">and </text:span>disappear<text:span text:style-name="T443">ing that says so</text:span>, during the course of entry data, <text:span text:style-name="T443">this is similar but not exactly the same as Data Entry.</text:span></text:p>
      <text:p text:style-name="P324"/>
      <text:p text:style-name="P324">Short cuts for keys are the same, <text:span text:style-name="T444">also </text:span>see Data <text:span text:style-name="T443">E</text:span>ntry for information <text:span text:style-name="T444">as well as </text:span><text:span text:style-name="T444"><text:bookmark-ref text:reference-format="text" text:ref-name="__RefHeading___Toc14777_2548604501">Appendix A -  Keyboard operations or actions during data entry.</text:bookmark-ref></text:span><text:span text:style-name="T444"><text:s/>on page </text:span><text:span text:style-name="T444"><text:bookmark-ref text:reference-format="page" text:ref-name="__RefHeading___Toc14777_2548604501">56</text:bookmark-ref></text:span>.</text:p>
      <text:p text:style-name="P324"/>
      <text:p text:style-name="P324"/>
      <text:h text:style-name="P662" text:outline-level="2"><text:bookmark-start text:name="__RefHeading___Toc14514_2548604501"/>Option C and D – <text:s/>Flight <text:span text:style-name="T482">L</text:span>og Reporting<text:bookmark-end text:name="__RefHeading___Toc14514_2548604501"/></text:h>
      <text:p text:style-name="P330"/>
      <text:p text:style-name="P329">Menu options C and D are very similar, in fact the difference is that for (D) monthly sub totals are also printed out along with the Brought forward and Carried forward totals on each printed page. In addition a report for Airfields flown to or from and Aircraft flown along with last dates for both as well as number of flights for <text:span text:style-name="T550">each a</text:span>irfield.</text:p>
      <text:p text:style-name="P332">On option C <text:span text:style-name="T550">and D, </text:span>the Aircraft list is not produced<text:span text:style-name="T675">,</text:span> only the Airfields<text:span text:style-name="T571">, and that is with one's not visited ignored, just in case you have loaded an entire countries worth. Option K then L or V prints or displays all respectively.</text:span></text:p>
      <text:p text:style-name="P329"/>
      <text:p text:style-name="P329">On entry you are offered the <text:span text:style-name="T396">option to enter</text:span> a <text:span text:style-name="T396">S</text:span>tart and <text:span text:style-name="T396">E</text:span>nd <text:span text:style-name="T396">D</text:span>ate for the report and <text:span text:style-name="T396">for</text:span> both you can leave blank and it will, for Start Date start at the beginning and for end will continue for all flights flown. <text:s/>If you specify <text:span text:style-name="T336">a Start but not an End date you are also offered a Start Time, again you can leave this blank for all from the specified date.</text:span></text:p>
      <text:p text:style-name="P329"/>
      <text:p text:style-name="P312"><draw:frame draw:style-name="fr3" draw:name="Image6" text:anchor-type="paragraph" svg:width="14.381cm" svg:height="13.966cm" draw:z-index="3"><draw:image xlink:href="Pictures/10000000000002C5000002B21C704903.png" xlink:type="simple" xlink:show="embed" xlink:actuate="onLoad" draw:mime-type="image/png"/></draw:frame>Figure 6 – Reports Start date &amp; Time</text:p>
      <text:p text:style-name="P329"/>
      <text:p text:style-name="P331">It is there if you need to be selective, to compare the totals against your paper log book.</text:p>
      <text:p text:style-name="P633">Next and starting with flightlog v2.02.12 is the entry of 'Do you want running totals on change of month ? [N] entering Y for yes will give a ru<text:span text:style-name="T718">n</text:span>ning grand total of all hours just after the month totals option D.</text:p>
      <text:p text:style-name="P331"><text:span text:style-name="T444">You are now asked for </text:span>your name and license number but is free form so you can include any text and this will appear on the top of <text:span text:style-name="T396">all </text:span>report page<text:span text:style-name="T396">s as well as</text:span> to the CoE page if selected, <text:span text:style-name="T396">as </text:span><text:soft-page-break/><text:span text:style-name="T396">well as Airfield and Aircraft reporting</text:span>.<text:span text:style-name="T708"> The response will be saved in the file crew.dat and for all later usage of this will start with the information you entered last time which you can amend as needed.</text:span></text:p>
      <text:p text:style-name="P331"/>
      <text:p text:style-name="P331">These questions for name and license, will not appear if you have already entered the <text:span text:style-name="T444">u</text:span>ser data through menu options “(U) Enter User details for Reports" during this run of Flightlog for selection of options C, <text:span text:style-name="T444">D</text:span> or <text:span text:style-name="T444">E</text:span>. It does save the details after ending the program. In my case, I add the log book and page numbers in <text:span text:style-name="T444">for </text:span>interim reporting<text:span text:style-name="T628"> while still needing to add more entries</text:span>.</text:p>
      <text:p text:style-name="P331"/>
      <text:p text:style-name="P593">For v2.02 there are two <text:span text:style-name="T653">(hidden) </text:span>extra menu options<text:span text:style-name="T672">,</text:span> 3 and 4 that can be used in place of C and D respectively. The <text:span text:style-name="T672">only</text:span> difference is that the Airfield name appears on the report instead of the ICAO code. The<text:span text:style-name="T660">y</text:span> are not displayed on the menu as they are present for you to test to see if you prefer names<text:span text:style-name="T653"> instead of ICAO codes</text:span>. <text:span text:style-name="T653">Commercial and possibly military crews would normally use the ICAO codes</text:span><text:span text:style-name="T708"> and many private pilots also prefer to use this method of recording airfields</text:span><text:span text:style-name="T653">. </text:span>The problem here is that the report width is a lot longer and may no longer fit on a A4 page and <text:span text:style-name="T653">definitely</text:span> not on a Letter page<text:span text:style-name="T653"> according to my calculations but your mileage may differ</text:span>.<text:span text:style-name="T653"> <text:s/>If you do prefer it send as an email saying so and it will be put into the displayed menu options, but let us know your license type as well.</text:span></text:p>
      <text:p text:style-name="P593"/>
      <text:p text:style-name="P594">Of course if the report does overflow the width you can change the prtpdf.sh script to reduce the size of the font used but only change it ONE POINT at a time when testing as it is too easy to over do it.<text:span text:style-name="T708"> For airfields that do not have a ICAO coding I use the abbreviate starting ZAAA etc.</text:span></text:p>
      <text:p text:style-name="P633">This way if an airfield get one in the future, you can do a simple change to replace all entries that used say ZAAD with LNPP etc - Nice and easy.</text:p>
      <text:p text:style-name="P595">Warning: <text:s/>Totals reporting at start and end page as well as monthly is not effected by this or any other variation to the normal so it is very possible that the layout for these looks odd - This will be fixed after a number of users report advising their opinion of the options 3 &amp; 4, otherwise they <text:span text:style-name="T708">may well </text:span>be removed in a later version of Flightlog. </text:p>
      <text:p text:style-name="P119"/>
      <text:p text:style-name="P297"><text:span text:style-name="T277">Note</text:span><text:span text:style-name="T281">:</text:span><text:span text:style-name="T277"> </text:span><text:span text:style-name="T279">A</text:span><text:span text:style-name="T278">ll</text:span><text:span text:style-name="T277"> reports</text:span><text:span text:style-name="T280"> produced by Flightlog</text:span><text:span text:style-name="T277"> are sent to the file named logbook.rpt and this file you can send to you</text:span><text:span text:style-name="T281">r</text:span><text:span text:style-name="T277"> printer or use the supplied script prtpdf.sh to create a PDF version of the report that in turn can be printed </text:span><text:span text:style-name="T281">or viewed </text:span><text:span text:style-name="T277">if needed</text:span><text:span text:style-name="T281">,</text:span><text:span text:style-name="T280"> and this is the recommended procedure</text:span><text:span text:style-name="T277">.</text:span></text:p>
      <text:p text:style-name="P70"/>
      <text:p text:style-name="P120">The reports produced by menu options C &amp; D contain at the top and bottom the sub totals (reading from left to right) three columns for Instruction times of Day, Night and Total if flight instruction present in log book records up to that point. <text:s/></text:p>
      <text:p text:style-name="P120"/>
      <text:p text:style-name="P120">Followed by Grand totals as Brought forward figures at the top of page and Carried forward figures at the bottom of each page consisting of Day x1, x2 &amp; x3 then night the same followed by , IFR and Multi engine totals over two lines with hours at the top and minutes on the next line. In between the Grand totals are the individual flights broken down as day and night x1, x2 &amp; x3 IFR and multi times.</text:p>
      <text:p text:style-name="P120"/>
      <text:p text:style-name="P120">The monthly sub totals are the same as above bought and carried forward figures.</text:p>
      <text:p text:style-name="P120">After all flights are reported then comes depending on the menu option selected all airfields visited by name, last date visited and total visits to each with two per line.</text:p>
      <text:p text:style-name="P120"/>
      <text:p text:style-name="P120">The last block is a list of all aircraft flown<text:span text:style-name="T696">,</text:span> broken down by day and night x1, x2, x3, total, followed by IFR, Multi (engine), Inst(ructing) ending with date of last flight.</text:p>
      <text:p text:style-name="P120"/>
      <text:p text:style-name="P121"><text:soft-page-break/>x1, 2 &amp; 3 where x can be for P (Pilot), E (Engineer), R Radio officer, etc., but the headings will still shows as P1, 2 &amp; 3 regardless. <text:s/>Here there would be an issue to keep track of when the Capacity changed so it has been left as for Pilots but this can be changed if required, just ask<text:span text:style-name="T697"> as a total report at the end of the flight recording report section could have separate total break downs listed for each category.</text:span></text:p>
      <text:p text:style-name="P138">However jumping from one to another would be a problem and it is recommended that separate log books (in different directories) are maintained in this instance.</text:p>
      <text:p text:style-name="P301"/>
      <text:h text:style-name="P663" text:outline-level="2"><text:bookmark-start text:name="__RefHeading___Toc14516_2548604501"/>Option E – <text:s/>Analysis &amp; Totals Report<text:bookmark-end text:name="__RefHeading___Toc14516_2548604501"/></text:h>
      <text:p text:style-name="P65"/>
      <text:p text:style-name="P7">This provide<text:span text:style-name="T718">s</text:span> a report showing the flight totals <text:span text:style-name="T396">for Grand, and each of the capacity categories, </text:span>followed by an aircraft report. <text:span text:style-name="T397">This is the same as produced for option F </text:span></text:p>
      <text:p text:style-name="P74">Handy for a quick totals check against your log book.</text:p>
      <text:p text:style-name="P74"/>
      <text:p text:style-name="P7">It does request the name and license number first for the Aircraft page/s <text:span text:style-name="T337">if not previously entered</text:span>.<text:span text:style-name="T550"> This will produce a lists of all Airfields, visited or not</text:span><text:span text:style-name="T718">,</text:span><text:span text:style-name="T550"> in ICAO code order.</text:span></text:p>
      <text:p text:style-name="P7"/>
      <text:p text:style-name="P7"/>
      <text:h text:style-name="P664" text:outline-level="2"><text:bookmark-start text:name="__RefHeading___Toc14518_2548604501"/>Option <text:span text:style-name="T337">F</text:span> – <text:s/>Analysis &amp; Totals <text:span text:style-name="T337">Display</text:span><text:bookmark-end text:name="__RefHeading___Toc14518_2548604501"/></text:h>
      <text:p text:style-name="P3"/>
      <text:p text:style-name="P8">This provides as a display exactly the same as option E. <text:span text:style-name="T487">See Figure 2.</text:span></text:p>
      <text:p text:style-name="P8"/>
      <text:p text:style-name="P9">If the displayed data exceeds a screen then you are requested to press <text:span text:style-name="T444">enter</text:span> for the next block of data otherwise return for the menu. <text:span text:style-name="T397">It will not ask for pilot details as in option E. Useful to see on screen, the totals to compare against your paper log book. This will produce a lists of all Airfields, visited or not in ICAO code order.</text:span></text:p>
      <text:p text:style-name="P10"/>
      <text:p text:style-name="Text_20_body"/>
      <text:h text:style-name="P665" text:outline-level="2"/>
      <text:h text:style-name="P667" text:outline-level="2"><text:bookmark-start text:name="__RefHeading___Toc14520_2548604501"/>Option <text:span text:style-name="T338">G</text:span> – <text:s/>Cert of Ext. Analysis Report<text:bookmark-end text:name="__RefHeading___Toc14520_2548604501"/></text:h>
      <text:p text:style-name="P4"/>
      <text:p text:style-name="P250"><text:span text:style-name="T260">This option </text:span><text:span text:style-name="T263">like the other reports is added </text:span><text:span text:style-name="T260">to any existing reports</text:span><text:span text:style-name="T275"> and</text:span><text:span text:style-name="T260"> will provide, assuming there is flight records going back far enough give statistics</text:span><text:span text:style-name="T275">,</text:span><text:span text:style-name="T260"> for 1, 3, <text:s/>6 and 13 months for your log book or licence entry stamps starting backwards from </text:span><text:span text:style-name="T263">the </text:span><text:span text:style-name="T260">supplied date that you will be asked for </text:span><text:span text:style-name="T263">as in the example below here using</text:span> – [<text:span text:style-name="T444">1</text:span>1/<text:span text:style-name="T444">1</text:span>0/198<text:span text:style-name="T444">7</text:span>]. <text:span text:style-name="T397">Note that if your flights do not go back beyond a CoE point where the totals are all zero this report will finish.</text:span></text:p>
      <text:p text:style-name="P64"/>
      <text:p text:style-name="P11">The Date request<text:span text:style-name="T444">ed</text:span> will be in the format as all dates are, from the environment variable of LC_TIME as discussed in the manual<text:span text:style-name="T672">, see under program set up later in </text:span><text:span text:style-name="T672"><text:bookmark-ref text:reference-format="chapter" text:ref-name="__RefHeading___Toc10977_2975102684">11.6.4</text:bookmark-ref></text:span><text:span text:style-name="T672"><text:s/></text:span><text:span text:style-name="T672"><text:bookmark-ref text:reference-format="text" text:ref-name="__RefHeading___Toc10977_2975102684">Setting of LC_TIME for your preferred date format.</text:bookmark-ref></text:span></text:p>
      <text:p text:style-name="P11"/>
      <text:p text:style-name="P11">It always start<text:span text:style-name="T397">s</text:span> with today’s date so amend it as needed. This is the date used to count backwards for the req<text:span text:style-name="T339">u</text:span>ired <text:span text:style-name="T444">flight </text:span>data.</text:p>
      <text:p text:style-name="P11"/>
      <text:p text:style-name="P11">Here is an example of the output :</text:p>
      <text:p text:style-name="P11"/>
      <text:p text:style-name="P392">LOG BOOK (2.01.17)        Cert. of Experiences for                                                  21/11/2018  00:43:54    PAGE   1 </text:p>
      <text:p text:style-name="P190"><text:line-break/>The following to be read in conju<text:span text:style-name="T709">n</text:span>ction with the Aircraft report page/s </text:p>
      <text:p text:style-name="P190">     Active date used for all Certificate of Experience data is 11/10/1987 <text:line-break/><text:line-break/>           -------- DAY FLYING ---------      ------- NIGHT FLYING -------- <text:line-break/>CoE Type    P1      P2     P3    Inst. Flts    P1      P2     P3    Inst. Flts    TOTAL     (IFR   Single    Multi   Inst.)</text:p>
      <text:p text:style-name="P189"/>
      <text:p text:style-name="P189"/>
      <text:p text:style-name="P189">1 Month    33.50           0.00  10.10   21   20.50           0.00   1.00    8    54.40    37.20    54.40             11.10<text:line-break/>3 Months   71.45           0.00  42.55   72   22.00           0.00   2.10   12    93.45    43.10    93.45             45.05<text:line-break/>6 Months  143.55           0.00 100.35  153   29.10           0.00   3.25   18   173.05    54.50   171.50     1.15   104.00<text:line-break/>13 Mths   209.40           0.00 134.15  228   54.10           0.00  10.00   41   263.50    71.25   262.35     1.15   144.15<text:line-break/></text:p>
      <text:p text:style-name="P93">Figure 7 - CoE report</text:p>
      <text:p text:style-name="P13"/>
      <text:p text:style-name="P12">Sorry about that, had to make the font <text:span text:style-name="T340">6.5</text:span> pt so it fits on <text:span text:style-name="T397">A4 and letter </text:span>page<text:span text:style-name="T672">s</text:span>.</text:p>
      <text:p text:style-name="P280"/>
      <text:p text:style-name="P550">As you can see the information for each period, both for day and night includes capacity counts for P1, P2 and P3, <text:span text:style-name="T575">instructor,</text:span> with number of flights<text:span text:style-name="T672">,</text:span> <text:span text:style-name="T575">next is totals for time, </text:span>IFR, Single and multi engine finishing with Instructor. <text:span text:style-name="T575">The flight count can act as a minimum for number of landing but this will not allow for T &amp; G (Touch and go) flights. If you record these in the remarks they can be seen and checked if needed.</text:span></text:p>
      <text:p text:style-name="P181"/>
      <text:p text:style-name="P550"/>
      <text:h text:style-name="P668" text:outline-level="2"><text:bookmark-start text:name="__RefHeading___Toc14522_2548604501"/>Option <text:span text:style-name="T340">H</text:span> – <text:s/>Change Log Book Airfield <text:span text:style-name="T445">C</text:span>ode<text:bookmark-end text:name="__RefHeading___Toc14522_2548604501"/></text:h>
      <text:p text:style-name="P5"/>
      <text:p text:style-name="P335"><text:span text:style-name="T260">A</text:span><text:span text:style-name="T243">s discussed earlier, this option will allow you to change an Airfield ICAO code for another, replacing the original in the Airfield data file, as well as all instances of where it is used in all flight log records. This mean </text:span><text:span text:style-name="T264">that </text:span><text:span text:style-name="T243">if you only have an error in a few flights but not all of them use Option B – <text:s/>Amend Log Book Data </text:span><text:span text:style-name="T261">instead.</text:span></text:p>
      <text:p text:style-name="P6"/>
      <text:p text:style-name="P91"><draw:frame draw:style-name="fr3" draw:name="Image7" text:anchor-type="paragraph" svg:width="14.383cm" svg:height="12.866cm" draw:z-index="4"><draw:image xlink:href="Pictures/100000000000036800000312203E7489.png" xlink:type="simple" xlink:show="embed" xlink:actuate="onLoad" draw:mime-type="image/png"/></draw:frame>Figure <text:span text:style-name="T560">8</text:span> – Global change of Airfield</text:p>
      <text:p text:style-name="P6"/>
      <text:p text:style-name="P72">If in doubt about using this option, make a back up of your data files first and that could mean running menu 1 option S<text:span text:style-name="T655"> (</text:span><text:span text:style-name="T655"><text:bookmark-ref text:reference-format="chapter" text:ref-name="__RefHeading___Toc10428_2406473622">6.9</text:bookmark-ref></text:span><text:span text:style-name="T655">)</text:span> - <text:s/>Create Sequential files from ISAM just do not do it again until you have verified the flight log data via the options C or D reporting, and examined the records in error to verify it did what you were expecting, and no more.<text:span text:style-name="T654"> Also see option J for more information on this regarding recovering your data if it was in error.</text:span></text:p>
      <text:p text:style-name="P6"/>
      <text:p text:style-name="P6"/>
      <text:h text:style-name="P668" text:outline-level="2"><text:bookmark-start text:name="__RefHeading___Toc14524_2548604501"/>Option <text:span text:style-name="T340">J</text:span> – <text:s/>Change Log Book Aircraft Type<text:bookmark-end text:name="__RefHeading___Toc14524_2548604501"/></text:h>
      <text:p text:style-name="P5"/>
      <text:p text:style-name="P334"><text:span text:style-name="T260">A</text:span><text:span text:style-name="T243">s discussed earlier, this option will allow you to change an Air</text:span><text:span text:style-name="T261">craft</text:span><text:span text:style-name="T243"> </text:span><text:span text:style-name="T261">type</text:span><text:span text:style-name="T243"> for another, replacing the original in the Air</text:span><text:span text:style-name="T261">craft</text:span><text:span text:style-name="T243"> data file, as well as all instances of where it is used in all flight log records. This mean </text:span><text:span text:style-name="T264">that </text:span><text:span text:style-name="T243">if you only have an error in a few flights but not all of them, </text:span><text:span text:style-name="T276">use</text:span><text:span text:style-name="T243"> Option B - Amend Log Book Data </text:span><text:span text:style-name="T261">instead.</text:span></text:p>
      <text:p text:style-name="P29"/>
      <text:p text:style-name="P30"><draw:frame draw:style-name="fr3" draw:name="Image8" text:anchor-type="paragraph" svg:width="14.28cm" svg:height="12.215cm" draw:z-index="5"><draw:image xlink:href="Pictures/100000000000030F000002D6B8168F6B.png" xlink:type="simple" xlink:show="embed" xlink:actuate="onLoad" draw:mime-type="image/png"/></draw:frame>Figure <text:span text:style-name="T560">9</text:span> – Global change of Aircraft type</text:p>
      <text:p text:style-name="P29"/>
      <text:p text:style-name="P35">This also applies to menu option H.</text:p>
      <text:p text:style-name="P35"/>
      <text:p text:style-name="P73">If in doubt about using this option, make a back up of your data files first and that could mean running option “S - <text:s/>Create Sequential files from ISAM" just do not do it again until you have verified the flight log data via the options C or D reporting, and examined the records in error to verify it did what you were expecting, and no more.<text:span text:style-name="T654"> <text:s/>If you have made a mistake and it has done a global change you can recover assuming you did use option S, by deleting the three .dat files, aircraft, airfield and flitelog having checked that the files ending with extensions .seq exist.</text:span></text:p>
      <text:p text:style-name="P73"/>
      <text:p text:style-name="P117">Flightlog <text:span text:style-name="T709">when started, </text:span>will see that these data files do not exist and if the sequential one's do exist will read these and create the indexed .dat data files so no data has been lost just a few seconds of your time.</text:p>
      <text:p text:style-name="P17"/>
      <text:h text:style-name="P663" text:outline-level="2"><text:bookmark-start text:name="__RefHeading___Toc10426_2406473622"/>Option K - <text:s/>Edit Airfield Name<text:bookmark-end text:name="__RefHeading___Toc10426_2406473622"/></text:h>
      <text:p text:style-name="P24"/>
      <text:p text:style-name="P25">A facility to allow you to <text:span text:style-name="T446">just work on the Airfield records, but with the CSV record types 4 &amp; 5 for adding airfield and aircraft details, some of these facilities are available via other options but it is a one place area to Delete or Amend an airfield as well as to View or List them as this will give <text:s text:c="2"/>a full list of every airfield stored in the system as the log book reporting options C &amp; D omit airfields not visited according to the current flight records.</text:span></text:p>
      <text:p text:style-name="P32"/>
      <text:p text:style-name="P33">Like the main menu, the action letter is only required<text:span text:style-name="T718">,</text:span> without pressing the return key.</text:p>
      <text:p text:style-name="P32"><draw:frame draw:style-name="fr2" draw:name="Image9" text:anchor-type="paragraph" svg:x="1.76cm" svg:y="1cm" svg:width="14.483cm" svg:height="10.657cm" draw:z-index="8"><draw:image xlink:href="Pictures/10000000000002C0000002D464CEF622.png" xlink:type="simple" xlink:show="embed" xlink:actuate="onLoad" draw:mime-type="image/png"/></draw:frame></text:p>
      <text:p text:style-name="P32"/>
      <text:p text:style-name="P62">Figure <text:span text:style-name="T560">10</text:span> – Edit Airfield Name</text:p>
      <text:p text:style-name="P32"/>
      <text:p text:style-name="P32">The Action options are:</text:p>
      <text:p text:style-name="P25"/>
      <text:p text:style-name="P25"><text:span text:style-name="T42">A</text:span><text:span text:style-name="T446"> to amend</text:span> a<text:span text:style-name="T447">n</text:span> Airfield name<text:span text:style-name="T573"> followed by </text:span>the ICAO code and <text:span text:style-name="T573">return</text:span>.</text:p>
      <text:p text:style-name="P26">The current name is shown, and you can <text:span text:style-name="T449">now</text:span> <text:span text:style-name="T449">change</text:span> it, followed by <text:span text:style-name="T573">return</text:span> when done.</text:p>
      <text:p text:style-name="P34">Use the cursor left and right keys to move the cursor without changing characters. Press the Ins(ert) key to add text at the cursor position but do not forget to press Insert key again when finished text.</text:p>
      <text:p text:style-name="P248"/>
      <text:p text:style-name="P248">Here note that any text to the right will move one place to the right for each new character entered and if the right most character is at the end of the data block<text:span text:style-name="T573">,</text:span> no fu<text:span text:style-name="T573">rther</text:span> data can be entered so press the I<text:span text:style-name="T573">nsert</text:span> key again to turn off insert mode.</text:p>
      <text:p text:style-name="P248"/>
      <text:p text:style-name="P123"><text:span text:style-name="T23">D</text:span> to delete a record but make sure you are <text:span text:style-name="T23">not</text:span> using it anywhere in your flight records <text:span text:style-name="T446">as you will not get any warning if you are. Useful if you entered an incorrect code for an airfield but went into Flight log Amend mode and then changed the code but you know, you will not be reusing what was originally entered. The Amend mode does not delete airfields previously entered in case there are other flights that do use it.</text:span></text:p>
      <text:p text:style-name="P123"><text:soft-page-break/></text:p>
      <text:p text:style-name="P123"><text:span text:style-name="T23">I</text:span> <text:s/>to <text:span text:style-name="T450">Insert (</text:span>create<text:span text:style-name="T450">)</text:span> a new record with ICAO code and name. <text:span text:style-name="T450">You can, when loading in a few or many, use the CSV record type 4 and this can be run along with type 5 for aircraft types without any CSV definitions etc., or to process a CSV data file.</text:span></text:p>
      <text:p text:style-name="P123"/>
      <text:p text:style-name="P124"><text:span text:style-name="T23">L</text:span> to produce a listing of <text:span text:style-name="T38">all</text:span><text:span text:style-name="T550"> </text:span>Airfields<text:span text:style-name="T550"> in ICAO code order however, flight counts will be zero or blank. if the analysis has not been run previously and that is the time when the counting occurs. The ICAO code entry is ignored so leave it blank. </text:span></text:p>
      <text:p text:style-name="P124"/>
      <text:p text:style-name="P134">If you have run an Option C or D report, the count will be present.</text:p>
      <text:p text:style-name="P123"/>
      <text:p text:style-name="P123"><text:span text:style-name="T23">V</text:span> <text:span text:style-name="T572">For View will </text:span>produce a display of Airfields<text:span text:style-name="T572"> similar to data entry or amend</text:span> <text:span text:style-name="T572">using the F1 key.</text:span></text:p>
      <text:p text:style-name="P122"/>
      <text:p text:style-name="P123">For both V <text:s/>– entering a code will just report on the one <text:span text:style-name="T446">ICAO code </text:span>specified<text:span text:style-name="T572"> otherwise all of them, but for L will be ignored and do a full listing.</text:span></text:p>
      <text:p text:style-name="P123"/>
      <text:p text:style-name="P123"><text:span text:style-name="T23">X</text:span> to quit or use Escape key.</text:p>
      <text:h text:style-name="P663" text:outline-level="2"><text:bookmark-start text:name="__RefHeading___Toc10428_2406473622"/>Option S - <text:s/>Create Sequential files from ISAM<text:bookmark-end text:name="__RefHeading___Toc10428_2406473622"/></text:h>
      <text:p text:style-name="P126"/>
      <text:p text:style-name="P127">Selecting this option will create a sequential file for each of the indexed (ISAM) file<text:span text:style-name="T576">s</text:span> namely flitelog, aircraft and airfield.</text:p>
      <text:p text:style-name="P127"/>
      <text:p text:style-name="P131">Indexed files have a search key that makes accessing a specific record fast and the key used, is different for each file and these are:</text:p>
      <text:p text:style-name="P131">Flitelog<text:tab/><text:tab/>- Flight Date and start time <text:span text:style-name="T509">(</text:span>in form yyyymmddmmmm<text:span text:style-name="T509">)</text:span> where mmmm is</text:p>
      <text:p text:style-name="P132"><text:tab/><text:tab/><text:tab/> <text:s/>actual time from (hh:mm) <text:span text:style-name="T676">(This is </text:span>converted to minutes past midnight<text:span text:style-name="T676"> on</text:span></text:p>
      <text:p text:style-name="P132"><text:span text:style-name="T676"><text:tab/><text:tab/><text:tab/> <text:s/>the file record)</text:span>.</text:p>
      <text:p text:style-name="P131">Airfield<text:tab/><text:tab/>- The ICAO code for the airport or airfield of 4 digits A-Z.</text:p>
      <text:p text:style-name="P131">Aircraft<text:tab/><text:tab/>- The ICAO code for the specific aircraft of 4 to 8 digits A-Z, 0-9. -.</text:p>
      <text:p text:style-name="P136"><text:tab/><text:tab/><text:tab/>Common practice is to use the manufacturers type coding such as for a</text:p>
      <text:p text:style-name="P706"><text:tab/><text:tab/><text:tab/>Piper Ch<text:span text:style-name="T676">e</text:span>rokee - PA28-140 or Piper Dakota - PA28-236<text:span text:style-name="T730">, </text:span></text:p>
      <text:p text:style-name="P706"><text:span text:style-name="T730"><text:tab/><text:tab/><text:tab/>Boeing B737-800 - B378 </text:span><text:span text:style-name="T676"><text:s/>etc</text:span>.</text:p>
      <text:p text:style-name="P131"/>
      <text:p text:style-name="P127"><text:span text:style-name="T576">After selecting this option, </text:span>It will come back to the menu prompt <text:span text:style-name="T489">without any extra screen output </text:span>– <text:s/>it is very quick. <text:span text:style-name="T576">The three files will have been created with any previous versions over written so if you wish to retain the previous version you must back them up by copying the files to another directory location.</text:span></text:p>
      <text:p text:style-name="P123"/>
      <text:p text:style-name="P128">These <text:span text:style-name="T725">sequential </text:span>files, other than another layer of back up are in case you wish to migrate the <text:span text:style-name="T507">F</text:span>lightlog software and the data to another platform, <text:span text:style-name="T674">i</text:span>.e., Windows to Linux, or to use another indexed file handler by recompiling Flightlog having <text:span text:style-name="T447">installed and </text:span>configured the new <text:span text:style-name="T576">(</text:span>ISAM<text:span text:style-name="T576">)</text:span> handler<text:span text:style-name="T655"> in the GnuCobol compiler and rebuilt the compiler</text:span>. <text:span text:style-name="T508">This assumes you are using the source file and not the executable.</text:span></text:p>
      <text:p text:style-name="P128"/>
      <text:p text:style-name="P137">The file Crew.dat is not converted at all as it is easy to create the next time you run the program and create a report. </text:p>
      <text:p text:style-name="P129"/>
      <text:p text:style-name="P129">If migrating from using files to a rdbms system such as MySQL you will <text:span text:style-name="T576">also </text:span>need to <text:span text:style-name="T576">run this option</text:span>.</text:p>
      <text:p text:style-name="P130"/>
      <text:p text:style-name="P112">Note th<text:span text:style-name="T488">e</text:span> option <text:span text:style-name="T451">(using Mysql) </text:span><text:s/>is not currently available – <text:span text:style-name="T451">It is s</text:span>ubject to demand <text:span text:style-name="T576">from users</text:span>.</text:p>
      <text:p text:style-name="P133"/>
      <text:p text:style-name="P133">If an updated version of Flightlog is issued that <text:span text:style-name="T576">involves any changes to any of the files, a supplied </text:span>convert program <text:span text:style-name="T577">will need </text:span>to be run <text:span text:style-name="T577">and this</text:span> program will more than likely want to use the current sequential file copy of the ISAM file<text:span text:style-name="T674">s</text:span> so that it can create <text:span text:style-name="T577">the updated file</text:span><text:span text:style-name="T719"> or files</text:span>.<text:span text:style-name="T719"> This does not happen often.</text:span></text:p>
      <text:p text:style-name="P133"/>
      <text:p text:style-name="P133">This means that if there is a file <text:span text:style-name="T574">called UPDATE </text:span>included with<text:span text:style-name="T574">in</text:span> <text:span text:style-name="T574">the</text:span> Flightlog update<text:span text:style-name="T574"> archive,</text:span> this will specify the process<text:span text:style-name="T577">es</text:span> to be done both before and after running <text:span text:style-name="T577">the </text:span>convert program<text:span text:style-name="T719"> and before and after updating Flightlog.</text:span></text:p>
      <text:p text:style-name="P135"/>
      <text:p text:style-name="P135">You will need to run the Flightlog menu option S first, before starting any update processes <text:span text:style-name="T577">but check what is specified in the UPDATE text file so remember to always read it</text:span><text:span text:style-name="T709"> and the text file README.1st</text:span><text:span text:style-name="T577">, if </text:span><text:span text:style-name="T709">one or other is </text:span><text:span text:style-name="T577">present</text:span>.</text:p>
      <text:p text:style-name="P125"/>
      <text:h text:style-name="P669" text:outline-level="2"><text:bookmark-start text:name="__RefHeading___Toc14526_2548604501"/>Option T – <text:s/>Import CSV <text:span text:style-name="T483">D</text:span>ata and <text:span text:style-name="T448">P</text:span>aram<text:span text:style-name="T448">eter</text:span>s<text:bookmark-end text:name="__RefHeading___Toc14526_2548604501"/></text:h>
      <text:p text:style-name="P18"/>
      <text:p text:style-name="P336"><text:span text:style-name="T245">T</text:span><text:span text:style-name="T244">his function allow</text:span><text:span text:style-name="T254">s</text:span><text:span text:style-name="T244"> you to import a company supplied CSV (Comma Delimited data </text:span><text:span text:style-name="T253">f</text:span><text:span text:style-name="T244">ile) containing record</text:span><text:span text:style-name="T250">s</text:span><text:span text:style-name="T244"> of all your flights over a period of time.</text:span></text:p>
      <text:p text:style-name="P336"><text:span text:style-name="T244">Well that’s </text:span><text:span text:style-name="T248">how </text:span><text:span text:style-name="T244">the theory goes, as what they </text:span><text:span text:style-name="T258">can</text:span><text:span text:style-name="T244"> supply is a file, containing the records for all flight crew. If that is the case, then Flightlog can handle it, providing you have set up the CSV Layout records correctly </text:span><text:span text:style-name="T253">see </text:span><text:span text:style-name="T250">record </text:span><text:span text:style-name="T253">type </text:span><text:span text:style-name="T250">6</text:span><text:span text:style-name="T244">.</text:span></text:p>
      <text:p text:style-name="P19"/>
      <text:p text:style-name="P336"><text:span text:style-name="T244">Read chapter </text:span><text:span text:style-name="T244"><text:bookmark-ref text:reference-format="chapter" text:ref-name="__RefHeading___Toc1039_2548604501">7</text:bookmark-ref></text:span><text:span text:style-name="T244"><text:s/></text:span><text:span text:style-name="T244"><text:bookmark-ref text:reference-format="text" text:ref-name="__RefHeading___Toc1039_2548604501">CSV Parameter Structure</text:bookmark-ref></text:span><text:span text:style-name="T244"><text:s/></text:span><text:span text:style-name="T246">page </text:span><text:span text:style-name="T246"><text:bookmark-ref text:reference-format="page" text:ref-name="__RefHeading___Toc1039_2548604501">36</text:bookmark-ref></text:span><text:span text:style-name="T246"><text:s/>where it discusses in detail how to create th</text:span><text:span text:style-name="T248">e</text:span><text:span text:style-name="T246">s</text:span><text:span text:style-name="T248">e</text:span><text:span text:style-name="T246"> important layout records that describe the data </text:span><text:span text:style-name="T248">file</text:span><text:span text:style-name="T246"> you have </text:span><text:span text:style-name="T250">or will </text:span><text:span text:style-name="T246">receive.</text:span></text:p>
      <text:p text:style-name="P20"/>
      <text:p text:style-name="P338"><text:span text:style-name="T244">This is needed</text:span><text:span text:style-name="T249">,</text:span><text:span text:style-name="T244"> as companies supply different data with both Dates and </text:span><text:span text:style-name="T248">T</text:span><text:span text:style-name="T244">imes formats that can vary widely between them. Sounds more daunting than it really is, but will need </text:span><text:span text:style-name="T248">you </text:span><text:span text:style-name="T244">to look at the first few CSV data records when creating the layout record type 1, <text:s/>2 </text:span><text:span text:style-name="T248">and possibly 3 and 6 if needed</text:span><text:span text:style-name="T244">. </text:span><text:span text:style-name="T248">By examining the received file you can also confirm that it is a data format that you can see, if not or it is blank or junk characters, you </text:span><text:span text:style-name="T253">may well </text:span><text:span text:style-name="T248">have have been sent a mainframe created file in EBCDIC format instead of the one used on PC type computers as ASCII </text:span><text:span text:style-name="T250">(see </text:span><text:span text:style-name="T250"><text:bookmark-ref text:reference-format="text" text:ref-name="__RefHeading___Toc16585_2548604501">CSV Overview</text:bookmark-ref></text:span><text:span text:style-name="T250"><text:s/>page </text:span><text:span text:style-name="T250"><text:bookmark-ref text:reference-format="page" text:ref-name="__RefHeading___Toc16585_2548604501">36</text:bookmark-ref></text:span><text:span text:style-name="T250">)</text:span><text:span text:style-name="T248">, in which case you will need to convert it first or ask the company for an ASCII data file. </text:span><text:span text:style-name="T253">This should not happen but just in case one company does </text:span><text:span text:style-name="T257">do </text:span><text:span text:style-name="T253">it.</text:span></text:p>
      <text:p text:style-name="P21"/>
      <text:p text:style-name="P22">See the supplied example in the manual <text:span text:style-name="T509">of the configuration data, </text:span>along with a sample CSV data file that matches up with each other.</text:p>
      <text:p text:style-name="P22"><text:span text:style-name="T447">For the first time of using a CSV data file, it is </text:span><text:span text:style-name="T34">strongly</text:span><text:span text:style-name="T447"> recommended that you work from a new directory for testing i.e., creating a new directory in the one used with Flightlog say, called csv-testing. Copy the CSV data and parameter files to it, start Flightlog and having run the Import CSV process, run option D and look at the logbook.rpt file to verify that all is good. <text:s/>If it is, then go back to the normal directory and run it again. If not</text:span><text:span text:style-name="T719">.</text:span><text:span text:style-name="T447"> find and fix the parameter error</text:span><text:span text:style-name="T719">'</text:span><text:span text:style-name="T447">s, using a text editor, then save the updated file, delete all files ending with .dat and rerun Flightlog again using options T and D again to check that your changes are spot on. See </text:span><text:span text:style-name="T447"><text:bookmark-ref text:reference-format="chapter" text:ref-name="__RefHeading___Toc10432_2406473622">7.2</text:bookmark-ref></text:span><text:span text:style-name="T447"><text:s/>for more information.</text:span></text:p>
      <text:p text:style-name="P21"/>
      <text:p text:style-name="P28">If you are still having issues and have registered Flightlog, you can supply <text:span text:style-name="T731">me</text:span> with both files (as <text:span text:style-name="T675">an </text:span>email file attachment) and we will try and fix it for you but using the same process as above. </text:p>
      <text:p text:style-name="P31"/>
      <text:p text:style-name="P31">If you wish to send such an archive change the file name to your surname, initials and licence number., i.e., “coenvb-atpl123456.zip", just in case some one else does the same, and use this name in any email <text:s/>to <text:span text:style-name="T731">me</text:span>.</text:p>
      <text:p text:style-name="P707"/>
      <text:p text:style-name="P708">Note after this process is finished and the fixed files / archive is returned to you and that you have confirmed all is good etc., I will delete the supplied files.</text:p>
      <text:p text:style-name="P708"/>
      <text:p text:style-name="P708">I will NOT retain such information longer than required and it will never be passed on to any one, period. Hence my reasoning to delete all after fixing your problem.</text:p>
      <text:p text:style-name="P708"/>
      <text:h text:style-name="P670" text:outline-level="2"/>
      <text:h text:style-name="P671" text:outline-level="2"><text:bookmark-start text:name="__RefHeading___Toc14528_2548604501"/><text:span text:style-name="T262">Option U – <text:s/></text:span><text:span text:style-name="T243">Enter User details for Reports</text:span><text:bookmark-end text:name="__RefHeading___Toc14528_2548604501"/></text:h>
      <text:p text:style-name="P77"/>
      <text:p text:style-name="P337"><text:span text:style-name="T244">If you enter the name and license number here, it will save you the need to enter the same </text:span><text:span text:style-name="T247">information </text:span><text:span text:style-name="T244">when you request many of the reports. There again, you can just enter this </text:span><text:span text:style-name="T252">when</text:span><text:span text:style-name="T244"> you request a report.</text:span></text:p>
      <text:p text:style-name="P23"/>
      <text:p text:style-name="P346"><text:span text:style-name="T244">If should only request it once as Flightlog checks if this information is present before </text:span><text:span text:style-name="T248">requesting it</text:span><text:span text:style-name="T244">.</text:span><text:span text:style-name="T257"> <text:s/></text:span><text:span text:style-name="T255">The information entered, is saved to the file Crew.dat and is re-read as required for reporting</text:span><text:span text:style-name="T256">,</text:span><text:span text:style-name="T255"> any updates is also saved</text:span><text:span text:style-name="T256">,</text:span><text:span text:style-name="T255"> back to the file.</text:span></text:p>
      <text:p text:style-name="P21"/>
      <text:p text:style-name="P21"/>
      <text:h text:style-name="Heading_20_2" text:outline-level="2"><text:bookmark-start text:name="__RefHeading___Toc10430_2406473622"/>Option X - <text:s/>Quit Log Book System<text:bookmark-end text:name="__RefHeading___Toc10430_2406473622"/></text:h>
      <text:p text:style-name="P27"/>
      <text:p text:style-name="P27">Typing X or using the Escape key will quit the program closing all files.</text:p>
      <text:h text:style-name="P653" text:outline-level="1"/>
      <text:h text:style-name="P658" text:outline-level="1"><text:bookmark-start text:name="__RefHeading___Toc1039_2548604501"/>CSV Parameter Structure<text:bookmark-end text:name="__RefHeading___Toc1039_2548604501"/></text:h>
      <text:p text:style-name="P377"/>
      <text:h text:style-name="Heading_20_2" text:outline-level="2"><text:bookmark-start text:name="__RefHeading___Toc16585_2548604501"/><text:span text:style-name="T373">CSV </text:span>Overview<text:bookmark-end text:name="__RefHeading___Toc16585_2548604501"/></text:h>
      <text:p text:style-name="P480"/>
      <text:p text:style-name="P626">This facility is for commercial<text:span text:style-name="T719">, flight trainers, Instructors </text:span>and <text:span text:style-name="T719">possibly</text:span> military flight crews only<text:span text:style-name="T719">. P</text:span>rivate pilots will not need it.</text:p>
      <text:p text:style-name="P626"/>
      <text:p text:style-name="P487">Here we discus<text:span text:style-name="T496">s</text:span> the CSV <text:span text:style-name="T465">formatted data </text:span>file <text:span text:style-name="T484">which stands for </text:span>Comma Separated Value formatted <text:span text:style-name="T510">(another name is Comma Delimited) </text:span>file <text:span text:style-name="T465">but herein, we will just refer to it as a CSV file. When requesting such a file from your company you must tell them you want a file in CSV data format.</text:span></text:p>
      <text:p text:style-name="P487"/>
      <text:p text:style-name="P488">Next is the format for a CSV file and here<text:span text:style-name="T719">,</text:span> they can vary somewhat<text:span text:style-name="T731">,</text:span> so at the basic level, each field is <text:span text:style-name="T39">always</text:span><text:span text:style-name="T510"> </text:span>separated by a comma <text:span text:style-name="T586">except the last one</text:span> and <text:span text:style-name="T484">can be </text:span>in quotes but they do not have to be, so in record type 1 definitions it is ‘assumed’ that all have quotes between text regardless of alphabetic text or numeric but they can also not have quotes at all. <text:span text:style-name="T510">Flightlog will check for both possibilities including using double and single quotes ( “ and ‘ ).</text:span></text:p>
      <text:p text:style-name="P487"/>
      <text:p text:style-name="P298"><text:span text:style-name="T58">For commercial flight crews, this will allow you to import a *A</text:span>irline <text:span text:style-name="T719">or FTO </text:span>supplied <text:span text:style-name="T373">file containing your </text:span>flight records supplied <text:span text:style-name="T351">in </text:span>a CSV <text:span text:style-name="T465">formatted file</text:span> into <text:span text:style-name="T373">Flightlog</text:span>. <text:span text:style-name="T710">This s</text:span>aves typing<text:span text:style-name="T710"> them all</text:span>.</text:p>
      <text:p text:style-name="P298"><text:span text:style-name="T316">Make sure you get them often enough as for one </text:span>company, I used <text:span text:style-name="T731">to </text:span><text:span text:style-name="T373">get them every </text:span>5 – 6 months and then they went bust in the middle of a gap, between getting them. Keep it to <text:span text:style-name="T457">a month</text:span> or <text:span text:style-name="T484">even </text:span>less. <text:span text:style-name="T484">If you can, get them so they include the last day of the previous month or week.</text:span><text:span text:style-name="T731"> You should still maintain your own log book of one type or another, just in case.</text:span></text:p>
      <text:p text:style-name="P299">*<text:span text:style-name="T318">Some Flight training establishments and Executive Hire </text:span>businesses also supply th<text:span text:style-name="T457">e</text:span>s<text:span text:style-name="T457">e</text:span> on request. <text:span text:style-name="T318">Make sure you get the file as ASCII (used with PC’s) </text:span>and not in IBM mainframe format otherwise you will have to find software to do it for you, prior to use with Flightlog<text:span text:style-name="T710"> but note that there is a function with the mainframe data transfer software to convert EBCDIC to ASCII during the transfer</text:span><text:span text:style-name="T731"> - don't worry, your employer can do this</text:span><text:span text:style-name="T710">.</text:span></text:p>
      <text:p text:style-name="P299"/>
      <text:p text:style-name="P726">Technical information: </text:p>
      <text:p text:style-name="P606">Flightlog can do this conversion but only if each CSV record is terminated with PC standard values (CR, LF [ hex 0d 0a ]) or for *nix systems just (hex 0a = LF). If they are only available directly from the mainframe this might be somewhat difficult. When using a *nix or Linux system to run Flightlog it can handle both types.</text:p>
      <text:p text:style-name="P497"/>
      <text:p text:style-name="P498">Most <text:span text:style-name="T578">companies</text:span>, create this data from aircraft technical or flight operation logs, held on servers, so they should always supply it as ASCII. It would be rare for them to use mainframes for this purpose but, you never know. <text:span text:style-name="T510">This information is mostly created by you as flight crew as you have to fill in date and times (and may be flight crew names) and other data, etc., on to your flight document/s that are handed in to operations but it may well not include day and night flight times</text:span><text:span text:style-name="T710"> although </text:span><text:span text:style-name="T719">often</text:span><text:span text:style-name="T710"> does</text:span><text:span text:style-name="T510">.</text:span></text:p>
      <text:p text:style-name="P265"/>
      <text:p text:style-name="P525">Th<text:span text:style-name="T584">e</text:span> <text:span text:style-name="T584">CSV data f</text:span>acility can be <text:span text:style-name="T578">also be </text:span>used by <text:span text:style-name="T74">all</text:span> flight crew<text:span text:style-name="T677">s</text:span> who wish to add into Flightlog, a large number of airfields in one go<text:span text:style-name="T677">,</text:span> such as <text:span text:style-name="T510">the</text:span> modified list<text:span text:style-name="T510">s</text:span> from the Airfield text files supplied with Flightlog although, you will need to use a <text:span text:style-name="T677">"</text:span>text editor<text:span text:style-name="T677">"</text:span> to create the correct <text:span text:style-name="T496">format for </text:span>type 4 record<text:span text:style-name="T496">s</text:span>.</text:p>
      <text:p text:style-name="P525">You can do <text:span text:style-name="T496">the same</text:span> with Aircraft types if needed. <text:span text:style-name="T511">These two record types can be imported by themselves with no </text:span><text:span text:style-name="T710">other </text:span><text:span text:style-name="T511">CSV data, just create a configuration file containing what is needed.</text:span></text:p>
      <text:p text:style-name="P264"/>
      <text:p text:style-name="P727"><text:soft-page-break/>For normal usage, doing lots of aircraft or airfields that you will not use, can be a bit of a time waster but it's up to you if it is needed.</text:p>
      <text:p text:style-name="P727"/>
      <text:h text:style-name="P672" text:outline-level="2"><text:bookmark-start text:name="__RefHeading___Toc10432_2406473622"/>Testing your CSV parameter configuration with CSV data<text:bookmark-end text:name="__RefHeading___Toc10432_2406473622"/></text:h>
      <text:p text:style-name="P475"/>
      <text:p text:style-name="P477">On using this facility for the first time it is <text:span text:style-name="T74">seriously</text:span> <text:span text:style-name="T677"><text:s/></text:span>recommended that you <text:span text:style-name="T456">protect your flight log data by </text:span>us<text:span text:style-name="T456">ing</text:span> another data directory to test your parameter configuration file and CSV data. </text:p>
      <text:p text:style-name="P477">To do this (under Linux or *nix) when in your working Flightlog directory <text:span text:style-name="T584">you need to copy over the data files needed in a new directory, so </text:span>do <text:span text:style-name="T456">the following</text:span>:</text:p>
      <text:p text:style-name="P477"/>
      <text:p text:style-name="P184">mkdir <text:span text:style-name="T485">csv</text:span>-testing</text:p>
      <text:p text:style-name="P184">cd <text:span text:style-name="T485">csv</text:span>-testing</text:p>
      <text:p text:style-name="P476">[If Flightlog program is in <text:span text:style-name="T678">the </text:span>working directory<text:span text:style-name="T678"> above</text:span> -</text:p>
      <text:p text:style-name="P476"><text:span text:style-name="T137">cp ../</text:span><text:span text:style-name="T141">f</text:span><text:span text:style-name="T137">lightlog .</text:span><text:tab/><text:tab/>Note the space and <text:span text:style-name="T200">full stop</text:span> at the end <text:span text:style-name="T678">]</text:span></text:p>
      <text:p text:style-name="P602"><text:span text:style-name="T710"><text:s text:c="2"/></text:span>Now <text:span text:style-name="T719">do </text:span>these:</text:p>
      <text:p text:style-name="P478"><text:span text:style-name="T137">cp ../</text:span><text:span text:style-name="T139">csv</text:span><text:span text:style-name="T137">-conf.txt .<text:tab/></text:span><text:span text:style-name="T243">And again, but change file name if different.</text:span></text:p>
      <text:p text:style-name="P478"><text:span text:style-name="T137">cp ../</text:span><text:span text:style-name="T139">csv</text:span><text:span text:style-name="T137">-flitelog .<text:tab/></text:span>but change file name to <text:span text:style-name="T131">your</text:span> data file <text:span text:style-name="T584">name</text:span>.</text:p>
      <text:p text:style-name="P526"><text:span text:style-name="T137">cp ../aircraft.dat .</text:span><text:tab/><text:span text:style-name="T710">N</text:span>ow for the aircraft and airfield data files.</text:p>
      <text:p text:style-name="P526"><text:span text:style-name="T137">cp ../airfield.dat .</text:span><text:tab/>As above. <text:span text:style-name="T584">Do not copy over the flitelog.dat file.</text:span></text:p>
      <text:p text:style-name="P526"/>
      <text:p text:style-name="P479">Now, you can run Flightlog which will create <text:span text:style-name="T511">a </text:span>new <text:span text:style-name="T511">flight </text:span>data file just using your CSV data. <text:s/>To do this, select menu option T and on return select D to produce a detailed report then exit Flightlog and examine logbook.rpt using a text editor <text:span text:style-name="T455">or</text:span> the less command etc. and verify that the flight data with totals is correct. <text:s/><text:span text:style-name="T512">Look closely at date and time formats to verify that your configuration parameters type 1 and more importantly, type 2 records are correct.</text:span></text:p>
      <text:p text:style-name="P479"/>
      <text:p text:style-name="P479"><text:span text:style-name="T455">If it </text:span><text:span text:style-name="T79">is correct</text:span><text:span text:style-name="T455">, then you should copy the CSV parameter file back to the normal directory if you had to change it, then go back to the normal working directory and can then delete the test directory and its contents, run the CSV process using your normal flight log data and to do so here is the actual Linux commands :</text:span></text:p>
      <text:p text:style-name="P479"/>
      <text:p text:style-name="P551"><text:span text:style-name="T137">cp </text:span><text:span text:style-name="T139">csv</text:span><text:span text:style-name="T137">-conf.txt ..</text:span><text:tab/><text:tab/>Change the name of the file if not the same. Note the <text:span text:style-name="T512">space</text:span></text:p>
      <text:p text:style-name="P551"><text:tab/><text:tab/><text:tab/><text:tab/><text:tab/>and 2 full stops at the end. <text:span text:style-name="T512">Only do this if you changed the file</text:span></text:p>
      <text:p text:style-name="P538"><text:tab/><text:tab/><text:tab/><text:tab/><text:tab/>while testing.</text:p>
      <text:p text:style-name="P481"><text:span text:style-name="T137">cd ..</text:span><text:tab/><text:tab/><text:tab/><text:tab/>Change to your normal data directory. Note the space <text:span text:style-name="T512">and 2</text:span></text:p>
      <text:p text:style-name="P481"><text:tab/><text:tab/><text:tab/><text:tab/><text:tab/>full stops </text:p>
      <text:p text:style-name="P481"><text:span text:style-name="T137">rm </text:span><text:span text:style-name="T3">-fr </text:span><text:span text:style-name="T4">csv</text:span><text:span text:style-name="T3">-testing</text:span><text:span text:style-name="T2"><text:tab/><text:tab/>Remove the test directory </text:span><text:span text:style-name="T5">and it’s contents</text:span><text:span text:style-name="T2">.</text:span><text:span text:style-name="T6"> or at a later time.</text:span></text:p>
      <text:p text:style-name="P463"/>
      <text:p text:style-name="P463">Now continue and run Flightlog rerunning option T to input your CSV data file.</text:p>
      <text:p text:style-name="P463"/>
      <text:p text:style-name="P479"><text:span text:style-name="T678">Otherwise, I</text:span>f <text:span text:style-name="T455">it is </text:span><text:span text:style-name="T74">not </text:span><text:span text:style-name="T79">correct</text:span><text:span text:style-name="T455">,</text:span> check <text:span text:style-name="T455">and change</text:span> your parameter file type 1 &amp; 2 settings then delete the created data files (.dat) by running:</text:p>
      <text:p text:style-name="P479"><text:span text:style-name="T137">rm -f </text:span><text:span text:style-name="T140">flitelog</text:span><text:span text:style-name="T137">.dat<text:tab/></text:span><text:tab/>This will remove the data file just created.</text:p>
      <text:p text:style-name="P478"/>
      <text:p text:style-name="P479">Now re-run the above test again and continue doing so until you get the correct results.</text:p>
      <text:p text:style-name="P479">If the problem is odd start and end times or times for capacity (P1, 2, 3) check record type 2 settings<text:span text:style-name="T719">,</text:span> field<text:span text:style-name="T456">s</text:span> <text:span text:style-name="T455">3</text:span> or <text:span text:style-name="T455">4</text:span> respectively, against the CSV data file <text:span text:style-name="T496">as likely to be an incorrect time format used</text:span>.</text:p>
      <text:p text:style-name="P479"/>
      <text:p text:style-name="P479"><text:span text:style-name="T456">If the flight dates are wrong check record type 2 settings</text:span><text:span text:style-name="T719">,</text:span><text:span text:style-name="T456"> field 2 and make sure you are using the correct date format. See </text:span><text:span text:style-name="T456"><text:bookmark-ref text:reference-format="text" text:ref-name="__RefHeading___Toc1043_2548604501">CSV Definition Record Types</text:bookmark-ref></text:span><text:span text:style-name="T456"><text:s/>record type 2.</text:span></text:p>
      <text:p text:style-name="P264"/>
      <text:p text:style-name="P527">Some important points as found when testing.</text:p>
      <text:p text:style-name="P527"/>
      <text:p text:style-name="P527"><text:soft-page-break/>With the CSV data shown in a separate window via a text editor etc. and looking at the first record, start creating the csv configuration file type 1 records starting with the first csv field by typing in:</text:p>
      <text:p text:style-name="P527">101,</text:p>
      <text:p text:style-name="P527">102,</text:p>
      <text:p text:style-name="P527">103,</text:p>
      <text:p text:style-name="P527"/>
      <text:p text:style-name="P528">etc., until you have all of the csv fields present so for example if the csv record has 20 fields separated by a comma (<text:span text:style-name="T585">with</text:span> the last one which does not have a comma at the end) you should have typed in “101," <text:s/>through “120," each on new lines. Now go through the csv data again<text:span text:style-name="T678">,</text:span> this time looking for the fields that match up with the Flightlog data, <text:span text:style-name="T513">see </text:span><text:span text:style-name="T513"><text:bookmark-ref text:reference-format="chapter" text:ref-name="__RefHeading___Toc10434_2406473622">7.5.1</text:bookmark-ref></text:span><text:span text:style-name="T513"><text:s/></text:span><text:span text:style-name="T513"><text:bookmark-ref text:reference-format="text" text:ref-name="__RefHeading___Toc10434_2406473622">Record 1</text:bookmark-ref></text:span><text:span text:style-name="T513"><text:s/>for more detail</text:span><text:span text:style-name="T719">s</text:span><text:span text:style-name="T513"> as to what these are. Also refer to </text:span><text:span text:style-name="T513"><text:bookmark-ref text:reference-format="chapter" text:ref-name="__RefHeading___Toc1045_2548604501">7.6</text:bookmark-ref></text:span><text:span text:style-name="T513"><text:s/>(</text:span><text:span text:style-name="T513"><text:bookmark-ref text:reference-format="text" text:ref-name="__RefHeading___Toc1045_2548604501">Configuration File Example</text:bookmark-ref></text:span><text:span text:style-name="T513">) and </text:span><text:span text:style-name="T513"><text:bookmark-ref text:reference-format="chapter" text:ref-name="__RefHeading___Toc13056_2548604501">7.6.1</text:bookmark-ref></text:span><text:span text:style-name="T513"><text:s/>(</text:span><text:span text:style-name="T513"><text:bookmark-ref text:reference-format="text" text:ref-name="__RefHeading___Toc13056_2548604501">Example CSV data file</text:bookmark-ref></text:span><text:span text:style-name="T513">) adding to the type 1 data created, so for example if the first csv field is the flight date then add ‘01’ to ‘101,’ as it is the first flight log field, so it becomes ‘101,01’.</text:span></text:p>
      <text:p text:style-name="P528"><text:span text:style-name="T513">Having completed that for each flight log record field, now it is a case of going through the type 1 records again <text:s/>for the one’s not used by Flightlog and adding 00 after the comma to specify that it will be ignored, again using the examples indicated above. You must create a type 1 record for every csv field – Y</text:span><text:span text:style-name="T35">ou must not omit any </text:span><text:span text:style-name="T109">as Flightlog need</text:span><text:span text:style-name="T112">s</text:span><text:span text:style-name="T109"> them to work out where it is, in the csv data file when reading it. <text:s/>Failure to do so will result in errors possibly reported by Flightlog but more likely a</text:span><text:span text:style-name="T110">n</text:span><text:span text:style-name="T109"> unusable flitelog file </text:span><text:span text:style-name="T110">that only shows up when requesting a full flight data report</text:span><text:span text:style-name="T109">.</text:span></text:p>
      <text:h text:style-name="P673" text:outline-level="2"/>
      <text:p text:style-name="P624">I repeat, every CSV data field <text:span text:style-name="T74">must</text:span> be recorded as a record type 1 entry. </text:p>
      <text:p text:style-name="P624">On setting my own up I got some very odd behaviour and it took an hour or more before I spotted that I had missed one unused<text:span text:style-name="T732"> / recorded</text:span> field.</text:p>
      <text:p text:style-name="P624"/>
      <text:p text:style-name="P625">Luckily, you normally only have to do this once per *<text:span text:style-name="T732">A</text:span>irline<text:span text:style-name="T732"> or FTO</text:span>.</text:p>
      <text:p text:style-name="P625"/>
      <text:p text:style-name="P625">*Airline could also be a Flight Training Establishment<text:span text:style-name="T732"> / Organisation</text:span>, Aircraft Executive Hire etc.</text:p>
      <text:p text:style-name="P625"/>
      <text:h text:style-name="P663" text:outline-level="2"><text:bookmark-start text:name="__RefHeading___Toc16587_2548604501"/>CSV <text:span text:style-name="T390">Prerequisites</text:span><text:bookmark-end text:name="__RefHeading___Toc16587_2548604501"/></text:h>
      <text:p text:style-name="P376"/>
      <text:p text:style-name="P248">This section is only of use to professional crew members who work for an organisation such as an airline, large flight training establishment, <text:span text:style-name="T514">executive flight hire</text:span> <text:span text:style-name="T514">etc., </text:span>or the military who can provide a record of all flights over a period of time usually a week or month undertaken by a given crew member. You would need to ask for this from operations or another department and might need to remind them you require it for running on a PC (personal computer).</text:p>
      <text:p text:style-name="P248">The CSV file to be imported has a <text:span text:style-name="T458">Flightlog </text:span>maximum size limit of 512 characters per record.</text:p>
      <text:p text:style-name="P248">If you<text:span text:style-name="T128">r</text:span> supplied record<text:span text:style-name="T158">s</text:span> <text:span text:style-name="T158">are</text:span> l<text:span text:style-name="T158">onger</text:span>, contact us for an updated version of Flight<text:span text:style-name="T313">l</text:span>og with the size required.</text:p>
      <text:p text:style-name="P248">It is not expected that any airline uses anywhere near this limit but, <text:span text:style-name="T710">I</text:span> could be wrong.</text:p>
      <text:p text:style-name="P248"/>
      <text:p text:style-name="P248">There is also a predefined maximum number of type 1 records that can be used and this is 96.</text:p>
      <text:p text:style-name="P248">This mean there cannot be more than 96 fields <text:span text:style-name="T458">(separated by a comma)</text:span> <text:span text:style-name="T586">other than the last one </text:span>in a CSV data file. It is not expected that any airline uses anywhere near this limit but <text:span text:style-name="T710">I</text:span> could be wrong, again.</text:p>
      <text:p text:style-name="P248"/>
      <text:p text:style-name="P269">CSV data record fields <text:span text:style-name="T586">other than the last one, are </text:span>separated <text:span text:style-name="T514">by a comma and optionally </text:span>at each end of the data by one of two special characters namely a quote <text:span text:style-name="T159">or a single quote (“) or (‘) and which one should be specified in record type 3 field 2, </text:span><text:span text:style-name="T107">If neither are used leave as space, </text:span><text:span text:style-name="T159">see below for </text:span><text:span text:style-name="T25">CSV Definition record types</text:span><text:span text:style-name="T104">. </text:span><text:span text:style-name="T113">Note that Flightlog will still check each field anyway.</text:span></text:p>
      <text:p text:style-name="P248"/>
      <text:p text:style-name="P300">It should be noted that the number of fields <text:span text:style-name="T586">used </text:span>in the Flightlog flight record itself is 16 and that there is a requirement that a <text:span text:style-name="T74">minimum</text:span> of 9, are defined as targets within the type 1 records and these are for<text:span text:style-name="T679"> :</text:span> </text:p>
      <text:p text:style-name="P300"><text:span text:style-name="T679">F</text:span>light Date, Start time, End time, <text:span text:style-name="T587">Aircraft type, Aircraft registration, </text:span>Captain, Capacity, Airfield From, Airfield To (both using the ICAO codes).</text:p>
      <text:p text:style-name="P248"/>
      <text:p text:style-name="P248">If either of these sizes <text:span text:style-name="T127">or other limits </text:span>are a problem, contact <text:span text:style-name="T710">me</text:span>, see <text:span text:style-name="T128">the </text:span>details on inside front cover <text:span text:style-name="T136">so </text:span><text:span text:style-name="T710">I</text:span><text:span text:style-name="T136"> can update Flightlog and re-issue it</text:span>.</text:p>
      <text:p text:style-name="P248"/>
      <text:p text:style-name="P272">If only these nine fields are available <text:span text:style-name="T136">in </text:span>the CSV data file, then <text:span text:style-name="T515">capacity </text:span>time record<text:span text:style-name="T128">ing</text:span> for P1, P2, P3 <text:span text:style-name="T128">etc.,</text:span> will be based on day flight times only, as automatically calculated day/night time can not be accurate. In these circumstances the <text:span text:style-name="T458">crew member</text:span> will have to manually amend the imported data and adjust such fields <text:span text:style-name="T128">should they wish to maintain precision on night flight times, after the CSV data has been processed by Flightlog. The reference to P1 etc., could also be for any crew capacity such as E, N, R, T etc. </text:span></text:p>
      <text:p text:style-name="P539">Note that a/c registration is just that, not a flight number which can be almost any aircraft reg, so if your company is supplying that, ask them to change the data created.<text:span text:style-name="T656"> As most if not all of these csv data record are originally sourced from the computerised aircraft technical logs it will be by aircraft registration, <text:s text:c="2"/>but we could be wrong so check it as not every company uses good quality computer designers.</text:span></text:p>
      <text:p text:style-name="P248"/>
      <text:p text:style-name="P620">Flightlog <text:span text:style-name="T200">must</text:span> be told to ignore <text:span text:style-name="T23">all</text:span> CSV fields that are <text:span text:style-name="T74">not</text:span> used in the flight log data record so that <text:span text:style-name="T74">every</text:span> field in the CSV record is <text:span text:style-name="T587">defined</text:span> in the CSV configuration file.</text:p>
      <text:h text:style-name="P674" text:outline-level="2"/>
      <text:p text:style-name="P362"/>
      <text:h text:style-name="P663" text:outline-level="2"><text:bookmark-start text:name="__RefHeading___Toc1041_2548604501"/><text:span text:style-name="T126">CSV Configuration </text:span>Overview<text:bookmark-end text:name="__RefHeading___Toc1041_2548604501"/></text:h>
      <text:p text:style-name="P607"/>
      <text:p text:style-name="P248">There are <text:span text:style-name="T515">four</text:span> record types that can be used to define the CSV data file <text:span text:style-name="T128">and its characteristics along with another two to record new Aircraft types flown and Airports or Airfields used</text:span>. <text:span text:style-name="T136">This file must be created using a </text:span><text:span text:style-name="T80">text editor</text:span><text:span text:style-name="T136"> only, such as Notepad, Notepad++ for Windows, vi, vim, emacs, kate for *nix type operating systems including Linux, Apple Mac OSX to name but a few.</text:span></text:p>
      <text:p text:style-name="P248"><text:span text:style-name="T136">Do not </text:span><text:span text:style-name="T91">use a word processor</text:span><text:span text:style-name="T136"> as the format will not be in a text format and cannot be read by Flightlog.</text:span></text:p>
      <text:p text:style-name="P248"/>
      <text:p text:style-name="P248">Record type 1 - The purpose for type 1 <text:span text:style-name="T459">records </text:span>is to map the data in the CSV file with that in <text:span text:style-name="T459">the </text:span>Flightlog flight data file as the order of data provided in the CSV file will not match up nor does <text:span text:style-name="T459">Flightlog </text:span>know which to ignore. There <text:span text:style-name="T23">must</text:span> be a type 1 record for <text:span text:style-name="T23">every</text:span> CSV field present in the file regardless of whether it is used, otherwise Flightlog cannot locate the correct data.</text:p>
      <text:p text:style-name="P248"/>
      <text:p text:style-name="P285"><text:span text:style-name="T497">R</text:span>ecord 1 (<text:span text:style-name="T151">CSV f</text:span>ile <text:span text:style-name="T151">and flight log</text:span> layout definitions), </text:p>
      <text:p text:style-name="P285"><text:span text:style-name="T587">Record </text:span>2 (Date and time <text:span text:style-name="T128">data </text:span>formats used) <text:span text:style-name="T459">and</text:span> </text:p>
      <text:p text:style-name="P285"><text:span text:style-name="T587">Record </text:span>3 (CSV data file name),</text:p>
      <text:p text:style-name="P285"><text:tab/> <text:span text:style-name="T126">these three records </text:span>are <text:span text:style-name="T23">always required</text:span>.</text:p>
      <text:p text:style-name="P248"/>
      <text:p text:style-name="P248">Record <text:span text:style-name="T151">types </text:span>4 &amp; 5 <text:span text:style-name="T588">are </text:span>only <text:span text:style-name="T126">needed </text:span>if new airfields and aircraft exist in the CSV data file <text:span text:style-name="T128">and must be created when the CSV record contain new airport/fields visited or/and new aircraft types flown. These </text:span><text:span text:style-name="T45">must</text:span><text:span text:style-name="T128"> be entered </text:span><text:span text:style-name="T45">at </text:span><text:span text:style-name="T115">or</text:span><text:span text:style-name="T45"> before</text:span><text:span text:style-name="T128"> the time of importing a new CSV data file that contains this data.</text:span><text:span text:style-name="T719"> If you have a list of one or both, within your log book and are using Flightlog for the first time then here is a good place to enter them all at once and avoid the need to do so while entering your flights.</text:span></text:p>
      <text:p text:style-name="P248"><text:span text:style-name="T516">Record types 4 &amp; 5 </text:span>can be entered at any time prior to the CSV <text:span text:style-name="T656">flight </text:span>data and these record types can be the only record types present<text:span text:style-name="T680"> during a Flightlog CSV process</text:span>.</text:p>
      <text:p text:style-name="P248">It does not harm Flightlog i<text:span text:style-name="T588">f</text:span> they are presented more than once, just takes <text:span text:style-name="T588">a bit </text:span>more time<text:span text:style-name="T656"> as any existing records will be updated</text:span>.</text:p>
      <text:p text:style-name="P248"/>
      <text:p text:style-name="P248"><text:span text:style-name="T126">R</text:span>ecord 6 <text:span text:style-name="T516">is used,</text:span> if the CSV data file does not have the exact name of the <text:span text:style-name="T459">crew member</text:span> or s/he wishes to use <text:span text:style-name="T126">another name such as SELF in the Flightlog log book file, or if the crew member is not flying as P1 and the CSV data file needs to be searched for valid data in other than the field holding the captains (or commanders) name</text:span>. <text:span text:style-name="T152">See discussion above in overview and below for record type 6.</text:span></text:p>
      <text:p text:style-name="P248"/>
      <text:p text:style-name="P248">Record <text:span text:style-name="T459">type </text:span>1 must always be present when importing log book data and is specific for one Airline (unless another uses exactly the same data lay out<text:span text:style-name="T128">)</text:span>. <text:span text:style-name="T128">Here Airline can also include any other organisation that records the same data such as Executive Hire, Flight Training Establishments</text:span><text:span text:style-name="T719"> or even the military</text:span><text:span text:style-name="T128">. This type of data is always maintained by commercial organisations or where the aircraft are registered and flown as a commercial operation and that does often include training schools etc. This is because they have to record aircraft technical logs which in turn records each and every flight with date, times and usually flight crew members names. However it does not mean that they can provide a CSV data file, at least unless they record all technical log data on computers although many these days</text:span><text:span text:style-name="T719">,</text:span><text:span text:style-name="T128"> do so.</text:span></text:p>
      <text:p text:style-name="P248"/>
      <text:p text:style-name="P248">For pilots acting as P2 <text:span text:style-name="T459">(</text:span>second officer<text:span text:style-name="T459">)</text:span>, you need to look through the data provided, to see what field is used to hold <text:span text:style-name="T131">your</text:span> name, so that this field will be used to act as the record search criteria (see record type 6) but note that the Captain will always be the record<text:span text:style-name="T130">ed</text:span> pilot in charge. <text:span text:style-name="T129">The format for recording such is down to the standards set up by your countries aviation authority</text:span> <text:span text:style-name="T129">such as CAA (for the United Kingdom) or FAA (for the USA).</text:span></text:p>
      <text:p text:style-name="P248"/>
      <text:p text:style-name="P248"><text:soft-page-break/>The normal operation here for pilots flying as <text:span text:style-name="T152">other than as P1</text:span> in that the pilot in command <text:span text:style-name="T152">is</text:span> in the captain’<text:span text:style-name="T152">s</text:span> field and the CSV record only provided for you as P2 or <text:span text:style-name="T152">other </text:span>as flown. A problem <text:span text:style-name="T134">w</text:span>ould exist if you only get <text:span text:style-name="T132">all</text:span> <text:span text:style-name="T680">crew </text:span>records as CSV data and this is where the Flightlog software <text:span text:style-name="T134">has to search for the field that holds your name as the non P1 crew member. This requires the usage of the type 6 record where field 4 is used to find the CSV field holding your name so that the search only takes records with your name to process. Note that the following flight capacities are recognised P1, P2, P3, P1S, U/S (treated as P1S), P1T, E1, E2, N1, N2, R1, R2, T1, T2 – more can be added on request. Same applies to using menu options A and B to input the data manually from your paper records such as a log book or diary. If required, for P2 crew can if needed store captain as themselves, again see the record type 6 layout details and also the example data which shows records for P2 pilot using SELF as captain when serving as P2 <text:s/>but again check with your aviation authority on how it must be recorded when flying one or more legs as PIC </text:span><text:span text:style-name="T719">(Pilot In Command) </text:span><text:span text:style-name="T134">when so qualified.</text:span></text:p>
      <text:p text:style-name="P248"/>
      <text:p text:style-name="P248">Records for new airport<text:span text:style-name="T152">s</text:span> or new aircraft <text:span text:style-name="T152">types are</text:span> only needed if a new one <text:span text:style-name="T153">will</text:span> be in <text:span text:style-name="T153">the </text:span>current <text:span text:style-name="T153">CSV </text:span>data <text:span text:style-name="T153">file being processed and these must be defined before or during importing the CSV data file </text:span><text:span text:style-name="T43">but not after</text:span><text:span text:style-name="T153">, as that csv data record will be rejected</text:span>.</text:p>
      <text:p text:style-name="P267"/>
      <text:p text:style-name="P268"><text:span text:style-name="T589">CSV records e</text:span>ntries <text:span text:style-name="T517">for aircraft types and airfields </text:span>will be checked. <text:span text:style-name="T517">If </text:span>they are not currently held <text:span text:style-name="T589">in the Flightlog system</text:span>, <text:span text:style-name="T152">then CSV data will not </text:span>be added to data bases <text:span text:style-name="T152">but produce error messages and Flightlog will abort on the first instance of any missing Airfields or Aircraft and you will have to correct the problem before re-running. If this happens, then when re-running the CSV file you will receive error or warning messages FL041 and FL042 for any record that already exists on file which you can ignore.</text:span></text:p>
      <text:p text:style-name="P268"/>
      <text:p text:style-name="P517">Note that after the first instance of duplicated flights, any subsequent records will be shown as message FL041 with the next display line showing a full stop (“.") for each CSV record. So if you get ten full stops it means that <text:span text:style-name="T517">th</text:span>ere was 10 similar duplicate records.</text:p>
      <text:p text:style-name="P268"/>
      <text:p text:style-name="P268"><text:span text:style-name="T152">See </text:span><text:span text:style-name="T152"><text:bookmark-ref text:reference-format="text" text:ref-name="__RefHeading___Toc12906_2548604501">Appendix B – Warning and Error messages</text:bookmark-ref></text:span><text:span text:style-name="T152"><text:s/>page </text:span><text:span text:style-name="T152"><text:bookmark-ref text:reference-format="page" text:ref-name="__RefHeading___Toc12906_2548604501">57</text:bookmark-ref></text:span><text:span text:style-name="T152"><text:s/>for a full list and descriptions of these messages.</text:span></text:p>
      <text:p text:style-name="P248"/>
      <text:p text:style-name="P248">Record types can be in any order, i.e., records 1, 2, 3, Optional: 6, and if needed 4 and/or 5 as required, <text:span text:style-name="T517">e.g., <text:s/>record 4, 5, 3, 1, 2, 6 etc.</text:span></text:p>
      <text:p text:style-name="P248"><text:span text:style-name="T153">When processing a CSV file, c</text:span>ompulsory <text:span text:style-name="T460">records</text:span> are 1, 2, 3 with 6, 4 &amp; 5 as <text:span text:style-name="T517">and when </text:span>needed.</text:p>
      <text:p text:style-name="P248"/>
      <text:p text:style-name="P248">When <text:span text:style-name="T497">you need </text:span>to process new Airfields and/or Aircraft types, then records 4 &amp; 5 can exist by themselves with no other record types present. This way you can enter one or <text:span text:style-name="T517">the </text:span>other with no CSV data to be processed <text:span text:style-name="T460">and even use it to pre</text:span><text:span text:style-name="T732">-</text:span><text:span text:style-name="T460">load both, before using menu option A to enter flight log data manually</text:span>.</text:p>
      <text:p text:style-name="P248"/>
      <text:h text:style-name="P675" text:outline-level="2"/>
      <text:h text:style-name="P663" text:outline-level="2"><text:bookmark-start text:name="__RefHeading___Toc1043_2548604501"/>CSV Definition <text:span text:style-name="T485">R</text:span>ecord <text:span text:style-name="T485">T</text:span>ypes<text:bookmark-end text:name="__RefHeading___Toc1043_2548604501"/></text:h>
      <text:p text:style-name="P377"/>
      <text:h text:style-name="Heading_20_3" text:outline-level="3"><text:bookmark-start text:name="__RefHeading___Toc10434_2406473622"/>Record 1<text:bookmark-end text:name="__RefHeading___Toc10434_2406473622"/></text:h>
      <text:p text:style-name="Text_20_body"/>
      <text:p text:style-name="P265">This record <text:span text:style-name="T74">MUST ALWAYS</text:span> be present for data imports<text:span text:style-name="T681">.</text:span> <text:span text:style-name="T60">Defines each CSV field present in file regardless if it will be used to import data</text:span>. <text:span text:style-name="T117">Chars as used below, is abbreviation for characters.</text:span></text:p>
      <text:p text:style-name="P248"/>
      <text:p text:style-name="P433"><text:bookmark-start text:name="__RefHeading___Toc13044_2548604501"/><text:span text:style-name="T9">Record 1 </text:span><text:span text:style-name="T16">–</text:span><text:span text:style-name="T9"> </text:span><text:span text:style-name="T11">CSV </text:span><text:span text:style-name="T9">field layout</text:span><text:span text:style-name="T11">s</text:span><text:bookmark-end text:name="__RefHeading___Toc13044_2548604501"/></text:p>
      <text:p text:style-name="Text_20_body"><text:tab/><text:tab/>As four fields</text:p>
      <text:p text:style-name="Text_20_body"><text:span text:style-name="T60">Field 1 = </text:span>Record <text:span text:style-name="T518">T</text:span>ype<text:tab/><text:span text:style-name="T117">One char</text:span><text:tab/>'1' for field definitions for <text:span text:style-name="T681">f</text:span>light<text:span text:style-name="T681"> </text:span>log record.</text:p>
      <text:p text:style-name="P361"><text:span text:style-name="T60">Field 2 = </text:span>S<text:span text:style-name="T518">ou</text:span>rc<text:span text:style-name="T518">e</text:span> Position<text:tab/><text:span text:style-name="T117">Two chars</text:span><text:tab/>Field number starts with <text:span text:style-name="T60">0</text:span>1, <text:span text:style-name="T92">with l</text:span>eading zero as</text:p>
      <text:p text:style-name="P361"><text:tab/><text:tab/><text:tab/><text:tab/><text:tab/><text:tab/>needed – Must <text:span text:style-name="T61">always</text:span> be 2 numeric digits and <text:span text:style-name="T24">all </text:span><text:span text:style-name="T108">CSV</text:span></text:p>
      <text:p text:style-name="P361"><text:tab/><text:tab/><text:tab/><text:tab/><text:tab/><text:tab/>fields must be accounted for (<text:span text:style-name="T74">No O</text:span><text:span text:style-name="T75">missions</text:span>).</text:p>
      <text:p text:style-name="P557"><text:tab/><text:tab/><text:tab/><text:tab/><text:tab/><text:tab/><text:span text:style-name="T74">Always </text:span><text:span text:style-name="T61">double check that all are described, with none</text:span></text:p>
      <text:p text:style-name="P353"><text:tab/><text:tab/><text:tab/><text:tab/><text:tab/><text:tab/>missing.</text:p>
      <text:p text:style-name="P360"><text:span text:style-name="T60">Field 3 = Separator <text:s/></text:span><text:tab/><text:span text:style-name="T117">One char</text:span><text:tab/><text:span text:style-name="T92">Use </text:span>'=' <text:span text:style-name="T518">or comma</text:span> but do<text:span text:style-name="T711">es</text:span>n’t care. Acts as a separator.</text:p>
      <text:p text:style-name="Text_20_body"><text:span text:style-name="T60">Field 4 = </text:span>Target F<text:span text:style-name="T518">ie</text:span>ld No<text:tab/><text:span text:style-name="T117">Two chars</text:span><text:tab/>As per field position in the <text:span text:style-name="T485">F</text:span>lightlog file, <text:span text:style-name="T60">see below:</text:span></text:p>
      <text:p text:style-name="P532"><text:tab/><text:tab/><text:tab/><text:tab/><text:tab/><text:tab/><text:span text:style-name="T521">Or as 00 to be ignored as data not used in Flightlog</text:span></text:p>
      <text:p text:style-name="P540"><text:tab/><text:tab/><text:tab/><text:tab/><text:tab/><text:tab/>records.</text:p>
      <text:p text:style-name="Text_20_body"/>
      <text:p text:style-name="P352"><text:tab/>Flight log<text:tab/><text:tab/>Position<text:tab/>Comments</text:p>
      <text:p text:style-name="P352"><text:tab/> field name<text:tab/><text:tab/> in record</text:p>
      <text:p text:style-name="Text_20_body"><text:tab/>No field <text:tab/><text:tab/>= 00<text:tab/><text:tab/><text:span text:style-name="T93">Omitted, f</text:span>ield is not used in Flight log <text:span text:style-name="T719">data </text:span>file.</text:p>
      <text:p text:style-name="Text_20_body"><text:tab/>FLT-Date <text:tab/><text:tab/>= 01<text:tab/>-<text:tab/><text:span text:style-name="T127">Must exist.</text:span></text:p>
      <text:p text:style-name="Text_20_body"><text:tab/>FLT-Start <text:tab/><text:tab/>= 02<text:tab/>-<text:tab/><text:span text:style-name="T127">Must exist.</text:span></text:p>
      <text:p text:style-name="Text_20_body"><text:tab/>FLT-End <text:tab/><text:tab/>= 03<text:tab/>-<text:tab/><text:span text:style-name="T127">Must exist.</text:span></text:p>
      <text:p text:style-name="Text_20_body"><text:tab/>FLT-AC-TYPE<text:tab/><text:span text:style-name="T60">= 04</text:span><text:tab/>-<text:tab/><text:span text:style-name="T127">Must exist.</text:span></text:p>
      <text:p text:style-name="Text_20_body"><text:tab/>FLT-AC-REG. <text:tab/><text:span text:style-name="T60">= 05</text:span><text:tab/>-<text:tab/><text:span text:style-name="T127">Must exist. (Aircraft registration number)</text:span></text:p>
      <text:p text:style-name="Text_20_body"><text:tab/>FLT-CAPTAIN <text:tab/><text:span text:style-name="T60">= 06</text:span><text:tab/>-<text:tab/><text:span text:style-name="T127">Must exist. (Name of captain, converted to capitals)</text:span></text:p>
      <text:p text:style-name="Text_20_body"><text:tab/>FLT-CAPACITY <text:tab/><text:span text:style-name="T60">= 07</text:span><text:tab/>-<text:tab/><text:span text:style-name="T127">Must exist. (Flight capacity)</text:span></text:p>
      <text:p text:style-name="Text_20_body"><text:tab/>FLT-FROM<text:tab/><text:tab/><text:span text:style-name="T60">= 08</text:span><text:tab/>-<text:tab/><text:span text:style-name="T127">Must exist. (Take off Airfield ICAO code<text:tab/> – four chars)</text:span></text:p>
      <text:p text:style-name="P529"><text:tab/>FLT-TO<text:tab/><text:tab/><text:span text:style-name="T60">= 09</text:span><text:tab/>-<text:tab/><text:span text:style-name="T127">Must exist. (Landing Airfield ICAO code<text:tab/>– <text:s/>four chars)</text:span></text:p>
      <text:p text:style-name="Text_20_body"><text:tab/>FLT-MS<text:tab/><text:tab/><text:span text:style-name="T60">= 10<text:tab/>-<text:tab/><text:tab/><text:tab/>(Multi / Single engine aircraft)</text:span></text:p>
      <text:p text:style-name="Text_20_body"><text:tab/>FLT-P1 <text:s text:c="2"/><text:span text:style-name="T60">Day</text:span><text:tab/><text:tab/><text:span text:style-name="T60">= 11<text:tab/>-<text:tab/><text:tab/><text:tab/>(Flight times for<text:tab/>x1 Day)</text:span></text:p>
      <text:p text:style-name="Text_20_body"><text:tab/>FLT-P23 <text:span text:style-name="T60">D</text:span><text:span text:style-name="T453">ay</text:span><text:span text:style-name="T452"><text:tab/></text:span><text:tab/><text:span text:style-name="T60">= 12<text:tab/>-<text:tab/><text:tab/><text:tab/>( <text:s/>--- ditto – <text:s text:c="3"/><text:tab/>x2/3 Day)</text:span></text:p>
      <text:p text:style-name="P483"><text:tab/>FLT-P1 <text:s text:c="2"/><text:span text:style-name="T60">Night</text:span><text:tab/><text:span text:style-name="T60">= 13<text:tab/>-<text:tab/><text:tab/><text:tab/>( <text:s/>--- ditto – <text:s text:c="3"/><text:tab/>x1 Night)</text:span></text:p>
      <text:p text:style-name="P483"><text:tab/>FLT-P23 <text:span text:style-name="T60">Night</text:span><text:tab/><text:span text:style-name="T60">= 14<text:tab/>-<text:tab/><text:tab/><text:tab/>( <text:s/>--- ditto – <text:s text:c="3"/><text:tab/>x2/3 Night)</text:span></text:p>
      <text:p text:style-name="P483"><text:tab/>FLT-INSTRUMENT <text:tab/><text:span text:style-name="T60">= 15<text:tab/>-<text:tab/><text:tab/><text:tab/>( <text:s/>--- ditto – <text:s text:c="3"/><text:tab/>as IFR time)</text:span></text:p>
      <text:p text:style-name="Text_20_body"><text:tab/>FLT-REMARKS <text:tab/><text:span text:style-name="T60">= 16<text:tab/>-<text:tab/><text:tab/><text:tab/>(Any comments)</text:span></text:p>
      <text:p text:style-name="P484">[x can be P = Pilot, E = Engineer, <text:span text:style-name="T519">N = Navigator, </text:span>R = Radio / Radar operator, <text:span text:style-name="T519">T = Radio, </text:span>etc ]</text:p>
      <text:p text:style-name="P484"/>
      <text:p text:style-name="P248">No Field means a CSV data field that is not used in the Flight log <text:span text:style-name="T719">data </text:span>file. It still <text:span text:style-name="T23">must</text:span> be specified but will be <text:span text:style-name="T461">otherwise </text:span>ignored. See CSV <text:span text:style-name="T490">ex</text:span>amples in <text:bookmark-ref text:reference-format="text" text:ref-name="__RefHeading___Toc13056_2548604501">Example CSV data file</text:bookmark-ref><text:s/><text:span text:style-name="T490">page </text:span><text:span text:style-name="T490"><text:bookmark-ref text:reference-format="page" text:ref-name="__RefHeading___Toc13056_2548604501">52</text:bookmark-ref></text:span>.</text:p>
      <text:p text:style-name="P533">An airline may well include fields that are not used in recording flights such as technical log information. It depends on where the data comes from within an Airline etc. as to what is supplied and providing the ‘Must exist’ data is included they can and will, be ignored if field 4 is set to 00.</text:p>
      <text:p text:style-name="P248"/>
      <text:p text:style-name="P248">For FLT-Captain there is an extra record type available – Record type 6.</text:p>
      <text:p text:style-name="P248"/>
      <text:p text:style-name="P248"/>
      <text:h text:style-name="P688" text:outline-level="3"><text:bookmark-start text:name="__RefHeading___Toc10436_2406473622"/>Record 2<text:bookmark-end text:name="__RefHeading___Toc10436_2406473622"/></text:h>
      <text:p text:style-name="Text_20_body"/>
      <text:p text:style-name="P274">This record <text:span text:style-name="T74">MUST ALWAYS</text:span> be present for data imports. <text:span text:style-name="T118">Defines the format used for flight dates, Flight start &amp; <text:s/>end times and flight capacity (Pn) times.</text:span></text:p>
      <text:p text:style-name="P543">Check your CSV data file for format<text:span text:style-name="T590">s</text:span> to be used for <text:span text:style-name="T74">all</text:span> <text:span text:style-name="T682"><text:s/></text:span>three.</text:p>
      <text:p text:style-name="P248"/>
      <text:p text:style-name="P474"><text:bookmark-start text:name="__RefHeading___Toc13046_2548604501"/><text:span text:style-name="T93">Record 2 – Date and time f</text:span>ormat <text:span text:style-name="T120">layout</text:span>s<text:bookmark-end text:name="__RefHeading___Toc13046_2548604501"/></text:p>
      <text:p text:style-name="Text_20_body"><text:span text:style-name="T88"><text:tab/><text:tab/>A</text:span><text:span text:style-name="T87">s four fields:</text:span></text:p>
      <text:p text:style-name="P248"><text:span text:style-name="T93">Field 1 = Record type <text:tab/>One char<text:tab/></text:span>'2' for field <text:span text:style-name="T93">date and time </text:span>format definitions.</text:p>
      <text:p text:style-name="P248"><text:span text:style-name="T93">Field 2 = </text:span>Date<text:tab/><text:tab/><text:span text:style-name="T117">Ten chars</text:span><text:tab/>Input Date format, <text:span text:style-name="T462">space filled to the right.</text:span></text:p>
      <text:p text:style-name="P248"><text:span text:style-name="T93">C</text:span>an be :</text:p>
      <text:p text:style-name="P248"/>
      <text:p text:style-name="Text_20_body">DD/MM/YYYY<text:tab/><text:tab/><text:tab/><text:tab/><text:span text:style-name="T519">United Kingdom edited format.</text:span></text:p>
      <text:p text:style-name="Text_20_body">YYYY/MM/DD<text:tab/><text:tab/><text:tab/><text:tab/><text:span text:style-name="T519">International edited format.</text:span></text:p>
      <text:p text:style-name="Text_20_body">MM/DD/YYYY<text:tab/><text:tab/><text:tab/><text:tab/><text:span text:style-name="T519">USA edited format.</text:span></text:p>
      <text:p text:style-name="Text_20_body">DDMMYYYY <text:s/><text:tab/><text:tab/><text:tab/><text:tab/><text:span text:style-name="T519">United Kingdom format.</text:span></text:p>
      <text:p text:style-name="Text_20_body">YYYYMMDD <text:s/><text:tab/><text:tab/><text:tab/><text:tab/><text:span text:style-name="T519">International format </text:span></text:p>
      <text:p text:style-name="Text_20_body">MMDDYYYY <text:s/><text:tab/><text:tab/><text:tab/><text:tab/><text:span text:style-name="T519">USA format.</text:span></text:p>
      <text:p text:style-name="Text_20_body">YYYYDDD <text:s text:c="5"/><text:tab/><text:tab/><text:tab/><text:tab/><text:span text:style-name="T519">Julian date format. DDD = day number - 001 to 366.</text:span></text:p>
      <text:p text:style-name="Text_20_body"/>
      <text:p text:style-name="P530">YYYY<text:tab/>= 4 digit year. (1900 to 2299 – but changeable depending on +today’s date.</text:p>
      <text:p text:style-name="P530">MM<text:tab/>= 2 digit month (01 to <text:span text:style-name="T590">1</text:span>2).</text:p>
      <text:p text:style-name="P530">DD<text:tab/>= 2 digit day (01 to 31).</text:p>
      <text:p text:style-name="P273"/>
      <text:p text:style-name="P273">In these <text:span text:style-name="T462">following </text:span>cases, century is taken as if YY = &gt; 70 = last one i.e., 19 if <text:span text:style-name="T519">+</text:span>today’s Year <text:s/>is 20 or 20 if Year = 21 and if less than 70 it is today’s century. This way you can enter historic data from 30 years before the current century. This also applies to manual data entry process<text:span text:style-name="T462">ing – menu option A and B</text:span>.</text:p>
      <text:p text:style-name="P248"><text:span text:style-name="T71">For flight log book entries a</text:span><text:span text:style-name="T62">fter </text:span><text:span text:style-name="T63">the </text:span><text:span text:style-name="T62">year 2000, </text:span><text:span text:style-name="T71">the following </text:span><text:span text:style-name="T62">should not be used, but </text:span><text:span text:style-name="T63">can also be defined (as above but </text:span><text:span text:style-name="T61">with </text:span><text:span text:style-name="T63">no century specified):</text:span><text:span text:style-name="T73"> Note that the century (19, 20, etc) is missing.</text:span></text:p>
      <text:p text:style-name="P248"/>
      <text:p text:style-name="Text_20_body">DD/MM/YY</text:p>
      <text:p text:style-name="Text_20_body">YY/MM/DD</text:p>
      <text:p text:style-name="Text_20_body">MM/DD/YY</text:p>
      <text:p text:style-name="Text_20_body">DDMMYY</text:p>
      <text:p text:style-name="Text_20_body">YYMMDD</text:p>
      <text:p text:style-name="Text_20_body">MMDDYY</text:p>
      <text:p text:style-name="Text_20_body"><text:span text:style-name="T116">Y</text:span>YDDD</text:p>
      <text:p text:style-name="Text_20_body"/>
      <text:p text:style-name="P248"><text:span text:style-name="T116">Field 3 = Time 1<text:tab/>Five chars</text:span><text:tab/>Time format <text:span text:style-name="T116">for Flight Start and End times only</text:span></text:p>
      <text:p text:style-name="P248">Can be :</text:p>
      <text:p text:style-name="P248">MMMM<text:tab/><text:tab/><text:span text:style-name="T116">Recorded as minutes after midnight.</text:span></text:p>
      <text:p text:style-name="Text_20_body">HHMM<text:tab/><text:tab/><text:span text:style-name="T116">Hours, Minutes with no separator between HH and MM.</text:span></text:p>
      <text:p text:style-name="P531">HH.MM<text:tab/><text:tab/><text:span text:style-name="T116">Hours, Minutes with separators , full stop or colon in character three.</text:span></text:p>
      <text:p text:style-name="P531"><text:tab/><text:tab/><text:tab/><text:span text:style-name="T732">At</text:span><text:span text:style-name="T520"> time</text:span><text:span text:style-name="T732"> of</text:span><text:span text:style-name="T520"> data import, character three is ignored.</text:span></text:p>
      <text:p text:style-name="Text_20_body"/>
      <text:p text:style-name="P248">Field 4 = Time 2<text:tab/><text:span text:style-name="T117">F</text:span>ive chars<text:tab/>Time format for <text:span text:style-name="T462">X</text:span>n times</text:p>
      <text:p text:style-name="P248">Can be :</text:p>
      <text:p text:style-name="P248">MMMM<text:tab/><text:tab/><text:span text:style-name="T116">Recorded as minutes after midnight, only.</text:span></text:p>
      <text:p text:style-name="Text_20_body">HHMM<text:tab/><text:tab/><text:span text:style-name="T116">Hours, Minutes with no separator between HH and MM.</text:span></text:p>
      <text:p text:style-name="P531">HH.MM<text:tab/><text:tab/><text:span text:style-name="T116">Hours, Minutes with separators , full stop or colon in character three.</text:span></text:p>
      <text:p text:style-name="P531"><text:tab/><text:tab/><text:tab/><text:span text:style-name="T732">At</text:span><text:span text:style-name="T520"> time</text:span><text:span text:style-name="T732"> of</text:span><text:span text:style-name="T520"> data import, character three is ignored.</text:span></text:p>
      <text:h text:style-name="Heading_20_3" text:outline-level="3"><text:bookmark-start text:name="__RefHeading___Toc10438_2406473622"/><text:soft-page-break/>Record 3<text:bookmark-end text:name="__RefHeading___Toc10438_2406473622"/></text:h>
      <text:p text:style-name="Text_20_body"/>
      <text:p text:style-name="P482">Record <text:span text:style-name="T74">must be present</text:span> <text:span text:style-name="T682"><text:s/></text:span>to read <text:span text:style-name="T119">the CSV </text:span>flight data file.</text:p>
      <text:p text:style-name="Text_20_body"/>
      <text:p text:style-name="Text_20_body"><text:bookmark-start text:name="__RefHeading___Toc13048_2548604501"/>Record 3 – CSV <text:span text:style-name="T521">data </text:span>file name layouts<text:bookmark-end text:name="__RefHeading___Toc13048_2548604501"/></text:p>
      <text:p text:style-name="Text_20_body"><text:span text:style-name="T327"><text:tab/><text:tab/>A</text:span>s <text:span text:style-name="T521">four</text:span> fields</text:p>
      <text:p text:style-name="P248"><text:span text:style-name="T93">Field 1 = Record type <text:tab/>One char<text:tab/></text:span>'<text:span text:style-name="T119">3’</text:span> for importing <text:span text:style-name="T119">the </text:span>CSV flight data file.</text:p>
      <text:p text:style-name="P281">Field 2 = <text:span text:style-name="T579">Data format</text:span><text:tab/>One char<text:tab/>Leave as A<text:span text:style-name="T719"> (for Ascii)</text:span> or space.</text:p>
      <text:p text:style-name="P248"><text:span text:style-name="T119">Field 3 = Data delimiter<text:tab/>One char</text:span><text:tab/>Delimiter used in data file, single or double quote<text:span text:style-name="T120">s, e.g., </text:span></text:p>
      <text:p text:style-name="P275"><text:tab/><text:tab/><text:tab/><text:tab/><text:tab/><text:tab/><text:span text:style-name="T333">[</text:span>"<text:span text:style-name="T333">]</text:span> <text:s/>or <text:span text:style-name="T333">[</text:span>'<text:span text:style-name="T333">]</text:span> <text:s text:c="2"/>[<text:span text:style-name="T119">the single middle character. </text:span>H<text:span text:style-name="T119">ere</text:span> - Choice of</text:p>
      <text:p text:style-name="P275"><text:tab/><text:tab/><text:tab/><text:tab/><text:tab/><text:tab/>one of <text:span text:style-name="T462">the </text:span>two <text:span text:style-name="T119">options</text:span> ]. If omitted, will use char 1 from</text:p>
      <text:p text:style-name="P275"><text:tab/><text:tab/><text:tab/><text:tab/><text:tab/><text:tab/>first <text:span text:style-name="T119">data </text:span>record <text:span text:style-name="T462">but will test it anyway</text:span>. <text:span text:style-name="T498">If fields do not</text:span></text:p>
      <text:p text:style-name="P524"><text:tab/><text:tab/><text:tab/><text:tab/><text:tab/><text:tab/>use either, leave as space.</text:p>
      <text:p text:style-name="P274"><text:span text:style-name="T119">Field 4 = </text:span>CSV F<text:span text:style-name="T119">ile </text:span>Name<text:tab/> <text:span text:style-name="T119">64 chars<text:tab/></text:span>File name to be imported if not 'csv-flitelog’. <text:span text:style-name="T521">Can include</text:span></text:p>
      <text:p text:style-name="P541"><text:tab/><text:tab/><text:tab/><text:tab/><text:tab/><text:tab/>full path if held in another directory but less than 64</text:p>
      <text:p text:style-name="P541"><text:tab/><text:tab/><text:tab/><text:tab/><text:tab/><text:tab/>characters in length. i.e., </text:p>
      <text:p text:style-name="P542"><text:tab/><text:tab/><text:tab/><text:tab/><text:tab/><text:tab/><text:span text:style-name="T554">\users\fred\Downloads\csv-data.csv</text:span> for Windows or</text:p>
      <text:p text:style-name="P364"><text:tab/><text:tab/><text:tab/><text:tab/><text:tab/><text:tab/><text:span text:style-name="T554">/</text:span><text:span text:style-name="T555">home/</text:span><text:span text:style-name="T556">fred/Downloads/csv-data-20190531.csv</text:span><text:span text:style-name="T187"> for *</text:span><text:span text:style-name="T188">nix,</text:span></text:p>
      <text:p text:style-name="P364"><text:span text:style-name="T188"><text:tab/><text:tab/><text:tab/><text:tab/><text:tab/><text:tab/>such as </text:span><text:span text:style-name="T187">Linux, </text:span><text:span text:style-name="T188">OSX, BSD etc</text:span><text:span text:style-name="T187">.</text:span></text:p>
      <text:p text:style-name="P360"/>
      <text:p text:style-name="P603">Note: <text:s/>Don't forget to save this data file to another directory after running<text:span text:style-name="T733">,</text:span> as a back up just in case you need to re-run the import for any reason and remember if you copy a filename say called fred.csv to .another directory where one is already present, it <text:span text:style-name="T61">will</text:span> <text:s/>overwrite it but usually with a warning<text:span text:style-name="T711"> first</text:span><text:span text:style-name="T719"> but some system do not such as a Raspberry Pi using Raspian</text:span>.</text:p>
      <text:h text:style-name="P688" text:outline-level="3"><text:bookmark-start text:name="__RefHeading___Toc10440_2406473622"/>Record 4<text:bookmark-end text:name="__RefHeading___Toc10440_2406473622"/></text:h>
      <text:p text:style-name="Text_20_body"/>
      <text:p text:style-name="P265"><text:span text:style-name="T62">O</text:span><text:span text:style-name="T66">nly</text:span><text:span text:style-name="T59"> needed </text:span><text:span text:style-name="T66">once,</text:span><text:span text:style-name="T59"> if a </text:span><text:span text:style-name="T76">new </text:span><text:span text:style-name="T59">airfield is included in log book data - </text:span>Y<text:span text:style-name="T59">ou can add them in advance of </text:span>Airfields <text:span text:style-name="T59">being used. Even when entering flight log data manually through menu option A.</text:span></text:p>
      <text:p text:style-name="P248">If airfield already recorded, then only updated if name is different otherwise ignored.</text:p>
      <text:p text:style-name="P248"/>
      <text:p text:style-name="Text_20_body"><text:bookmark-start text:name="__RefHeading___Toc13050_2548604501"/>Record 4 – Airfield layouts<text:bookmark-end text:name="__RefHeading___Toc13050_2548604501"/></text:p>
      <text:p text:style-name="Text_20_body"><text:span text:style-name="T327"><text:tab/><text:tab/>A</text:span>s <text:span text:style-name="T522">four</text:span> fields</text:p>
      <text:p text:style-name="Text_20_body"><text:span text:style-name="T93">Field 1 = Record type <text:tab/>One char<text:tab/></text:span>'<text:span text:style-name="T120">4’</text:span> for NEW airport data.</text:p>
      <text:p text:style-name="Text_20_body">Field 2 = ICAO <text:span text:style-name="T59">Code<text:tab/></text:span>Four chars<text:tab/><text:span text:style-name="T59">ICAO code for </text:span>the <text:span text:style-name="T59">NEW airport</text:span></text:p>
      <text:p text:style-name="Text_20_body"><text:span text:style-name="T60">Field 3 = Separator <text:s/></text:span><text:tab/><text:span text:style-name="T117">One char</text:span><text:tab/><text:span text:style-name="T92">Use </text:span>'=' but don’t care. Acts as a <text:span text:style-name="T333">(data) </text:span>separator.</text:p>
      <text:p text:style-name="Text_20_body">Field 4 = <text:span text:style-name="T59">Airfield </text:span>n<text:span text:style-name="T59">ame<text:tab/>3</text:span>2 chars<text:tab/><text:span text:style-name="T59">Airport name up to 32 chars </text:span>with <text:span text:style-name="T59">trailing spaces.</text:span></text:p>
      <text:p text:style-name="Text_20_body"/>
      <text:p text:style-name="P604">Note that some airfields do not have an ICAO coding such as private one’s. Here you can for example use from ZAAA for the first, ZAAB for the second etc. Again no reason why cannot start using Z001. <text:s/>If one of these airfields get a coding at some point in the future and the airfield is used more than say once you can use the menu <text:span text:style-name="T683">(</text:span><text:span text:style-name="T683"><text:bookmark-ref text:reference-format="text" text:ref-name="__RefHeading___Toc14522_2548604501">Option H –  Change Log Book Airfield Code</text:bookmark-ref></text:span><text:span text:style-name="T683">) <text:s/>page</text:span> <text:bookmark-ref text:reference-format="page" text:ref-name="__RefHeading___Toc14522_2548604501">29</text:bookmark-ref><text:span text:style-name="T684"><text:s/></text:span>to change all flight log records using it<text:span text:style-name="T683">,</text:span> changing to the newly allocated ICAO code which will also update the Airfield record<text:span text:style-name="T683"> in one sweep</text:span>.<text:span text:style-name="T683"> If the CSV field has more than 32 characters, only the first 32 will be used.</text:span></text:p>
      <text:h text:style-name="P689" text:outline-level="3"/>
      <text:h text:style-name="P690" text:outline-level="3"><text:bookmark-start text:name="__RefHeading___Toc10442_2406473622"/>Record 5<text:bookmark-end text:name="__RefHeading___Toc10442_2406473622"/></text:h>
      <text:p text:style-name="P532"/>
      <text:p text:style-name="P265"><text:span text:style-name="T89">O</text:span><text:span text:style-name="T86">nly</text:span><text:span text:style-name="T59"> needed </text:span><text:span text:style-name="T61">once,</text:span><text:span text:style-name="T59"> if a </text:span><text:span text:style-name="T74">new</text:span><text:span text:style-name="T59"> aircraft type is used in log book data - </text:span>Y<text:span text:style-name="T59">ou can add them in advance of being used. </text:span>If aircraft type already present the type <text:span text:style-name="T121">5</text:span> record/s will be ignored.</text:p>
      <text:p text:style-name="P248"/>
      <text:p text:style-name="Text_20_body"><text:bookmark-start text:name="__RefHeading___Toc13052_2548604501"/>Record 5 – Aircraft type layouts<text:bookmark-end text:name="__RefHeading___Toc13052_2548604501"/></text:p>
      <text:p text:style-name="Text_20_body"><text:tab/><text:tab/><text:span text:style-name="T327">A</text:span>s five fields</text:p>
      <text:p text:style-name="Text_20_body"><text:span text:style-name="T93">Field 1 = Record type <text:tab/>One char<text:tab/></text:span>'<text:span text:style-name="T121">5’</text:span> for NEW air<text:span text:style-name="T121">craft type</text:span> data.</text:p>
      <text:p text:style-name="P521"><text:span text:style-name="T121">Field 2 = </text:span>A<text:span text:style-name="T121">ir</text:span>c<text:span text:style-name="T121">raft t</text:span>ype <text:tab/><text:span text:style-name="T463">Eight chars<text:tab/>Aircraft</text:span> code for NEW aircraft type<text:span text:style-name="T121">s</text:span> as used in logbook</text:p>
      <text:p text:style-name="P521"><text:tab/><text:tab/><text:tab/><text:tab/><text:tab/><text:tab/>data, use trailing spaces. First four are significant and</text:p>
      <text:p text:style-name="P521"><text:tab/><text:tab/><text:tab/><text:tab/><text:tab/><text:tab/>only four are normally used for Heavies using ICAO</text:p>
      <text:p text:style-name="P521"><text:tab/><text:tab/><text:tab/><text:tab/><text:tab/><text:tab/>codes <text:span text:style-name="T121">but all 8 characters can be specified i.e., light a/c.</text:span></text:p>
      <text:p text:style-name="Text_20_body"><text:span text:style-name="T60">Field 3 = Separator <text:s/></text:span><text:tab/><text:span text:style-name="T117">One char</text:span><text:tab/><text:span text:style-name="T92">Use </text:span>'=' but don’t care. Acts as a separator.</text:p>
      <text:p text:style-name="Text_20_body"><text:span text:style-name="T121">Field 4 = </text:span>A<text:span text:style-name="T121">ir</text:span>c<text:span text:style-name="T121">raf</text:span>t MS<text:tab/><text:span text:style-name="T121">One char<text:tab/></text:span>M for multi-engine or S for single engine.</text:p>
      <text:p text:style-name="P522"><text:span text:style-name="T121">Field 5 = </text:span>A<text:span text:style-name="T121">ir</text:span>c<text:span text:style-name="T121">ra</text:span>ft Complex<text:tab/><text:span text:style-name="T121">One char<text:tab/></text:span>'Y' for (yes) for all multi-engine (Default) <text:span text:style-name="T121">otherwise </text:span>'N'</text:p>
      <text:p text:style-name="P522"><text:tab/><text:tab/><text:tab/><text:tab/><text:tab/><text:tab/>(or space) for simple single engine A/C with fixed gear</text:p>
      <text:p text:style-name="P522"><text:tab/><text:tab/><text:tab/><text:tab/><text:tab/><text:tab/>and <text:span text:style-name="T121">propeller.</text:span></text:p>
      <text:p text:style-name="P485"/>
      <text:p text:style-name="P486">Note that records 4 and/or 5 can be the only records present, if you wish to add such to Flightlog even if not using CSV data import <text:span text:style-name="T523">but use a different file name for such</text:span>. <text:span text:style-name="T523">If you do use this option then use the Flightlog parameter P1 or P2 to define the name with path if required. </text:span></text:p>
      <text:p text:style-name="P486"/>
      <text:p text:style-name="P486"><text:span text:style-name="T523">See </text:span><text:span text:style-name="T523"><text:bookmark-ref text:reference-format="chapter" text:ref-name="__RefHeading___Toc20390_2548604501">11.6</text:bookmark-ref></text:span><text:span text:style-name="T523"><text:s/></text:span><text:span text:style-name="T523"><text:bookmark-ref text:reference-format="text" text:ref-name="__RefHeading___Toc20390_2548604501">Running Flightlog Manually</text:bookmark-ref></text:span><text:span text:style-name="T523"><text:s/>page </text:span><text:span text:style-name="T523"><text:bookmark-ref text:reference-format="page" text:ref-name="__RefHeading___Toc20390_2548604501">84</text:bookmark-ref></text:span><text:span text:style-name="T523"><text:s/>for details of these and the others</text:span><text:span text:style-name="T719">,</text:span><text:span text:style-name="T523"> and how to use them.</text:span></text:p>
      <text:h text:style-name="P688" text:outline-level="3"><text:bookmark-start text:name="__RefHeading___Toc10444_2406473622"/>Record 6<text:bookmark-end text:name="__RefHeading___Toc10444_2406473622"/></text:h>
      <text:p text:style-name="Text_20_body"/>
      <text:p text:style-name="P282"><text:span text:style-name="T89">O</text:span><text:span text:style-name="T86">nly</text:span><text:span text:style-name="T59"> needed if you receive a CSV file with other flight crew records so you can be selective on the name to be searched for, and/or you wish to change the name of Captain (as you) to say, SELF.</text:span></text:p>
      <text:p text:style-name="P283"><text:span text:style-name="T70">This record type is o</text:span><text:span text:style-name="T67">nly</text:span><text:span text:style-name="T95"> needed if </text:span><text:span text:style-name="T99">the following </text:span><text:span text:style-name="T103">CSV data </text:span><text:span text:style-name="T99">scenarios </text:span><text:span text:style-name="T111">and cases </text:span><text:span text:style-name="T99">are m</text:span><text:span text:style-name="T100">a</text:span><text:span text:style-name="T99">t</text:span><text:span text:style-name="T100">ched</text:span><text:span text:style-name="T99"> -</text:span></text:p>
      <text:p text:style-name="P357"/>
      <text:p text:style-name="P503"/>
      <text:p text:style-name="P248"><text:span text:style-name="T81">S</text:span><text:span text:style-name="T74">cenario 1</text:span><text:span text:style-name="T94"> : The data supplied is only for one named pilot -</text:span></text:p>
      <text:p text:style-name="P499"/>
      <text:p text:style-name="P248"><text:span text:style-name="T94">Case 1 – The pilot wishes to change the name used as captain in the record say to SELF </text:span><text:span text:style-name="T102">which </text:span><text:span text:style-name="T111">might be classed as</text:span><text:span text:style-name="T102"> normal, for manually entering flight information in one’s flight log book.</text:span></text:p>
      <text:p text:style-name="P502"/>
      <text:p text:style-name="P248"><text:span text:style-name="T102">C</text:span><text:span text:style-name="T94">ase 2 – The pilots name is given as other than their name such as employee number, pilots license number or just not correctly typed etc. and </text:span><text:span text:style-name="T103">you </text:span><text:span text:style-name="T94">want to change the recorded name, again such as SELF.</text:span></text:p>
      <text:p text:style-name="P248"/>
      <text:p text:style-name="P248"><text:span text:style-name="T82">S</text:span><text:span text:style-name="T74">cenario 2</text:span><text:span text:style-name="T94"> : The data supplied </text:span><text:span text:style-name="T100">i</text:span><text:span text:style-name="T94">s for many pilots </text:span><text:span text:style-name="T102">and crew members</text:span><text:span text:style-name="T94"> and the data needs to be searched </text:span><text:span text:style-name="T100">for </text:span><text:span text:style-name="T94">only the specific </text:span><text:span text:style-name="T101">crew members </text:span><text:span text:style-name="T94">data records </text:span><text:span text:style-name="T100">ignoring all others</text:span><text:span text:style-name="T94">.</text:span></text:p>
      <text:p text:style-name="P248"><text:span text:style-name="T100">This could </text:span><text:span text:style-name="T111">well </text:span><text:span text:style-name="T100">apply for flight crew flying other than as P1 </text:span><text:span text:style-name="T101">such as P2, P3, E1, R1 or any other classification </text:span><text:span text:style-name="T111">(</text:span><text:span text:style-name="T101">other than P1S, </text:span><text:span text:style-name="T111">U/S</text:span><text:span text:style-name="T101"> or P1T as these are recorded as such but counted as just P1 </text:span><text:span text:style-name="T102">in totals and other analysis</text:span><text:span text:style-name="T111">)</text:span><text:span text:style-name="T101">.</text:span></text:p>
      <text:p text:style-name="P248"/>
      <text:p text:style-name="P248"><text:span text:style-name="T98">Case 1 - T</text:span><text:span text:style-name="T96">he </text:span><text:span text:style-name="T102">specific </text:span><text:span text:style-name="T95">captains name needs to be searched for in </text:span><text:span text:style-name="T97">the </text:span><text:span text:style-name="T101">correct crew members name</text:span><text:span text:style-name="T95"> </text:span><text:span text:style-name="T101">and may if the pilot wishes to change the name used, as in scenario 1 case 1.</text:span></text:p>
      <text:p text:style-name="P248"/>
      <text:p text:style-name="P248"><text:span text:style-name="T98">Case 2 - If the </text:span><text:span text:style-name="T101">crew member</text:span><text:span text:style-name="T98"> acts as </text:span><text:span text:style-name="T101">anything other than as P1 such as </text:span><text:span text:style-name="T98">P2, P3, </text:span><text:span text:style-name="T101">E1 or R1 etc., </text:span><text:span text:style-name="T98">and therefore the captain’s name in the CSV record is not their own</text:span><text:span text:style-name="T95">.</text:span></text:p>
      <text:p text:style-name="P248"><text:span text:style-name="T95">W</text:span><text:span text:style-name="T94">here a CSV field other than the one for captain shows the crew members name and this field is </text:span><text:span text:style-name="T102">needed to be </text:span><text:span text:style-name="T94">used to search records for inclusion.</text:span></text:p>
      <text:p text:style-name="P248"/>
      <text:p text:style-name="P248"><text:span text:style-name="T95">F</text:span><text:span text:style-name="T94">or Scenario 1, </text:span><text:span text:style-name="T111">C</text:span><text:span text:style-name="T94">ase 1, f</text:span><text:span text:style-name="T124">ield 7 can be spaces in which case, all instances of cap</text:span>tain<text:span text:style-name="T124"> </text:span>is<text:span text:style-name="T124"> changed to </text:span>the <text:span text:style-name="T124">content of field 2. This assumes that all CSV records are for only the one pilot. </text:span></text:p>
      <text:p text:style-name="P248">Field <text:span text:style-name="T500">7</text:span> <text:span text:style-name="T23">must</text:span> be used for <text:span text:style-name="T525">S</text:span>cenario 2 <text:span text:style-name="T525">C</text:span>ase 1.</text:p>
      <text:p text:style-name="P248"/>
      <text:p text:style-name="P248">For <text:span text:style-name="T524">S</text:span>cenario 2, <text:span text:style-name="T524">C</text:span>ase 2</text:p>
      <text:p text:style-name="P248">Field 3 <text:span text:style-name="T524">set </text:span>to ‘(‘ and Field 5 <text:span text:style-name="T524">set </text:span>to ‘)’, with Field 4 set to the CSV field that needs to be searched for, to find the crew member acting as P2, P3, E1, etc. or any other non P1 pilot category. Where the field is not that of Captain as this <text:span text:style-name="T525">would be C</text:span>ase 1.</text:p>
      <text:p text:style-name="Text_20_body"/>
      <text:p text:style-name="P248">This is an override facility, instead of searching for the Captains name in the CSV captains field. Here the specified field (other than captains field position) is used to search for records containing crew flying as other than P1 but <text:span text:style-name="T525">is</text:span> held in another specified CSV field as defined by CSV field 4 and this is what has to be searched for.</text:p>
      <text:p text:style-name="P276">Here in a paper based flight log book and for crew working as P2, E1 etc, that is used for f<text:span text:style-name="T149">lying</text:span> capacity, <text:span text:style-name="T149">the </text:span>captain’s name <text:span text:style-name="T525">is </text:span>who is acting as P1 and then any comments held in the remarks column for base details if needed, <text:span text:style-name="T525">may be</text:span>.</text:p>
      <text:p text:style-name="P276">The captain’s name needs to be record<text:span text:style-name="T463">ed</text:span> in case of query or verification by the licensing authority or airline <text:span text:style-name="T525">and for some aviation authorities, is a legal requirement.</text:span></text:p>
      <text:p text:style-name="P248"/>
      <text:p text:style-name="P248">N<text:span text:style-name="T125">ote</text:span> that <text:span text:style-name="T148">if ‘PUT’ is specified it is automatically changed to P3</text:span>. <text:span text:style-name="T125">This is in case, the data file comes from a flight training establishment.</text:span></text:p>
      <text:p text:style-name="P248"><text:soft-page-break/></text:p>
      <text:p text:style-name="P248"><text:span text:style-name="T148">Please note that the Captain name, Airfield ICAO code and Aircraft types are changed to u</text:span>pper case <text:span text:style-name="T148">(CAPITALS) </text:span>characters <text:span text:style-name="T148">and this is used in the search and the replacement name in the CSV data and how the data is saved in the Flight log </text:span><text:span text:style-name="T719">data </text:span><text:span text:style-name="T148">file. The same applies also in manual d</text:span>ata <text:span text:style-name="T125">e</text:span>ntry, <text:span text:style-name="T148">for the same fields</text:span>.</text:p>
      <text:p text:style-name="P248"/>
      <text:p text:style-name="P248">Only the Remarks field is not so treated – it is stored as is, ‘<text:span text:style-name="T525">warts and all’</text:span>.</text:p>
      <text:p text:style-name="P248"/>
      <text:p text:style-name="P248">In the event that the CSV data can contain other instances of record<text:span text:style-name="T463">s</text:span> containing other options of Captains name within the same file for example <text:span text:style-name="T150">e</text:span>mployee number and/or license number and/or pilots mistyped name etc. then you need other sets of the CSV definition file for each possible instance, i.e., one for wrong typing, one for a number, one for pilots name and <text:span text:style-name="T463">then </text:span>run the same CSV data file for each. <text:span text:style-name="T150">One at a time, hopefully this is rare if not very unlikely. If this does happen you should let operations know so that can get it fixed but also tell us to consider allowing for more than one type 6 record to be present as at present</text:span><text:span text:style-name="T733">,</text:span><text:span text:style-name="T150"> if more than one exists only the last is used.</text:span></text:p>
      <text:p text:style-name="P248"/>
      <text:p text:style-name="P257"/>
      <text:p text:style-name="Text_20_body"><text:bookmark-start text:name="__RefHeading___Toc13054_2548604501"/>Record 6 – Captain name layouts<text:bookmark-end text:name="__RefHeading___Toc13054_2548604501"/></text:p>
      <text:p text:style-name="Text_20_body"><text:tab/><text:tab/><text:span text:style-name="T327">A</text:span>s <text:span text:style-name="T327">seven fields</text:span></text:p>
      <text:p text:style-name="Text_20_body"><text:span text:style-name="T93">Field 1 = Record type <text:tab/>One char<text:tab/></text:span>'<text:span text:style-name="T122">6’</text:span> for <text:span text:style-name="T122">captain name Search or Replacement.</text:span></text:p>
      <text:p text:style-name="Text_20_body">Field 2 = Replaced name<text:tab/>15 chars<text:tab/><text:span text:style-name="T123">Field 7 n</text:span>ame to be replaced with, such as SELF.</text:p>
      <text:p text:style-name="Text_20_body"><text:span text:style-name="T60">Field 3 = Separator <text:s/></text:span><text:tab/><text:span text:style-name="T117">One char</text:span><text:tab/><text:span text:style-name="T92">Use </text:span>'<text:span text:style-name="T135">(</text:span>' but don’t care. Acts as a separator.</text:p>
      <text:p text:style-name="Text_20_body">Field 4 = S<text:span text:style-name="T526">our</text:span>c<text:span text:style-name="T526">e</text:span> pos<text:span text:style-name="T526">ition</text:span><text:tab/><text:span text:style-name="T135">Two chars<text:tab/>Numeric between 01 and 96 which is field holding the </text:span></text:p>
      <text:p text:style-name="Text_20_body"><text:tab/><text:tab/><text:tab/><text:tab/><text:tab/><text:tab/><text:span text:style-name="T135">name of the P2, P3 or any other crew member.</text:span></text:p>
      <text:p text:style-name="Text_20_body"><text:span text:style-name="T60">Field 5 = Separator <text:s/></text:span><text:tab/><text:span text:style-name="T117">One char</text:span><text:tab/><text:span text:style-name="T92">Use </text:span>'<text:span text:style-name="T135">)</text:span>' but don’t care. Acts as a separator.</text:p>
      <text:p text:style-name="P516">Field 6 = Capacity<text:tab/><text:tab/>Two chars<text:tab/>Capacity where CSV file does not specify it.</text:p>
      <text:p text:style-name="P516"><text:tab/><text:tab/><text:tab/><text:tab/><text:tab/><text:tab/>If present this will be the capacity that is stored for all</text:p>
      <text:p text:style-name="P516"><text:tab/><text:tab/><text:tab/><text:tab/><text:tab/><text:tab/>matched records. Normally used for crew not flying as</text:p>
      <text:p text:style-name="P516"><text:tab/><text:tab/><text:tab/><text:tab/><text:tab/><text:tab/>P1, where you are searching a specific CSV field for a</text:p>
      <text:p text:style-name="P516"><text:tab/><text:tab/><text:tab/><text:tab/><text:tab/><text:tab/>given name (yours). If spaces it will use the one in the<text:tab/><text:tab/><text:tab/><text:tab/><text:tab/><text:tab/>CSV data. <text:span text:style-name="T83">Do not use</text:span><text:span text:style-name="T526"> if you are flying as P1.</text:span></text:p>
      <text:p text:style-name="P248">Field <text:span text:style-name="T499">7</text:span> = Search name<text:tab/>30 chars<text:tab/><text:span text:style-name="T59">Captains </text:span>name <text:span text:style-name="T59">to search </text:span>for that is in <text:span text:style-name="T154">CSV data </text:span>where other names can exist and/or it is being replaced with name in field 2. <text:span text:style-name="T59">(with trailing spaces). </text:span>It will be c<text:span text:style-name="T59">onverted to Upper Case </text:span>as will the CSV data field 2 <text:span text:style-name="T150">when comparing.</text:span></text:p>
      <text:p text:style-name="P248"/>
      <text:p text:style-name="P248">Leave fields 3, 4, 5 <text:span text:style-name="T499">and 6</text:span> blank <text:span text:style-name="T154">if only</text:span> flying as P<text:span text:style-name="T150">1.</text:span></text:p>
      <text:p text:style-name="P248"/>
      <text:p text:style-name="P248">When flying as <text:span text:style-name="T150">any other crew category/capacity such as </text:span>P2, <text:span text:style-name="T498">E1 etc., </text:span>field <text:span text:style-name="T150">3,</text:span>4 <text:span text:style-name="T150">&amp; 5 is</text:span> used for <text:span text:style-name="T154">the </text:span>CSV source field to locate <text:span text:style-name="T154">the non P1 crew members </text:span>name in <text:span text:style-name="T154">CSV fields, other than the </text:span>default <text:span text:style-name="T154">one </text:span>of target 06 (Captain). <text:span text:style-name="T499">Field 6 specifies the actual operating capacity, See above references to Scenario 2, Case 2.</text:span></text:p>
      <text:h text:style-name="P674" text:outline-level="2"/>
      <text:h text:style-name="P663" text:outline-level="2"><text:bookmark-start text:name="__RefHeading___Toc1045_2548604501"/>Configuration <text:span text:style-name="T327">F</text:span>ile <text:span text:style-name="T327">E</text:span>xample<text:bookmark-end text:name="__RefHeading___Toc1045_2548604501"/></text:h>
      <text:p text:style-name="Text_20_body"/>
      <text:p text:style-name="P277">Here show<text:span text:style-name="T553">n</text:span> <text:span text:style-name="T553">is </text:span>a ruler <text:span text:style-name="T155">that</text:span> display<text:span text:style-name="T155">s</text:span> the character position<text:span text:style-name="T464">s</text:span> <text:span text:style-name="T464">in the text file </text:span>starting at column one for each record type that needs it (records 1, 2, 5 &amp; 6) <text:span text:style-name="T155">top figure is in 10’s and bottom, units. High</text:span>light<text:span text:style-name="T685">ed</text:span> text shows the columns a<text:span text:style-name="T685">t</text:span> <text:span text:style-name="T553">the </text:span>10, 20 and 30<text:span text:style-name="T553"> character positions</text:span> to help you. </text:p>
      <text:p text:style-name="P520">So<text:span text:style-name="T685">,</text:span> in the first example for record <text:span text:style-name="T686">type </text:span>1 you can see that in column 1<text:span text:style-name="T733">7</text:span> is the start of comments and these are ignored by Flightlog. <text:span text:style-name="T686">You could do this at cc (column) 10 but must be after cc <text:s/>7. </text:span>The comments are only for your reference or notes. </text:p>
      <text:p text:style-name="P520">Note target field 10 is omitted as does not exist in the CSV data.</text:p>
      <text:p text:style-name="P248"/>
      <text:p text:style-name="P2">--- <text:span text:style-name="T136">Ruler shown here ---</text:span></text:p>
      <text:p text:style-name="P175">000000000<text:span text:style-name="T157">1</text:span>111<text:span text:style-name="T155">1</text:span>11111<text:span text:style-name="T464">2</text:span><text:span text:style-name="T156">2</text:span>22222222<text:span text:style-name="T156">3</text:span></text:p>
      <text:p text:style-name="P175">123456789<text:span text:style-name="T156">0</text:span>123456789<text:span text:style-name="T156">0</text:span>123456789<text:span text:style-name="T156">0</text:span></text:p>
      <text:p text:style-name="P175"/>
      <text:p text:style-name="P175">101,01 <text:s text:c="9"/>date <text:s text:c="6"/>TEST 1</text:p>
      <text:p text:style-name="P175">102,04 <text:s text:c="9"/>a/c type</text:p>
      <text:p text:style-name="P175">103,00 <text:s text:c="9"/>Not used - Tech log record #</text:p>
      <text:p text:style-name="P175">10<text:span text:style-name="T328">4</text:span>,05 <text:s text:c="9"/>a/c reg</text:p>
      <text:p text:style-name="P175">10<text:span text:style-name="T328">5</text:span>,06 <text:s text:c="9"/><text:span text:style-name="T504">C</text:span>aptain</text:p>
      <text:p text:style-name="P175">10<text:span text:style-name="T328">6</text:span>,07 <text:s text:c="9"/><text:span text:style-name="T504">C</text:span>apacity</text:p>
      <text:p text:style-name="P175">10<text:span text:style-name="T328">7</text:span>,02 <text:s text:c="9"/>start time</text:p>
      <text:p text:style-name="P175">10<text:span text:style-name="T328">8</text:span>,03 <text:s text:c="9"/>end time</text:p>
      <text:p text:style-name="P175">10<text:span text:style-name="T328">9</text:span>,08 <text:s text:c="9"/>from airfld</text:p>
      <text:p text:style-name="P175">1<text:span text:style-name="T328">10</text:span>,09 <text:s text:c="9"/>to airfld</text:p>
      <text:p text:style-name="P175">11<text:span text:style-name="T328">1</text:span>,11 <text:s text:c="9"/>P1 day</text:p>
      <text:p text:style-name="P175">11<text:span text:style-name="T328">2</text:span>,12 <text:s text:c="9"/>P23 Day</text:p>
      <text:p text:style-name="P175">11<text:span text:style-name="T328">3</text:span>,13 <text:s text:c="9"/>P1 nite</text:p>
      <text:p text:style-name="P175">11<text:span text:style-name="T328">4</text:span>,14 <text:s text:c="9"/>p23 nite</text:p>
      <text:p text:style-name="P175">11<text:span text:style-name="T328">5</text:span>,15 <text:s text:c="9"/>I<text:span text:style-name="T504">FR</text:span>. time</text:p>
      <text:p text:style-name="P175">11<text:span text:style-name="T328">6</text:span>,16 <text:s text:c="9"/>Remarks</text:p>
      <text:p text:style-name="P185">117,00 <text:s text:c="9"/>Date of next annual</text:p>
      <text:p text:style-name="P185">118,00 <text:s text:c="9"/>Date of next 3 year maintenance</text:p>
      <text:p text:style-name="P185">119,00 <text:s text:c="9"/>Snag list report number</text:p>
      <text:p text:style-name="P185">120,00 <text:s text:c="9"/>Aircraft site base</text:p>
      <text:p text:style-name="P185">121,00 <text:s text:c="9"/>Date of last inspection</text:p>
      <text:p text:style-name="P185">122,00 <text:s text:c="9"/>Second office<text:span text:style-name="T466">r (P2)</text:span> Name</text:p>
      <text:p text:style-name="P185">123,00 <text:s text:c="9"/>Absolutely no IDEA</text:p>
      <text:p text:style-name="P185"/>
      <text:p text:style-name="Text_20_body">--- <text:span text:style-name="T136">Ruler shown here ---</text:span></text:p>
      <text:p text:style-name="P175">000000000<text:span text:style-name="T157">1</text:span>111<text:span text:style-name="T155">1</text:span>11111<text:span text:style-name="T156">2</text:span>222222222<text:span text:style-name="T156">3</text:span></text:p>
      <text:p text:style-name="P175">123456789<text:span text:style-name="T156">0</text:span>123456789<text:span text:style-name="T156">0</text:span>123456789<text:span text:style-name="T156">0</text:span></text:p>
      <text:p text:style-name="P175"/>
      <text:p text:style-name="P175">2yyyymmdd <text:s/>hh.mmhh.mm <text:s text:c="5"/><text:span text:style-name="T328">Empire Flt Training <text:s/>formats</text:span></text:p>
      <text:p text:style-name="P175"/>
      <text:p text:style-name="P175">3<text:span text:style-name="T332">A</text:span>"<text:span text:style-name="T485">csv</text:span>-test1.<text:span text:style-name="T527">csv</text:span></text:p>
      <text:p text:style-name="P175"/>
      <text:p text:style-name="P175">4LEPA,Palma De Mallorca, SP</text:p>
      <text:p text:style-name="P175">4EGBG,Leicester</text:p>
      <text:p text:style-name="P175"/>
      <text:p text:style-name="Text_20_body">--- <text:span text:style-name="T136">Ruler shown here ---</text:span></text:p>
      <text:p text:style-name="P175">000000000<text:span text:style-name="T157">1</text:span>111<text:span text:style-name="T155">1</text:span>11111<text:span text:style-name="T156">2</text:span>222222222<text:span text:style-name="T156">3</text:span></text:p>
      <text:p text:style-name="P175">123456789<text:span text:style-name="T156">0</text:span>123456789<text:span text:style-name="T156">0</text:span>123456789<text:span text:style-name="T156">0</text:span></text:p>
      <text:p text:style-name="P175"/>
      <text:p text:style-name="Text_20_body"><text:soft-page-break/><text:span text:style-name="T138">5BE23 <text:s text:c="3"/>,SN <text:s text:c="6"/></text:span><text:span text:style-name="T228">Beech </text:span><text:a xlink:type="simple" xlink:href="https://www.google.com/url?sa=t&amp;rct=j&amp;q=&amp;esrc=s&amp;source=web&amp;cd=1&amp;cad=rja&amp;uact=8&amp;ved=2ahUKEwiz176TsuPeAhXKI8AKHZBZAq0Qs2YoADAAegQIAhAM&amp;url=https%3A%2F%2Fen.wikipedia.org%2Fwiki%2FCT-134_Musketeer&amp;usg=AOvVaw3wDxo0oiMpOqHlx-d891Do" text:style-name="Internet_20_link" text:visited-style-name="Visited_20_Internet_20_Link"><text:span text:style-name="T227">Musketeer</text:span></text:a></text:p>
      <text:p text:style-name="P175">5PA23-160,SN</text:p>
      <text:p text:style-name="P175">5PA28-161,SN</text:p>
      <text:p text:style-name="P175">5BE60 <text:s text:c="3"/>,MY <text:s text:c="6"/><text:span text:style-name="T329">Beech Duke</text:span></text:p>
      <text:p text:style-name="P175">5<text:span text:style-name="T330">CONC</text:span> <text:s text:c="4"/>MY <text:s text:c="6"/>Concorde</text:p>
      <text:p text:style-name="P175">5A337 <text:s text:c="4"/>MY <text:s text:c="6"/>Airbus A330-700 Beluga XL</text:p>
      <text:p text:style-name="P175">5A388 <text:s text:c="4"/>MY <text:s text:c="6"/>Airbus A380-800</text:p>
      <text:p text:style-name="P175">5B748 <text:s text:c="4"/>MY <text:s text:c="6"/>Boeing 747-8</text:p>
      <text:p text:style-name="P175">5B789 <text:s text:c="4"/>MY <text:s text:c="6"/>Boeing 787-900</text:p>
      <text:p text:style-name="Text_20_body"/>
      <text:p text:style-name="P2"/>
      <text:p text:style-name="P92">The first example shows changing any CSV records with Captain as COENVB which needs to change to SELF <text:span text:style-name="T551">as</text:span> us<text:span text:style-name="T551">able</text:span> in <text:span text:style-name="T551">ex</text:span>ample data, see <text:bookmark-ref text:reference-format="chapter" text:ref-name="__RefHeading___Toc13056_2548604501">7.6.1</text:bookmark-ref><text:s/><text:bookmark-ref text:reference-format="text" text:ref-name="__RefHeading___Toc13056_2548604501">Example CSV data file</text:bookmark-ref>.</text:p>
      <text:p text:style-name="P92"/>
      <text:p text:style-name="Text_20_body">--- <text:span text:style-name="T136">Ruler shown here ---</text:span></text:p>
      <text:p text:style-name="P175">000000000<text:span text:style-name="T157">1</text:span>111<text:span text:style-name="T155">1</text:span>11111<text:span text:style-name="T156">2</text:span>222222222<text:span text:style-name="T156">3</text:span></text:p>
      <text:p text:style-name="P175">123456789<text:span text:style-name="T156">0</text:span>123456789<text:span text:style-name="T156">0</text:span>123456789<text:span text:style-name="T156">0</text:span></text:p>
      <text:p text:style-name="P175"/>
      <text:p text:style-name="P175">6SELF <text:s text:c="16"/>COENVB</text:p>
      <text:p text:style-name="P175"/>
      <text:p text:style-name="P271">[<text:span text:style-name="T464">Second </text:span>example for <text:span text:style-name="T503">is for </text:span>P2 pilot <text:span text:style-name="T147">where a specific CSV data source field is needed for searching, instead of the CSV source field for Captain.</text:span>] </text:p>
      <text:p text:style-name="P519">Note that there can only be one record 6 present, but if more than one is present, only the last one will be used.<text:span text:style-name="T552"> Here it is checking source field 22 and if found against 'GOODX' inserts the record with capacity marked as 'P2' but captain name is maintained.</text:span></text:p>
      <text:p text:style-name="P519"/>
      <text:p text:style-name="P523">--- <text:span text:style-name="T136">Ruler shown here ---</text:span></text:p>
      <text:p text:style-name="P187">000000000<text:span text:style-name="T157">1</text:span>111<text:span text:style-name="T155">1</text:span>11111<text:span text:style-name="T156">2</text:span>222222222<text:span text:style-name="T156">3</text:span></text:p>
      <text:p text:style-name="P187">123456789<text:span text:style-name="T156">0</text:span>123456789<text:span text:style-name="T156">0</text:span>123456789<text:span text:style-name="T156">0</text:span></text:p>
      <text:p text:style-name="P177"/>
      <text:p text:style-name="P175">6 <text:s text:c="14"/>(<text:span text:style-name="T464">22</text:span>)P2<text:span text:style-name="T505">GOODX</text:span></text:p>
      <text:p text:style-name="P175"/>
      <text:p text:style-name="P248">Here you can see blank lines are used to separate record types <text:span text:style-name="T466">which are ignored including any counts</text:span>. Also comment text has been added after the data fields that are <text:span text:style-name="T466">required</text:span> <text:span text:style-name="T466">for each </text:span>record. <text:span text:style-name="T330">Note that any comments placed after the last required field definitions are ignored. See type 1 record with comments starting on column 18.</text:span></text:p>
      <text:p text:style-name="P248"/>
      <text:p text:style-name="P544">Now the last example for the type 6 record :</text:p>
      <text:p text:style-name="P544"/>
      <text:p text:style-name="P191">6SELF <text:s text:c="10"/>(22)P2GOODX</text:p>
      <text:p text:style-name="P544"/>
      <text:p text:style-name="P544">Here the pilot acting as P2 wishes to change the name of the captain to 'SELF' as s/he was acting as PIC (Pilot in Command) as it was his/her leg during a more than one segments and the csv file only had records of that type of flight as otherwise it all csv records that matched the search criteria would be added in and recorded that way. Here looking for field 22 containing users name, force change to capacity P2 with his name or SELF as captain.</text:p>
      <text:p text:style-name="P544">Of course could use 'GOOD' instead of 'SELF' just by changing field 2 to 'GOOD'.</text:p>
      <text:p text:style-name="Text_20_body"/>
      <text:h text:style-name="P687" text:outline-level="3"/>
      <text:h text:style-name="P691" text:outline-level="3"><text:bookmark-start text:name="__RefHeading___Toc13056_2548604501"/>Example CSV data file<text:bookmark-end text:name="__RefHeading___Toc13056_2548604501"/></text:h>
      <text:p text:style-name="P248"/>
      <text:p text:style-name="P248"><text:span text:style-name="T327">T</text:span>o match up with above configuration file data <text:span text:style-name="T489">using quotes between data fields as well as commas</text:span>.</text:p>
      <text:p text:style-name="P248"/>
      <text:p text:style-name="Text_20_body"><text:span text:style-name="Source_20_Text"><text:span text:style-name="T559">"19900331","pa28-161","xl941","gbppk","Self","P1","14.35","14.55","egmc","egmc","00.20","00.00","00.00","00</text:span></text:span></text:p>
      <text:p text:style-name="Text_20_body"><text:span text:style-name="Source_20_Text"><text:span text:style-name="T559">.00","00.00","C/O","19910130","19920130","S1232","egmc","19891001","","JonesE"</text:span></text:span></text:p>
      <text:p text:style-name="Text_20_body"><text:span text:style-name="Source_20_Text"><text:span text:style-name="T559"/></text:span></text:p>
      <text:p text:style-name="Text_20_body"><text:span text:style-name="Source_20_Text"><text:span text:style-name="T559">"19900331","c340","xl942","grita","self","p1","15.50","16.40","egmc","egtc","00.50","00.00","00.00","00.00"</text:span></text:span></text:p>
      <text:p text:style-name="Text_20_body"><text:span text:style-name="Source_20_Text"><text:span text:style-name="T559">,"00.00","","19910130","19920130","S1235","egmc","19891001","goodx","JonesE"</text:span></text:span></text:p>
      <text:p text:style-name="Text_20_body"><text:span text:style-name="Source_20_Text"><text:span text:style-name="T559"/></text:span></text:p>
      <text:p text:style-name="Text_20_body"><text:span text:style-name="Source_20_Text"><text:span text:style-name="T559">"19900401","PA28161","xl941","GBPPK","COENVB","P1","14.35","14.55","EGMC","EGMC","00.20","00.00","00.00","</text:span></text:span></text:p>
      <text:p text:style-name="Text_20_body"><text:span text:style-name="Source_20_Text"><text:span text:style-name="T559">00.00","00.00","C/O","19910130","19920130","S1232","EGMC","19891001","","JONESE"</text:span></text:span></text:p>
      <text:p text:style-name="Text_20_body"><text:span text:style-name="Source_20_Text"><text:span text:style-name="T559"/></text:span></text:p>
      <text:p text:style-name="Text_20_body"><text:span text:style-name="Source_20_Text"><text:span text:style-name="T559">"19900401","C340","xl942","GRITA","COENVB","P1","15.50","16.40","EGMC","EGTC","00.50","00.00","00.00","00.0</text:span></text:span></text:p>
      <text:p text:style-name="Text_20_body"><text:span text:style-name="Source_20_Text"><text:span text:style-name="T559">0","00.00","","19910130","19920130","S1235","EGMC","19891001","GOODX","JonesE"</text:span></text:span></text:p>
      <text:p text:style-name="Text_20_body"><text:span text:style-name="Source_20_Text"><text:span text:style-name="T259"/></text:span></text:p>
      <text:p text:style-name="P63">You will noticed that the first two <text:span text:style-name="T128">CSV data </text:span>records use<text:span text:style-name="T328">s</text:span> lower case text and the other two <text:span text:style-name="T158">with one space line between, </text:span>use<text:span text:style-name="T328">s</text:span> upper case (capitals) text. </text:p>
      <text:p text:style-name="P63"><text:span text:style-name="T328">Flightlog</text:span> will convert all <text:span text:style-name="T328">alphabetic text </text:span>to capitals (upper case) on import. </text:p>
      <text:p text:style-name="P63">This does not apply to the Remarks field which is left ‘as is’. </text:p>
      <text:p text:style-name="P63">Note that there are <text:span text:style-name="T502">2 or more </text:span>lines shown here for every CSV data record and that there is <text:span text:style-name="T466">nine</text:span> type 1 record definition<text:span text:style-name="T466">s</text:span> showing CSV data field<text:span text:style-name="T466">s</text:span> not used in the flight log data file.</text:p>
      <text:p text:style-name="P63"/>
      <text:p text:style-name="P94">Here is an example of the same data but with captains name being COENVB and here the first above record 6 example could be used. Note that for the aircraft type pa28-161, the – was removed but that is because the work processor <text:span text:style-name="T549">used to create this manual </text:span>treats such by starting a next line. <text:span text:style-name="T528">Also the data shows a change from lower case to capitals and even mixed for pilot name, airfield and remarks.</text:span></text:p>
      <text:p text:style-name="P95"/>
      <text:p text:style-name="P192">"19900331","pa28161","<text:span text:style-name="T328">xl941"</text:span>,"gbppk","<text:span text:style-name="T505">coenvb</text:span>","P1","14.35","14.55","egmc","egmc","S","00.20","00.00","00.00","00.00","00.00",</text:p>
      <text:p text:style-name="P192">"C/O","<text:span text:style-name="T500">19910130</text:span>","<text:span text:style-name="T500">19920130</text:span>","<text:span text:style-name="T501">S1232","egmc","19891001","","JonesE"</text:span></text:p>
      <text:p text:style-name="P192">"19900331","c340","<text:span text:style-name="T328">xl942</text:span>","grita","<text:span text:style-name="T505">coenvb</text:span>","p1","15.50","16.40","egmc","egtc","M","00.50","00.00","00.00","00.00","00.00","","<text:span text:style-name="T500">19910130</text:span>","<text:span text:style-name="T500">19920130</text:span>","<text:span text:style-name="T501">S1235","egmc","19891001","goodx","JonesE"</text:span></text:p>
      <text:p text:style-name="P192"/>
      <text:p text:style-name="P193">"19900401","PA28161","<text:span text:style-name="T328">xl941</text:span>","GBPPK","<text:span text:style-name="T505">COENVB</text:span>","P1","14.35","14.55","EGMC","EGMC","S","00.20","00.00","00.00","00.00","00.00",</text:p>
      <text:p text:style-name="P193">"C/O","<text:span text:style-name="T500">19910130</text:span>","<text:span text:style-name="T500">19920130</text:span>","<text:span text:style-name="T501">S1232","EGMC","19891001","","JONESE"</text:span></text:p>
      <text:p text:style-name="P193">"19900401","C340","<text:span text:style-name="T328">xl942</text:span>","GRITA","<text:span text:style-name="T505">COENVB</text:span>","P1","15.50","16.40","EGMC","EGTC","M","00.50","00.00","00.00","00.00","00.00","","<text:span text:style-name="T500">19910130</text:span>","<text:span text:style-name="T500">19920130</text:span>","<text:span text:style-name="T501">S1235","EGMC","19891001","GOODX","JONESE"</text:span></text:p>
      <text:p text:style-name="P360"/>
      <text:p text:style-name="P248">Here is the same data <text:span text:style-name="T528">from the last block </text:span>but without the quotes around each data field but note that the Remarks field does on one record as it also contains special characters <text:span text:style-name="T502">with another that has no data just the way it was supplied</text:span>. Also times in the second block are in quotes <text:span text:style-name="T528">may be </text:span>because of the colon symbol. You will need to verify that <text:span text:style-name="T505">as </text:span>th<text:span text:style-name="T505">e</text:span> type of data in Remarks <text:span text:style-name="T505">i</text:span>s free form data <text:span text:style-name="T505">and therefore can </text:span>contain almost anything, it should be <text:span text:style-name="T549">and must be </text:span>in quotes <text:span text:style-name="T528">if it contains a comma as it is the field separator.</text:span> For times could be one or the other <text:span text:style-name="T528">but often without</text:span>.<text:span text:style-name="T687"> Also a empty field could have quotes or just a comma.</text:span></text:p>
      <text:p text:style-name="P248"><text:soft-page-break/></text:p>
      <text:p text:style-name="P192">19900331,pa28161,<text:span text:style-name="T328">xl941</text:span>,gbppk,<text:span text:style-name="T505">coenvb</text:span>,P1,14.35,14.55,egmc,egmc,00.20,00.00,00.00,00.00,00.00,"C/O",<text:span text:style-name="T500">19910130</text:span>,<text:span text:style-name="T500">19920130,egmc,19891001,"",JonesE</text:span></text:p>
      <text:p text:style-name="P192">19900331,c340,<text:span text:style-name="T328">xl942</text:span>,grita,<text:span text:style-name="T505">coenvb</text:span>,p1,15.50,16.40,egmc,egtc,00.50,00.00,00.00,00.00,00.00,"",<text:span text:style-name="T500">19910130</text:span>,<text:span text:style-name="T500">19920130</text:span>,<text:span text:style-name="T501">S1235,egmc,19891001,goodx,JonesE</text:span></text:p>
      <text:p text:style-name="P192"/>
      <text:p text:style-name="P192">19900401,PA28161,<text:span text:style-name="T328">xl941</text:span>,GBPPK,<text:span text:style-name="T505">COENVB</text:span>,P1,"14.35","14.55",EGMC,EGMC,"00.20","00.00","00.00","00.00","00.00",</text:p>
      <text:p text:style-name="P192">"C/O",<text:span text:style-name="T500">19910130</text:span>,<text:span text:style-name="T500">19920130</text:span>,<text:span text:style-name="T501">S1232,EGMC,19891001,"",JONESE</text:span></text:p>
      <text:p text:style-name="P192">19900401,C340,<text:span text:style-name="T328">xl942</text:span>,GRITA,<text:span text:style-name="T505">COENVB</text:span>,P1,"15.50","16.40",EGMC,EGTC,"00.50","00.00","00.00","00.00","00.00","",<text:span text:style-name="T500">19910130</text:span>,<text:span text:style-name="T500">19920130</text:span>,<text:span text:style-name="T501">S1235,egmc,19891001,GOODX,JONESE</text:span></text:p>
      <text:p text:style-name="P192"/>
      <text:p text:style-name="P514">Like previously said there is not hard and fast rules about this, at least that is <text:span text:style-name="T553">adhered</text:span> to. <text:span text:style-name="T528">Flightlog covers all variations - hopefully.</text:span></text:p>
      <text:p text:style-name="P514"/>
      <text:p text:style-name="P545">So lets show both a configuration and another example of csv data used during one of Flightlog system tests and this shows both single and double quotes as well as none just the normal comma separating the csv fields.</text:p>
      <text:p text:style-name="Text_20_body"/>
      <text:p text:style-name="Text_20_body">Configuration File</text:p>
      <text:p text:style-name="Text_20_body"/>
      <text:p text:style-name="Text_20_body"><text:bookmark-start text:name="__RefHeading___Toc11214_2857818006"/>--<text:bookmark-end text:name="__RefHeading___Toc11214_2857818006"/></text:p>
      <text:p text:style-name="P175"><text:bookmark-start text:name="__RefHeading___Toc11216_2857818006"/>101,01 <text:s text:c="9"/>date <text:s text:c="10"/>TEST 35 uses both quotes and non.<text:bookmark-end text:name="__RefHeading___Toc11216_2857818006"/></text:p>
      <text:p text:style-name="P175"><text:bookmark-start text:name="__RefHeading___Toc11218_2857818006"/>102,04 <text:s text:c="9"/>a/c type <text:s text:c="8"/>with two type 6 records<text:bookmark-end text:name="__RefHeading___Toc11218_2857818006"/></text:p>
      <text:p text:style-name="P175"><text:bookmark-start text:name="__RefHeading___Toc11220_2857818006"/>103,00 <text:s text:c="9"/>Tech log info?<text:bookmark-end text:name="__RefHeading___Toc11220_2857818006"/></text:p>
      <text:p text:style-name="P175"><text:bookmark-start text:name="__RefHeading___Toc11222_2857818006"/>104,05 <text:s text:c="9"/>a/c reg<text:bookmark-end text:name="__RefHeading___Toc11222_2857818006"/></text:p>
      <text:p text:style-name="P175"><text:bookmark-start text:name="__RefHeading___Toc11224_2857818006"/>105,06 <text:s text:c="9"/>captain<text:bookmark-end text:name="__RefHeading___Toc11224_2857818006"/></text:p>
      <text:p text:style-name="P175"><text:bookmark-start text:name="__RefHeading___Toc11226_2857818006"/>106,07 <text:s text:c="9"/>capacity<text:bookmark-end text:name="__RefHeading___Toc11226_2857818006"/></text:p>
      <text:p text:style-name="P175"><text:bookmark-start text:name="__RefHeading___Toc11228_2857818006"/>107,02 <text:s text:c="9"/>start time<text:bookmark-end text:name="__RefHeading___Toc11228_2857818006"/></text:p>
      <text:p text:style-name="P175"><text:bookmark-start text:name="__RefHeading___Toc11230_2857818006"/>108,03 <text:s text:c="9"/>end time<text:bookmark-end text:name="__RefHeading___Toc11230_2857818006"/></text:p>
      <text:p text:style-name="P175"><text:bookmark-start text:name="__RefHeading___Toc11232_2857818006"/>109,08 <text:s text:c="9"/>from airfld<text:bookmark-end text:name="__RefHeading___Toc11232_2857818006"/></text:p>
      <text:p text:style-name="P175"><text:bookmark-start text:name="__RefHeading___Toc11234_2857818006"/>110,09 <text:s text:c="9"/>to airfld<text:bookmark-end text:name="__RefHeading___Toc11234_2857818006"/></text:p>
      <text:p text:style-name="P175"><text:bookmark-start text:name="__RefHeading___Toc11236_2857818006"/>111,11 <text:s text:c="9"/>P1 day<text:bookmark-end text:name="__RefHeading___Toc11236_2857818006"/></text:p>
      <text:p text:style-name="P175"><text:bookmark-start text:name="__RefHeading___Toc11238_2857818006"/>112,12 <text:s text:c="9"/>P23 Day<text:bookmark-end text:name="__RefHeading___Toc11238_2857818006"/></text:p>
      <text:p text:style-name="P175"><text:bookmark-start text:name="__RefHeading___Toc11240_2857818006"/>113,13 <text:s text:c="9"/>P1 nite<text:bookmark-end text:name="__RefHeading___Toc11240_2857818006"/></text:p>
      <text:p text:style-name="P175"><text:bookmark-start text:name="__RefHeading___Toc11242_2857818006"/>114,14 <text:s text:c="9"/>p23 nite<text:bookmark-end text:name="__RefHeading___Toc11242_2857818006"/></text:p>
      <text:p text:style-name="P175"><text:bookmark-start text:name="__RefHeading___Toc11244_2857818006"/>115,15 <text:s text:c="9"/>Inst. time<text:bookmark-end text:name="__RefHeading___Toc11244_2857818006"/></text:p>
      <text:p text:style-name="P175"><text:bookmark-start text:name="__RefHeading___Toc11246_2857818006"/>116,16 <text:s text:c="9"/>Remarks<text:bookmark-end text:name="__RefHeading___Toc11246_2857818006"/></text:p>
      <text:p text:style-name="P175"><text:bookmark-start text:name="__RefHeading___Toc11248_2857818006"/>117,00 <text:s text:c="9"/>Date of next annual<text:bookmark-end text:name="__RefHeading___Toc11248_2857818006"/></text:p>
      <text:p text:style-name="P175"><text:bookmark-start text:name="__RefHeading___Toc11250_2857818006"/>118,00 <text:s text:c="9"/>Date of next 3 year maintenance<text:bookmark-end text:name="__RefHeading___Toc11250_2857818006"/></text:p>
      <text:p text:style-name="P175"><text:bookmark-start text:name="__RefHeading___Toc11252_2857818006"/>119,00 <text:s text:c="9"/>Snag list report number<text:bookmark-end text:name="__RefHeading___Toc11252_2857818006"/></text:p>
      <text:p text:style-name="P175"><text:bookmark-start text:name="__RefHeading___Toc11254_2857818006"/>120,00 <text:s text:c="9"/>Aircraft site base<text:bookmark-end text:name="__RefHeading___Toc11254_2857818006"/></text:p>
      <text:p text:style-name="P175"><text:bookmark-start text:name="__RefHeading___Toc11256_2857818006"/>121,00 <text:s text:c="9"/>Date of last inspection<text:bookmark-end text:name="__RefHeading___Toc11256_2857818006"/></text:p>
      <text:p text:style-name="P175"><text:bookmark-start text:name="__RefHeading___Toc11258_2857818006"/>122,00 <text:s text:c="9"/>Second officer (P2) Name<text:bookmark-end text:name="__RefHeading___Toc11258_2857818006"/></text:p>
      <text:p text:style-name="P175"><text:bookmark-start text:name="__RefHeading___Toc11260_2857818006"/>123,00 <text:s text:c="9"/>Absolutely no IDEA<text:bookmark-end text:name="__RefHeading___Toc11260_2857818006"/></text:p>
      <text:p text:style-name="P175"/>
      <text:p text:style-name="P175"><text:bookmark-start text:name="__RefHeading___Toc11262_2857818006"/>2yyyymmdd <text:s/>hh:mmhh:mm<text:bookmark-end text:name="__RefHeading___Toc11262_2857818006"/></text:p>
      <text:p text:style-name="P175"/>
      <text:p text:style-name="P175"><text:bookmark-start text:name="__RefHeading___Toc11264_2857818006"/>3A"csv-test35.csv<text:bookmark-end text:name="__RefHeading___Toc11264_2857818006"/></text:p>
      <text:p text:style-name="P175"/>
      <text:p text:style-name="P175"><text:bookmark-start text:name="__RefHeading___Toc11266_2857818006"/>4LEPA,Palma De Mallorca, SP<text:bookmark-end text:name="__RefHeading___Toc11266_2857818006"/></text:p>
      <text:p text:style-name="P175"><text:bookmark-start text:name="__RefHeading___Toc11268_2857818006"/>4EGBG,Leicester<text:bookmark-end text:name="__RefHeading___Toc11268_2857818006"/></text:p>
      <text:p text:style-name="P175"/>
      <text:p text:style-name="P175"><text:bookmark-start text:name="__RefHeading___Toc11270_2857818006"/>5BE23 <text:s text:c="3"/>,SN <text:s text:c="6"/>Beech Musketeer<text:bookmark-end text:name="__RefHeading___Toc11270_2857818006"/></text:p>
      <text:p text:style-name="P175"><text:bookmark-start text:name="__RefHeading___Toc11272_2857818006"/><text:soft-page-break/>5PA23-160,SN<text:bookmark-end text:name="__RefHeading___Toc11272_2857818006"/></text:p>
      <text:p text:style-name="P175"><text:bookmark-start text:name="__RefHeading___Toc11274_2857818006"/>5PA28-161,SN<text:bookmark-end text:name="__RefHeading___Toc11274_2857818006"/></text:p>
      <text:p text:style-name="P175"><text:bookmark-start text:name="__RefHeading___Toc11276_2857818006"/>5BE60 <text:s text:c="3"/>,MY <text:s text:c="6"/>Beech Duke<text:bookmark-end text:name="__RefHeading___Toc11276_2857818006"/></text:p>
      <text:p text:style-name="P175"><text:bookmark-start text:name="__RefHeading___Toc11278_2857818006"/>5CONC <text:s text:c="4"/>MY <text:s text:c="6"/>Concorde<text:bookmark-end text:name="__RefHeading___Toc11278_2857818006"/></text:p>
      <text:p text:style-name="P175"><text:bookmark-start text:name="__RefHeading___Toc11280_2857818006"/>5A337 <text:s text:c="4"/>MY <text:s text:c="6"/>Airbus A330-700 Beluga XL<text:bookmark-end text:name="__RefHeading___Toc11280_2857818006"/></text:p>
      <text:p text:style-name="P175"><text:bookmark-start text:name="__RefHeading___Toc11282_2857818006"/>5A388 <text:s text:c="4"/>MY <text:s text:c="6"/>Airbus A380-800<text:bookmark-end text:name="__RefHeading___Toc11282_2857818006"/></text:p>
      <text:p text:style-name="P175"><text:bookmark-start text:name="__RefHeading___Toc11284_2857818006"/>5B748 <text:s text:c="4"/>MY <text:s text:c="6"/>Boeing 747-8<text:bookmark-end text:name="__RefHeading___Toc11284_2857818006"/></text:p>
      <text:p text:style-name="P175"><text:bookmark-start text:name="__RefHeading___Toc11286_2857818006"/>5B789 <text:s text:c="4"/>MY <text:s text:c="6"/>Boeing 787-900<text:bookmark-end text:name="__RefHeading___Toc11286_2857818006"/></text:p>
      <text:p text:style-name="P175"/>
      <text:p text:style-name="P175"><text:bookmark-start text:name="__RefHeading___Toc11288_2857818006"/>6SELF <text:s text:c="16"/>COENVB<text:bookmark-end text:name="__RefHeading___Toc11288_2857818006"/></text:p>
      <text:p text:style-name="P194"><text:bookmark-start text:name="__RefHeading___Toc11290_2857818006"/>6SELF <text:s text:c="10"/>(22)P2GOODX<text:bookmark-end text:name="__RefHeading___Toc11290_2857818006"/></text:p>
      <text:p text:style-name="Text_20_body"><text:bookmark-start text:name="__RefHeading___Toc11489_2857818006"/>--<text:bookmark-end text:name="__RefHeading___Toc11489_2857818006"/></text:p>
      <text:p text:style-name="P63"><text:bookmark-start text:name="__RefHeading___Toc11292_2857818006"/>Note two type 6 records but only the last is used.<text:bookmark-end text:name="__RefHeading___Toc11292_2857818006"/></text:p>
      <text:p text:style-name="P63"/>
      <text:p text:style-name="P63"><text:bookmark-start text:name="__RefHeading___Toc11294_2857818006"/>Now for the csv data records:<text:bookmark-end text:name="__RefHeading___Toc11294_2857818006"/></text:p>
      <text:p text:style-name="P2"/>
      <text:p text:style-name="Text_20_body"><text:bookmark-start text:name="__RefHeading___Toc11296_2857818006"/>--<text:bookmark-end text:name="__RefHeading___Toc11296_2857818006"/></text:p>
      <text:p text:style-name="P192"><text:bookmark-start text:name="__RefHeading___Toc11298_2857818006"/>19900331,pa28161,xl941,gbppk,coenvb,P1,14.35,14.55,egmc,egmc,00.20,00.00,00.00,00.00,00.00,C/<text:span text:style-name="T563">O</text:span>,19910130,19920130,egmc,19891001,,JonesE<text:bookmark-end text:name="__RefHeading___Toc11298_2857818006"/></text:p>
      <text:p text:style-name="P192"><text:bookmark-start text:name="__RefHeading___Toc11300_2857818006"/>19900331,c340,xl942,grita,coenvb,p1,15.50,16.40,egmc,egtc,00.50,00.00,00.00,00.00,00.00,,19910130,19920130,S1235,egmc,19891001,goodx,JonesE<text:bookmark-end text:name="__RefHeading___Toc11300_2857818006"/></text:p>
      <text:p text:style-name="P192"><text:bookmark-start text:name="__RefHeading___Toc11302_2857818006"/>19900401,PA28161,xl941,GBPPK,COENVB,P1,"14.35","14.55",EGMC,EGMC,"00.20","00.00","00.00","00.00","00.00",'C/O',19910130,19920130,S1232,EGMC,19891001,"",JONESE<text:bookmark-end text:name="__RefHeading___Toc11302_2857818006"/></text:p>
      <text:p text:style-name="P192"><text:bookmark-start text:name="__RefHeading___Toc11304_2857818006"/>19900401,C340,xl942,GRITA,COENVB,P1,"15.50","16.40",EGMC,EGTC,"00.50","00.00","00.00","00.00","00.00","",19910130,19920130,S1235,egmc,19891001,GOODX,JONESE<text:bookmark-end text:name="__RefHeading___Toc11304_2857818006"/></text:p>
      <text:p text:style-name="P2"><text:bookmark-start text:name="__RefHeading___Toc11306_2857818006"/>--<text:bookmark-end text:name="__RefHeading___Toc11306_2857818006"/></text:p>
      <text:p text:style-name="P63"/>
      <text:p text:style-name="P63"><text:bookmark-start text:name="__RefHeading___Toc11308_2857818006"/>This creates only two flight log records as there are only two out of all<text:span text:style-name="T558">,</text:span> that has 'GOODX' in csv data field 22<text:span text:style-name="T561">, See figure 11.</text:span><text:bookmark-end text:name="__RefHeading___Toc11308_2857818006"/></text:p>
      <text:p text:style-name="P63"/>
      <text:p text:style-name="P2"><text:bookmark-start text:name="__RefHeading___Toc11310_2857818006"/>--<text:bookmark-end text:name="__RefHeading___Toc11310_2857818006"/></text:p>
      <text:p text:style-name="Text_20_body"><text:bookmark-start text:name="__RefHeading___Toc11491_2857818006"/><text:span text:style-name="T235">LOG BOOK (2.01.43)     Personal Flying Log Book of Figure 11                                        2018/12/18  21:27:59    Page   1 </text:span><text:span text:style-name="T557"><text:line-break/><text:line-break/>          -- Aircraft--                  OP   JOURNEY   DEPART ARR     - DAY -    NIGHT <text:line-break/>  DATE    TYPE     REG    CAPTAIN        CAP FROM  TO   TIME  TIME    P1  P2/3  P1  P2/3 IFR  MULT ------- REMARKS ---- - - - - - - <text:line-break/><text:line-break/>                               Grand     0                             0    0    0    0    0    0  Hrs <text:line-break/>                               Total    00  Totals Carried Forward    00   00   00   00   00   00  Mins <text:line-break/>1990/03/31 C340     GRITA  SELF           P2  EGMC EGTC  15.50 16.40  0.50                     0.50 <text:line-break/>------------------------------------------------------------------------------------------------------------------- <text:line-break/>                               Sub       0  Months Sub Totals          0    0    0    0    0    0  Hrs <text:line-break/>                               Total    50                            50   00   00   00   00   50  Mins <text:line-break/>=================================================================================================================== <text:line-break/>1990/04/01 C340     GRITA  SELF           P2  EGMC EGTC  15.50 16.40  0.50                     0.50 <text:line-break/><text:line-break/>                               Grand     1                             1    0    0    0    0    1  Hrs <text:line-break/>                               Total    40  Totals Carried Forward    40   00   00   00   00   40  Mins<text:line-break/></text:span><text:span text:style-name="T265">--</text:span><text:bookmark-end text:name="__RefHeading___Toc11491_2857818006"/></text:p>
      <text:p text:style-name="P118"><text:bookmark-start text:name="__RefHeading___Toc11316_2857818006"/>Figure 11 - CSV report (D) for example with type 6 record selecting P2 user<text:bookmark-end text:name="__RefHeading___Toc11316_2857818006"/></text:p>
      <text:p text:style-name="P2"/>
      <text:p text:style-name="P2"><text:bookmark-start text:name="__RefHeading___Toc11318_2857818006"/>Figure 12 shows the screen on completion of a csv data import. Note the bottom four displays showing the totals read in<text:span text:style-name="T562"> (4)</text:span>, wri<text:span text:style-name="T562">t</text:span>ten out<text:span text:style-name="T562"> (2) </text:span>and last<text:span text:style-name="T687">,</text:span> count of any that previously existed or were rejected<text:span text:style-name="T562"> (0)</text:span>.<text:bookmark-end text:name="__RefHeading___Toc11318_2857818006"/></text:p>
      <text:p text:style-name="P2"/>
      <text:h text:style-name="P699" text:outline-level="3"><draw:frame draw:style-name="fr1" draw:name="Image10" text:anchor-type="paragraph" svg:x="1.653cm" svg:y="0.43cm" svg:width="14.697cm" svg:height="10.421cm" draw:z-index="6"><draw:image xlink:href="Pictures/1000000000000301000002F11D437883.png" xlink:type="simple" xlink:show="embed" xlink:actuate="onLoad" draw:mime-type="image/png"/></draw:frame><text:soft-page-break/></text:h>
      <text:h text:style-name="P699" text:outline-level="3"><text:bookmark-start text:name="__RefHeading___Toc11320_2857818006"/>Figure <text:span text:style-name="T561">12</text:span> - Post CSV data import<text:bookmark-end text:name="__RefHeading___Toc11320_2857818006"/></text:h>
      <text:h text:style-name="P700" text:outline-level="3"/>
      <text:h text:style-name="P700" text:outline-level="3"/>
      <text:h text:style-name="Heading_20_3" text:outline-level="3"><text:bookmark-start text:name="__RefHeading___Toc13911_2548604501"/>Delimiters and data formats<text:bookmark-end text:name="__RefHeading___Toc13911_2548604501"/></text:h>
      <text:p text:style-name="P327"/>
      <text:p text:style-name="P248">These examples show that the data delimiter is a double quotation symbol - “ and this is the normal one used for CSV files, <text:span text:style-name="T77">but</text:span> <text:span text:style-name="T687"><text:s/></text:span>you could work for an airline who’s computer systems use<text:span text:style-name="T331">s</text:span> the single quote - ‘ <text:span text:style-name="T503">or even no quotes</text:span> <text:s/>- <text:s/><text:span text:style-name="T331">It could happen, so we allow for all three variations.</text:span></text:p>
      <text:p text:style-name="P248"/>
      <text:p text:style-name="P248">Flightlog supports both <text:span text:style-name="T503">types of quotes </text:span>and you register the one used in field <text:span text:style-name="T332">3</text:span> of record type 3.</text:p>
      <text:p text:style-name="P248">Regardless of this, Flightlog will <text:span text:style-name="T528">still </text:span>check the first character of the CSV data file to that specified in the type <text:span text:style-name="T331">3</text:span> record and if there is a difference will <text:span text:style-name="T331">use the one used in the data record but if not present will then default to use both, including without quotes</text:span>. <text:span text:style-name="T528">It will even cope with a change of quote type between fields, although that should not happen – famous last words :).</text:span></text:p>
      <text:p text:style-name="P248"/>
      <text:p text:style-name="P248"/>
      <text:p text:style-name="P518">When using your CSV configuration for the first few times compare CSV data against that stored in the flight log, looking closely at date, start, end times, capacity times, pilots name and Remarks to ensure nothing is wrong or in the case of remarks, missing. It could mean an error in your configuration file data or a <text:span text:style-name="T506">software </text:span>bug and if so<text:span text:style-name="T562">,</text:span> report the problem, if needed supply<text:span text:style-name="T562">ing</text:span> the CSV data along with your configuration file and send as an archived email attachment – see email address on inside front cover <text:span text:style-name="T529">but don’t forget to register your usage of Flightlog so we know what your set up is i.e., platform (O/S), version, compiler version and location (country) see </text:span><text:span text:style-name="T529"><text:bookmark-ref text:reference-format="chapter" text:ref-name="__RefHeading___Toc19015_2548604501">12</text:bookmark-ref></text:span><text:span text:style-name="T529"><text:s text:c="2"/></text:span><text:span text:style-name="T529"><text:bookmark-ref text:reference-format="text" text:ref-name="__RefHeading___Toc19015_2548604501">Appendix R -  Registering Flightlog</text:bookmark-ref></text:span><text:span text:style-name="T529"><text:s/>page </text:span><text:span text:style-name="T529"><text:bookmark-ref text:reference-format="page" text:ref-name="__RefHeading___Toc19015_2548604501">87</text:bookmark-ref></text:span><text:span text:style-name="T529">.</text:span></text:p>
      <text:p text:style-name="P270"/>
      <text:h text:style-name="P659" text:outline-level="1"><text:bookmark-start text:name="__RefHeading___Toc14777_2548604501"/>Appendix <text:span text:style-name="T285">A - <text:s/></text:span>Keyboard operations or actions <text:span text:style-name="T699">during</text:span><text:span text:style-name="T285"> </text:span>data entry.<text:bookmark-end text:name="__RefHeading___Toc14777_2548604501"/></text:h>
      <text:p text:style-name="P151"/>
      <text:p text:style-name="P142">During <text:span text:style-name="T688">d</text:span>ata entry the following keys are available when shown on screen</text:p>
      <text:p text:style-name="P142"/>
      <text:p text:style-name="P142">F1 <text:s text:c="2"/>= <text:span text:style-name="T163">Displays list of Airfields by ICAO code. At end returns to data entry screen.</text:span></text:p>
      <text:p text:style-name="P142">F2 <text:s text:c="2"/>= <text:span text:style-name="T163">Displays next flight log record after current one, when in amend mode.</text:span></text:p>
      <text:p text:style-name="P142">F3 <text:s text:c="2"/>= <text:span text:style-name="T163">Displays list of Aircraft types. At end returns to data entry screen.</text:span></text:p>
      <text:p text:style-name="P142">F4 <text:s text:c="2"/>= <text:span text:style-name="T398">Delete the current record being Amended. This is not available for data entry.</text:span></text:p>
      <text:p text:style-name="P144">F5 <text:s text:c="2"/>= <text:span text:style-name="T398">In Amend mode save the flight data now, go back to the Date start capture for a new</text:span></text:p>
      <text:p text:style-name="P456"><text:tab/>record to change.</text:p>
      <text:p text:style-name="P143">F10 = <text:span text:style-name="T163">Go back one data entry field. Doing so more than once will get back to beginning of</text:span></text:p>
      <text:p text:style-name="P146"><text:tab/>data entry as way was with Escape.</text:p>
      <text:p text:style-name="P142">E<text:span text:style-name="T163">sc</text:span> <text:span text:style-name="T163">= Go back to beginning of data entry (Flight Date).</text:span></text:p>
      <text:p text:style-name="P142"/>
      <text:p text:style-name="P142"/>
      <text:p text:style-name="P142">During numeric data entry for flight times for specific capacity <text:span text:style-name="T467">within</text:span> day <text:span text:style-name="T467">and</text:span> night.</text:p>
      <text:p text:style-name="P142">Z or z in field position 1 will set the field to 00.00 for both Data entry and Amend.</text:p>
      <text:p text:style-name="P142"/>
      <text:p text:style-name="P145"><text:span text:style-name="T467">When</text:span> entering Capacity :</text:p>
      <text:p text:style-name="P142">I <text:s/>provides P1I</text:p>
      <text:p text:style-name="P142">T provides P1T</text:p>
      <text:p text:style-name="P142"/>
      <text:p text:style-name="P142"><text:span text:style-name="T467">When e</text:span>ntering Captain <text:span text:style-name="T468">name</text:span>:</text:p>
      <text:p text:style-name="P142">S <text:s text:c="3"/>(letter S and one space) then enter key <text:span text:style-name="T467">will</text:span> give SELF.</text:p>
      <text:p text:style-name="P142"/>
      <text:p text:style-name="P146">During entering flight duration times for P1, P2 &amp;,3 Day or night:</text:p>
      <text:p text:style-name="P147">F5 <text:s/>= Save<text:span text:style-name="T467">s</text:span> data record retaining <text:span text:style-name="T398">all </text:span>data previously entered if any, <text:span text:style-name="T688">but only if</text:span> in <text:span text:style-name="T30">A</text:span><text:span text:style-name="T23">mend</text:span> mode <text:span text:style-name="T398">and </text:span>if all changes required have been competed. Saves time.</text:p>
      <text:p text:style-name="P147"/>
      <text:p text:style-name="P149">During Amend mode having entered Flight date and time and ready to accept a changed date <text:span text:style-name="T398">or later in the data amend process</text:span>:</text:p>
      <text:p text:style-name="P149">F4 <text:s/>= Delete current record from system ( there is no recovery from this ) it is gone !</text:p>
      <text:p text:style-name="P149">Useful when you will re-enter the data or have done so already using a different date/time.</text:p>
      <text:p text:style-name="P149"/>
      <text:p text:style-name="P148">Right arrow = <text:span text:style-name="T657"><text:tab/></text:span>Move to the right one letter <text:span text:style-name="T398">or</text:span> number.</text:p>
      <text:p text:style-name="P148">Left arrow <text:s text:c="2"/>= <text:span text:style-name="T657"><text:tab/></text:span>Move to the left one letter or number.</text:p>
      <text:p text:style-name="P148">Back space =<text:span text:style-name="T657"><text:tab/></text:span>Move to the left deleting the character <text:span text:style-name="T398">on the left</text:span>.</text:p>
      <text:p text:style-name="P148">Home and End = <text:span text:style-name="T657"><text:tab/>M</text:span>ove to left or right most position of current <text:span text:style-name="T164">text based </text:span>field.</text:p>
      <text:p text:style-name="P148"><text:span text:style-name="T164">[ May not work for numeric fields depending on O/S (</text:span>operating system<text:span text:style-name="T164">)</text:span> <text:span text:style-name="T164">and its set up. ]</text:span></text:p>
      <text:p text:style-name="P511">Escape = <text:span text:style-name="T657"><text:tab/><text:tab/></text:span>In menu will quit program, same as letter X.</text:p>
      <text:p text:style-name="P148">Del <text:s/>= <text:span text:style-name="T657"><text:tab/><text:tab/><text:tab/></text:span>Delete current character position as shown <text:span text:style-name="T398">under </text:span>the cursor.</text:p>
      <text:p text:style-name="P148">Shift = <text:span text:style-name="T657"><text:tab/><text:tab/></text:span>Change case of letter on selected key (both used together).</text:p>
      <text:p text:style-name="P150">INSert or Ins <text:s/>= <text:span text:style-name="T657"><text:tab/></text:span>Enter text in insert mode within a field such as remarks or captain name but</text:p>
      <text:p text:style-name="P150"><text:span text:style-name="T725"><text:tab/><text:tab/><text:tab/></text:span>remember to press again to stop insert mode.</text:p>
      <text:p text:style-name="P149"><text:span text:style-name="T74">Warning</text:span> if right most character is at the <text:span text:style-name="T468">data fields </text:span>right most end point you will not be able to enter anything more so must press INSert again to go back to over write mode. Th<text:span text:style-name="T164">i</text:span>s is the normal mode.</text:p>
      <text:p text:style-name="P149">There are other<text:span text:style-name="T164">s</text:span> but may w<text:span text:style-name="T164">e</text:span>ll depend on your <text:span text:style-name="T164">O/S </text:span>and set up, such as:</text:p>
      <text:p text:style-name="P149">Print Screen = <text:span text:style-name="T657"><text:tab/>P</text:span>ass screen content to your printer.</text:p>
      <text:p text:style-name="P148"/>
      <text:h text:style-name="P652" text:outline-level="1"/>
      <text:h text:style-name="P655" text:outline-level="1"><text:bookmark-start text:name="__RefHeading___Toc12906_2548604501"/>Appendix B – <text:span text:style-name="T306">Warning and Error messages</text:span><text:bookmark-end text:name="__RefHeading___Toc12906_2548604501"/></text:h>
      <text:p text:style-name="Text_20_body"/>
      <text:h text:style-name="P676" text:outline-level="2"><text:bookmark-start text:name="__RefHeading___Toc22960_957585968"/>Overview<text:bookmark-end text:name="__RefHeading___Toc22960_957585968"/></text:h>
      <text:p text:style-name="P534"/>
      <text:p text:style-name="P534">Before listing the individual messages which for some, mention the use of SSD data drives <text:span text:style-name="T468">a</text:span> brief discussion on them <text:span text:style-name="T530">might be helpful but is a little bit technical</text:span>:</text:p>
      <text:p text:style-name="P534"><text:s/></text:p>
      <text:h text:style-name="P677" text:outline-level="2"><text:bookmark-start text:name="__RefHeading___Toc30893_2548604501"/>SSDs and Garbage Collection<text:bookmark-end text:name="__RefHeading___Toc30893_2548604501"/></text:h>
      <text:p text:style-name="P448"/>
      <text:p text:style-name="P614">If you are running with SSD’s you should be aware of the problem of garbage collection on *nix based systems such as Linux. This relates to the fact that all SSD’s are not created equal, e.g., some have good controllers built-in and other<text:span text:style-name="T699">s</text:span> – well not really.</text:p>
      <text:p text:style-name="P614"/>
      <text:p text:style-name="P614">An example, when <text:span text:style-name="T431">we f</text:span>irst installed <text:span text:style-name="T468">a </text:span>SSD into <text:span text:style-name="T468">a </text:span>Linux based system <text:span text:style-name="T431">we</text:span> found out very quickly that you had to run a <text:span text:style-name="T432">L</text:span>inux util<text:span text:style-name="T432">ity</text:span> called fstrim on a regular basis like in nightly so <text:span text:style-name="T431">we</text:span> set up a cron job to do just that at midnight, running as sudo <text:span text:style-name="T431">(</text:span>or root<text:span text:style-name="T431">)</text:span> ‘fstrim -av’.</text:p>
      <text:p text:style-name="P615">Great you think, well not so much when running Crucial SSDs as their controller require 8+ hours of idle <text:span text:style-name="T468">time </text:span>to process the garbage and even then, <text:span text:style-name="T468">they</text:span> may not, as <text:span text:style-name="T432">it</text:span> forced <text:span text:style-name="T431">us</text:span> to <text:span text:style-name="T688">shut down</text:span> the system and boot into bios and leave it – No not a solution as the SSD filled up very quickly and I do mean quickly <text:span text:style-name="T432">and we cannot spare the system time to make it go offline. </text:span></text:p>
      <text:p text:style-name="P613">This is not the only brand that will cause this problem.</text:p>
      <text:p text:style-name="P614"/>
      <text:p text:style-name="P614">So SSD mk 2 – bought Samsung <text:span text:style-name="T431">85</text:span>0 as a test and found out that their controller did not require such idle time. Then bought two <text:span text:style-name="T699">M</text:span>.2 <text:s/>960’s <text:span text:style-name="T433">SSD’s and</text:span> installed in server and laptop (windows), a <text:span text:style-name="T433">Samsung </text:span>850 into a Mac <text:span text:style-name="T433">P</text:span>ro dual quad Xeon <text:span text:style-name="T431">CPU </text:span>s<text:span text:style-name="T433">ystem</text:span> and all work as advertised well apart from <text:span text:style-name="T431">a</text:span> media system that also has a <text:span text:style-name="T699">M</text:span>.2 <text:span text:style-name="T432">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431">e</text:span>mp<text:span text:style-name="T431">orary</text:span> data areas although not sure where exactly.</text:p>
      <text:p text:style-name="P614">So in this instance it cannot do a clear up quickly enough to cope, again do not know why. <text:span text:style-name="T432">Just have to remember not to do a lot at a time :(</text:span></text:p>
      <text:p text:style-name="P614"/>
      <text:p text:style-name="P614">So what is this about I hear you ask? <text:s/>Well <text:span text:style-name="T468">(now the technical bit) </text:span>unlike <text:span text:style-name="T433">a </text:span>normal hard drive that, when you delete a file it <text:span text:style-name="T431">is</text:span> job done. <text:span text:style-name="T432">I</text:span>t is not that straight forwards for a SSD. <text:s/>When a file is deleted or moved or updated it has sector<text:span text:style-name="T432">s / clusters</text:span> on the media that are no longer in use and the SSD controller has to go through a process called Garbage Collection and this mean <text:span text:style-name="T629">that </text:span>the onboard SSD controller goes though each sector checking if it is not in use then clear the whole sector do<text:span text:style-name="T432">w</text:span>n <text:span text:style-name="T432">by </text:span>set<text:span text:style-name="T432">ting it</text:span> to X‘00000000’ (X = Hex) <text:span text:style-name="T432">for every byte in the sector,</text:span> so takes a wee bit of time.</text:p>
      <text:p text:style-name="P614"/>
      <text:p text:style-name="P614">Now as <text:span text:style-name="T431">we</text:span> run the fstrim process every midnight it keep it under control at least totally on <text:span text:style-name="T431">the</text:span> servers and Mac pro. The Windows system seems to cope without doing a thing – just as well really as I have no idea what it does<text:span text:style-name="T734">,</text:span> as I cannot find any doc<text:span text:style-name="T629">umentation</text:span> on it.</text:p>
      <text:p text:style-name="P614"/>
      <text:p text:style-name="P614">So long story very short, if you run SSD’s on a Linux based system you MUST make sure fstrim is run often enough to clean it up before it gets out of space, that has not been cleaned up because, regardless of its size, if all clusters <text:span text:style-name="T432">have been </text:span>used and have not been cleaned up it is the <text:span text:style-name="T432">equivalent</text:span> of a f<text:span text:style-name="T433">i</text:span>ll<text:span text:style-name="T433">ed</text:span> drive and <text:span text:style-name="T431">we</text:span> <text:span text:style-name="T431">are</text:span> using 256GB and 500GB despite them only used for booting and minor other data requirements, they can <text:span text:style-name="T432">and do </text:span>get clogged up.</text:p>
      <text:p text:style-name="P612"/>
      <text:p text:style-name="P612"><text:soft-page-break/>You have been warned. So keep that in mind when looking at some of these error messages regarding a full drive. <text:s/>I recommend you do NOT use a SSD to hold application data on and their performance is not that heavy a usage problem as most of the time <text:span text:style-name="T430">Flightlog</text:span> is waiting for the user to key some thing in and the grunt work is done quickly enough. <text:span text:style-name="T468">Note that the fstrim program is normally found in the util-linux package so this needs to be installed and most distro’s do this if it finds a SSD in the system during a Linux installation. As said before, we have had no such problem using Samsung 850, 950, 960 SSD’s but on some systems fstrim is run at 12:00 and 00:00 each and every day.</text:span><text:span text:style-name="T719"> As well as on booting the system all done via a crontab job set as @reboot as well as 00:00 and 12:00 under Linux.</text:span></text:p>
      <text:p text:style-name="P612"/>
      <text:p text:style-name="P694">Note that when rebooting a system, you will get a report from fstrim that shows the total capacity of the SSD as being processed - that is normal. It should not normally happen otherwise.</text:p>
      <text:p text:style-name="P308"/>
      <text:h text:style-name="P678" text:outline-level="2"><text:bookmark-start text:name="__RefHeading___Toc30895_2548604501"/>Warning and Error messages produced by Flightlog<text:bookmark-end text:name="__RefHeading___Toc30895_2548604501"/></text:h>
      <text:p text:style-name="P165"/>
      <text:p text:style-name="P165">Program Error messages used: <text:s/><text:span text:style-name="T355">All s</text:span>upplied in English.</text:p>
      <text:p text:style-name="P165"/>
      <text:p text:style-name="P165">Programming Errors in file sizing<text:tab/><text:tab/>SY001 through SY00<text:span text:style-name="T288">3 (with file name &amp; size).</text:span></text:p>
      <text:p text:style-name="P165">Terminal size Errors: <text:tab/><text:tab/><text:tab/>SY010 through SY012.</text:p>
      <text:p text:style-name="P165">CSV Warning / Error messages:<text:tab/><text:tab/>SY021 through SY024.</text:p>
      <text:p text:style-name="P165">Operational, Warning/Error messages:<text:tab/>FL001 through FL0<text:span text:style-name="T355">50</text:span>.</text:p>
      <text:p text:style-name="P165"/>
      <text:p text:style-name="P457">Messages in the range SY001 to SY003 are all critical errors and the program cannot be used without an update as they indicate a programming defect: Report immediately as a ‘critical bug’ on SF website for Flightlog or direct using contact information shown on inside front cover of this manual.</text:p>
      <text:p text:style-name="P217"/>
      <text:p text:style-name="P217">These <text:span text:style-name="T355">messages mention </text:span>three ‘back up’ files <text:span text:style-name="T719">and </text:span>are in fact the sequential version<text:span text:style-name="T430">s</text:span> of each of the indexed <text:span text:style-name="T305">primary data files</text:span>.</text:p>
      <text:p text:style-name="P218">The<text:span text:style-name="T305">y</text:span> are used to recreate the indexed files if you change platforms or Cobol compilers or still using <text:span text:style-name="T355">the </text:span>GnuCOBOL compiler but change the ISAM file handler <text:span text:style-name="T305">as they do not share the same format of data and these sequential files help to safeguard your data and recreate the indexed files having previously saved then removed them. </text:span></text:p>
      <text:p text:style-name="P458">If indexed files are not present in the working directory when Flightlog starts but the sequential one’s are, then the indexed files will be automatically created from them.</text:p>
      <text:p text:style-name="P217"/>
      <text:p text:style-name="P81">SY001 Fltlog length not same as back up </text:p>
      <text:p text:style-name="P81"><text:tab/><text:span text:style-name="T304">This file is not defined as having the same size as of the backup file (Sequential).</text:span></text:p>
      <text:p text:style-name="P85"><text:tab/><text:span text:style-name="T304">This is a programming error as both must be same size. You cannot continue to use the</text:span></text:p>
      <text:p text:style-name="P114"><text:tab/>Flightlog program. <text:s/>Report immediately to name listed on inside front cover for a fast</text:p>
      <text:p text:style-name="P114"><text:tab/>update. As this is tested for, after each update these three messages should not appear, -</text:p>
      <text:p text:style-name="P114"><text:tab/>Famous last words :)</text:p>
      <text:p text:style-name="P81"/>
      <text:p text:style-name="P81">SY002 Airfield length not same as back up.</text:p>
      <text:p text:style-name="P86"><text:tab/>See comments for SY001 but applies to the two Airfield files.</text:p>
      <text:p text:style-name="P81"/>
      <text:p text:style-name="P81">SY003 Aircraft file length not same as back up.</text:p>
      <text:p text:style-name="P88"><text:tab/><text:span text:style-name="T304">See comments for SY001 but applies to the two Aircraft files.</text:span></text:p>
      <text:p text:style-name="P88"/>
      <text:p text:style-name="P87"><text:span text:style-name="T355">They w</text:span>ill appear also with file name <text:span text:style-name="T288">and size shown as ‘</text:span>= nnnnn’ <text:span text:style-name="T355">etc, that helps to indicate the exact problem, so pass on all such output so that it can be fixed </text:span>:</text:p>
      <text:p text:style-name="P81"/>
      <text:p text:style-name="P81"><text:span text:style-name="T355">For SY010 &amp; SY012, t</text:span>hese <text:span text:style-name="T355">appear</text:span> if <text:span text:style-name="T355">the</text:span> terminal program <text:span text:style-name="T355">is </text:span>set up too small, must be width =&gt; <text:span text:style-name="T286">106),</text:span> length =&gt;24: <text:span text:style-name="T355">[=&gt; means equal or larger]. For width there is no need to be <text:s/>greater than 106, as any extra will not be used. Every line greater than 24 will be used for some data display lists such as requested via function keys F1 &amp; F3.</text:span></text:p>
      <text:p text:style-name="P81"/>
      <text:p text:style-name="P81">SY010 Terminal program not set to length =&gt; 24.</text:p>
      <text:p text:style-name="P81"><text:tab/><text:span text:style-name="T304">Terminal program set to use less than 24 lines. Fix to 24 or longer.</text:span></text:p>
      <text:p text:style-name="P82"><text:tab/><text:span text:style-name="T303">Program rechecks after entering return</text:span><text:span text:style-name="T719"> subject to the terminal program used</text:span><text:span text:style-name="T303">.</text:span></text:p>
      <text:p text:style-name="P81"/>
      <text:p text:style-name="P81">SY01<text:span text:style-name="T288">2</text:span> Cannot display <text:span text:style-name="T355">via </text:span>menu option F as <text:span text:style-name="T355">screen too narrow</text:span> <text:span text:style-name="T355">i.e., less than</text:span> 106.</text:p>
      <text:p text:style-name="P89"><text:tab/>If screen less than 106 you will get a bad screen if requesting a display of menu<text:span text:style-name="T636"> </text:span>option F</text:p>
      <text:p text:style-name="P89"><text:span text:style-name="T636"><text:tab/></text:span>Analysis &amp; Totals Display.</text:p>
      <text:p text:style-name="P90"><text:tab/><text:span text:style-name="T469">Adjust the width or length of screen as p</text:span>rogram <text:span text:style-name="T468">recheck</text:span>s after entering return<text:span text:style-name="T719">. </text:span></text:p>
      <text:p text:style-name="P90"><text:soft-page-break/><text:span text:style-name="T719"><text:tab/>Subject to the terminal program used</text:span>.</text:p>
      <text:p text:style-name="P81"/>
      <text:p text:style-name="P81"/>
      <text:p text:style-name="P165"><text:span text:style-name="T355">Messages SY021 through SY024.T</text:span>hese are for <text:span text:style-name="T287">CSV</text:span> <text:span text:style-name="T355">layout </text:span>definition<text:span text:style-name="T355">s</text:span> or data errors:</text:p>
      <text:p text:style-name="P165"/>
      <text:p text:style-name="P81">SY021 Bad data in CSV layout record – Aborting</text:p>
      <text:p text:style-name="P81"><text:tab/><text:span text:style-name="T303">Invalid data in CSV layout record/s record type 1 or 2. Fix and rerun.</text:span></text:p>
      <text:p text:style-name="P81"/>
      <text:p text:style-name="P81">SY022 Too many type 1 recs (&gt; 96) – Aborting</text:p>
      <text:p text:style-name="P85"><text:tab/><text:span text:style-name="T302">You have defined more than 96 CSV fields and the defined limit is 96. Check your</text:span></text:p>
      <text:p text:style-name="P115"><text:s/><text:tab/>created data and see if you have made a mistake. If not report problem in the SF</text:p>
      <text:p text:style-name="P85"><text:span text:style-name="T302"><text:tab/>Tracking tool </text:span><text:s/><text:span text:style-name="T302">for Flightlog requesting a larger CSV field limit. Note that if you have the</text:span></text:p>
      <text:p text:style-name="P85"><text:span text:style-name="T636"><text:tab/>OS (Open source) version with source code you can change this yourself using <text:tab/>a </text:span><text:span text:style-name="T27">text</text:span></text:p>
      <text:p text:style-name="P85"><text:span text:style-name="T41"><text:tab/></text:span><text:span text:style-name="T302">editor. See </text:span><text:span text:style-name="T302"><text:bookmark-ref text:reference-format="text" text:ref-name="__RefHeading___Toc9332_957585968">Changing settings for CSV field limits</text:bookmark-ref></text:span><text:span text:style-name="T302"><text:s/>page </text:span><text:span text:style-name="T302"><text:bookmark-ref text:reference-format="page" text:ref-name="__RefHeading___Toc9332_957585968">66</text:bookmark-ref></text:span><text:span text:style-name="T302"><text:s/>at the end of this section for</text:span></text:p>
      <text:p text:style-name="P114"><text:tab/>more information.</text:p>
      <text:p text:style-name="P83"><text:tab/></text:p>
      <text:p text:style-name="P81">SY023 Bad CSV type 2 record – Aborting</text:p>
      <text:p text:style-name="P81"><text:tab/><text:span text:style-name="T302">Format defined in type 2 record is incorrect, fix and re-run. Enter return to finish. </text:span></text:p>
      <text:p text:style-name="P81"/>
      <text:p text:style-name="P81">SY024 Not enough CSV fields defined - Aborting</text:p>
      <text:p text:style-name="P85"><text:tab/><text:span text:style-name="T301">The minimum number of CSV fields that must be defined is nine which excludes flight</text:span></text:p>
      <text:p text:style-name="P114"><text:tab/>times for P1, 2 &amp; 3 both day and night as well as<text:span text:style-name="T719"> the</text:span> IFR time.</text:p>
      <text:p text:style-name="P116"><text:s/><text:tab/>You have defined below 9 and Flightlog cannot process CSV data until you increase<text:span text:style-name="T658"> </text:span>the </text:p>
      <text:p text:style-name="P116"><text:span text:style-name="T658"><text:tab/></text:span>number of field<text:span text:style-name="T689">s</text:span> defined. You should do so for <text:span text:style-name="T23">all</text:span> fields present in the CSV <text:span text:style-name="T689">data </text:span>record.</text:p>
      <text:p text:style-name="P114"><text:tab/>Enter return to finish. Now correct the layout definition file.</text:p>
      <text:p text:style-name="P84"/>
      <text:p text:style-name="P167"/>
      <text:p text:style-name="P168"><text:span text:style-name="T287">P</text:span>rimary <text:span text:style-name="T287">Flightlog</text:span> error and warning messages: <text:span text:style-name="T356">Most if not all can be displayed during data entry or other processing steps including creating reports.</text:span></text:p>
      <text:p text:style-name="P166"/>
      <text:p text:style-name="P359">Note some message start with the text [<text:span text:style-name="T61">FLnnn</text:span><text:span text:style-name="T72">]</text:span><text:span text:style-name="T61"> not displayed</text:span> and this <text:span text:style-name="T530">just </text:span>means that the message number is not displayed for this message<text:span text:style-name="T658"> or element of the message</text:span>.</text:p>
      <text:p text:style-name="P359"/>
      <text:p text:style-name="P152">FL001 Hit return when ready to continue</text:p>
      <text:p text:style-name="P152"><text:tab/><text:span text:style-name="T606">As shown press return after reading any message.</text:span></text:p>
      <text:p text:style-name="P152"/>
      <text:p text:style-name="P152">FL002 record does NOT exist. Hit return to continue</text:p>
      <text:p text:style-name="P172"><text:tab/><text:span text:style-name="T300">Requested data does not exist, could be for any of the Airfield or Flightlog files so check</text:span></text:p>
      <text:p text:style-name="P590"><text:tab/>any other message that also appears.</text:p>
      <text:p text:style-name="P163"><text:tab/><text:span text:style-name="T300">You need to enter return to continue if possible or stop this process.</text:span></text:p>
      <text:p text:style-name="P152"/>
      <text:p text:style-name="P152">FL003 record error on rewrite. Hit return to continue</text:p>
      <text:p text:style-name="P163"><text:tab/><text:span text:style-name="T300">When trying to update the flight log record an error occurred </text:span></text:p>
      <text:p text:style-name="P163"><text:tab/><text:span text:style-name="T300">Hit return to acknowledge, the process with be stopped. </text:span></text:p>
      <text:p text:style-name="P459"><text:tab/>You need to find out why – possible problem with no disk space or an SSD issues.</text:p>
      <text:p text:style-name="P163"/>
      <text:p text:style-name="P152">FL004 Record Exists</text:p>
      <text:p text:style-name="P152"><text:tab/><text:span text:style-name="T300">Warning that a record with the same flight date and start time already exists.</text:span></text:p>
      <text:p text:style-name="P152"><text:tab/><text:span text:style-name="T300">Goes back to re-enter date</text:span><text:span text:style-name="T719"> and time</text:span><text:span text:style-name="T300">.</text:span></text:p>
      <text:p text:style-name="P152"/>
      <text:p text:style-name="P162"><text:span text:style-name="T299">[</text:span><text:span text:style-name="T64">FL005 not displayed</text:span><text:span text:style-name="T299"> ] <text:s/></text:span>is a new entry. Enter Y if ok, else N to re-enter</text:p>
      <text:p text:style-name="P172"><text:tab/><text:span text:style-name="T299">Exactly the same as FL007 but for Aircraft, i.e., a new aircraft type has been entered, so</text:span></text:p>
      <text:p text:style-name="P590"><text:tab/>confirming it is ok to continue or to re-enter a/c type. There is no special keys for this</text:p>
      <text:p text:style-name="P590"><text:tab/>warning available.</text:p>
      <text:p text:style-name="P152"/>
      <text:p text:style-name="P162"><text:span text:style-name="T299">[</text:span><text:span text:style-name="T64">FL006 not displayed</text:span><text:span text:style-name="T299"> ] <text:s/></text:span>Hit return to abort Correctly</text:p>
      <text:p text:style-name="P152"><text:tab/><text:span text:style-name="T298">See previous message/s after pressing return Flightlog will terminate.</text:span></text:p>
      <text:p text:style-name="P152"><text:tab/><text:span text:style-name="T298">You will need to fix the reported problem.</text:span></text:p>
      <text:p text:style-name="P152"/>
      <text:p text:style-name="P152"><text:span text:style-name="T299">[</text:span><text:span text:style-name="T64">FL007</text:span><text:span text:style-name="T299"> </text:span><text:span text:style-name="T64">not displayed</text:span><text:span text:style-name="T299"> ] </text:span>is a new entry. Enter spaces to re-enter or give name</text:p>
      <text:p text:style-name="P172"><text:tab/><text:span text:style-name="T298">You have entered an Airfield ICAO Code that is not on file, if ok, enter the name or to </text:span></text:p>
      <text:p text:style-name="P590"><text:tab/>re-enter code use the ESCape or F10 keys or by entering spaces with enter key.</text:p>
      <text:p text:style-name="P152"/>
      <text:p text:style-name="P152">FL008 MS not comp<text:span text:style-name="T298">a</text:span>t<text:span text:style-name="T298">i</text:span>ble with Capacity</text:p>
      <text:p text:style-name="P172"><text:tab/><text:span text:style-name="T298">You have entered a conflicting value for capacity such as P2 for a single engine <text:tab/>aircraft</text:span></text:p>
      <text:p text:style-name="P590"><text:tab/>or even En for a one engine aircraft. Re-enter value.</text:p>
      <text:p text:style-name="P152"/>
      <text:p text:style-name="P152">FL009 Log time &gt; Elapsed time Try again</text:p>
      <text:p text:style-name="P160"><text:tab/><text:span text:style-name="T296">Displayed normally with FL022, calculated times do not add up. Re-Enter.</text:span></text:p>
      <text:p text:style-name="P172"><text:tab/><text:span text:style-name="T362">Flightlog keeps track of the time difference between end and start times as total <text:tab/>elapsed</text:span></text:p>
      <text:p text:style-name="P590"><text:tab/>time and the individual times added up are higher.</text:p>
      <text:p text:style-name="P160"/>
      <text:p text:style-name="P152">FL010 Error on (re)WRITE Flightlog file. Hit return to continue - ABORT</text:p>
      <text:p text:style-name="P152"><text:tab/><text:span text:style-name="T298">When creating or updated the currently entered flight log data an error was found.</text:span></text:p>
      <text:p text:style-name="P172"><text:tab/><text:span text:style-name="T298">More information is displayed to help but check that you have enough free disk space or</text:span></text:p>
      <text:p text:style-name="P590"><text:tab/>for any issues with an SSD.</text:p>
      <text:p text:style-name="P152"/>
      <text:p text:style-name="P152"><text:span text:style-name="T65">[FL011 not displayed] </text:span><text:span text:style-name="T353"><text:s/></text:span>Or to re-enter, press ESCape or F10</text:p>
      <text:p text:style-name="P152"><text:tab/><text:span text:style-name="T298">Showing what extra keys can be used at this point.</text:span></text:p>
      <text:p text:style-name="P152"><text:soft-page-break/></text:p>
      <text:p text:style-name="P152">FL012 Give Pilots name &amp; Lic no.</text:p>
      <text:p text:style-name="P152"><text:tab/><text:span text:style-name="T297">Enter the crew members name and license number for printing in reports.</text:span></text:p>
      <text:p text:style-name="P152"><text:tab/><text:span text:style-name="T297">Can be any other useful information that will be printed.</text:span></text:p>
      <text:p text:style-name="P215"/>
      <text:p text:style-name="P152">FL013 Reading logbook, have found Aircraft type not on file, <text:span text:style-name="T354">created.</text:span></text:p>
      <text:p text:style-name="P172"><text:tab/><text:span text:style-name="T297">This should not happen unless you are using an empty aircraft.dat file. <text:s/>If not, it should be</text:span></text:p>
      <text:p text:style-name="P590"><text:tab/>reported as a bug along with the version of Flightlog you are using and the platform</text:p>
      <text:p text:style-name="P590"><text:tab/>details. Use the Flightlog hosted SF website and the menu option Tickets.</text:p>
      <text:p text:style-name="P161"/>
      <text:p text:style-name="P152">FL014 Date Error.</text:p>
      <text:p text:style-name="P161"><text:tab/><text:span text:style-name="T297">You incorrectly typed the date – Check the format you are using. There are three date</text:span></text:p>
      <text:p text:style-name="P215"><text:tab/>formats used in Flightlog and it depends on the system setting of LC_TIME.</text:p>
      <text:p text:style-name="P161"><text:tab/><text:span text:style-name="T297">en_GB for dd/mm/yyyy,</text:span></text:p>
      <text:p text:style-name="P161"><text:tab/><text:span text:style-name="T297">en-USA for mm/dd/yyyy</text:span></text:p>
      <text:p text:style-name="P161"><text:tab/><text:span text:style-name="T297">and any other (or omitted) will be for yyyy/mm/dd.</text:span></text:p>
      <text:p text:style-name="P161"><text:tab/><text:span text:style-name="T297">LC_TIME must be defined before running Flightlog, see the supplied script </text:span></text:p>
      <text:p text:style-name="P216"><text:tab/>run-Flightlog.sh for an example. It will NOT change any system wide settings and<text:span text:style-name="T636"> </text:span>only be</text:p>
      <text:p text:style-name="P216"><text:span text:style-name="T636"><text:tab/></text:span>valid for the duration of <text:span text:style-name="T470">running </text:span>Flightlog<text:span text:style-name="T630"> and the terminal program</text:span>.</text:p>
      <text:p text:style-name="P161"/>
      <text:p text:style-name="P347">FL015 Re-Adjust screen then hit return.</text:p>
      <text:p text:style-name="P347"><text:tab/><text:span text:style-name="T399">On first starting Flightlog and also getting SY010 or SY012 beforehand.</text:span></text:p>
      <text:p text:style-name="P349"><text:tab/><text:span text:style-name="T399">Gives you a chance to fix the problem by dragging the right or left edge so that the</text:span></text:p>
      <text:p text:style-name="P590"><text:tab/>display shows the correct width and dragging the bottom down to change the length to</text:p>
      <text:p text:style-name="P590"><text:tab/>the one required but must be over 24 deep.</text:p>
      <text:p text:style-name="P348"><text:tab/><text:span text:style-name="T399">After changing the terminal settings by dragging the edges hit return for Flightlog to</text:span></text:p>
      <text:p text:style-name="P460"><text:tab/>recheck the settings. If all is well it will continue otherwise you will get one or more</text:p>
      <text:p text:style-name="P461"><text:tab/>SY010 or SY012, messages again, <text:span text:style-name="T470">until fixed</text:span>.<text:span text:style-name="T719"> For some terminal programs this will not</text:span></text:p>
      <text:p text:style-name="P643"><text:tab/>work in that the terminal will not recalulate the values so you need to abort and restart</text:p>
      <text:p text:style-name="P643"><text:tab/>with the correct settings.</text:p>
      <text:p text:style-name="P348"/>
      <text:p text:style-name="P152">FL016 Flight Data not present yet - option aborted<text:span text:style-name="T405">.</text:span></text:p>
      <text:p text:style-name="P589"><text:tab/>There is no flight data to report on<text:span text:style-name="T719">,</text:span> hit enter to go to the menu.</text:p>
      <text:p text:style-name="P215"/>
      <text:p text:style-name="P152">FL017 Hit return to continue</text:p>
      <text:p text:style-name="P152"><text:tab/><text:span text:style-name="T296">As specified, note any displayed information and hit return to continue.</text:span></text:p>
      <text:p text:style-name="P152"/>
      <text:p text:style-name="P170">FL018<text:span text:style-name="T354"> Not in use.</text:span></text:p>
      <text:p text:style-name="P152"/>
      <text:p text:style-name="P152">FL019 CSV delimiter used from data record</text:p>
      <text:p text:style-name="P152"><text:tab/><text:span text:style-name="T299">Information only with message FL006 after, just note it press return to continue.</text:span></text:p>
      <text:p text:style-name="P152"><text:tab/><text:span text:style-name="T362">It means that the delimiter you specified in rec 3 field 3 does not match the data.</text:span></text:p>
      <text:p text:style-name="P152"/>
      <text:p text:style-name="P152">FL020 Enter Y or N only</text:p>
      <text:p text:style-name="P152"><text:tab/><text:span text:style-name="T296">Only responses can be Y or N (For Yes or No).</text:span></text:p>
      <text:p text:style-name="P152"/>
      <text:p text:style-name="P152">FL021 Enter M or S only</text:p>
      <text:p text:style-name="P152"><text:tab/><text:span text:style-name="T296">Only letter acceptable are M or S (for Multi-engine or Single).</text:span></text:p>
      <text:p text:style-name="P152"/>
      <text:p text:style-name="P152">FL022 or Inst. time &gt; Elapsed time try again</text:p>
      <text:p text:style-name="P160"><text:tab/><text:span text:style-name="T296">Displayed normally with FL009, calculated times do not add up. Re-Enter.</text:span></text:p>
      <text:p text:style-name="P462"/>
      <text:p text:style-name="P153">FL023 Airfield not found</text:p>
      <text:p text:style-name="P160"><text:tab/><text:span text:style-name="T363">Specified Airfield not on file. You will need to create it if running a CSV file import</text:span></text:p>
      <text:p text:style-name="P462"><text:tab/>otherwise it has now been created.</text:p>
      <text:p text:style-name="P152"/>
      <text:p text:style-name="P152">FL024 Record does not exist</text:p>
      <text:p text:style-name="P172"><text:tab/><text:span text:style-name="T296">Requested flight cannot be found on file. Enter another. Check both date and start time.</text:span></text:p>
      <text:p text:style-name="P590"><text:tab/>Produced by an amend request.</text:p>
      <text:p text:style-name="P152"/>
      <text:p text:style-name="P152">FL025 Error on rewriting aircraft record. Hit return to continue.</text:p>
      <text:p text:style-name="P160"><text:tab/><text:span text:style-name="T296">This should not happen unless short of disk space or a problem with an SSD and its</text:span></text:p>
      <text:p text:style-name="P462"><text:tab/>garbage collection or lack of it.</text:p>
      <text:p text:style-name="P152"/>
      <text:p text:style-name="P152">FL026 Aircraft table limit reached, Increase size and recompile</text:p>
      <text:p text:style-name="P159"><text:tab/><text:span text:style-name="T293">This and the next msg FL027 should not really happen.</text:span></text:p>
      <text:p text:style-name="P214"><text:tab/>The sizes for both of these as supplied are:</text:p>
      <text:p text:style-name="P158"><text:tab/><text:span text:style-name="T294">Aircraft is set to 1,000 different types.</text:span></text:p>
      <text:p text:style-name="P158"><text:tab/><text:span text:style-name="T294">Airfield is set to 2,000 different Airfields.</text:span></text:p>
      <text:p text:style-name="P158"/>
      <text:p text:style-name="P512">These values should be way above the number used by a commercial pilot even with 40,000<text:span text:style-name="T363">+</text:span> hours flight time. The record for aircraft types is held by a <text:span text:style-name="T470">UK navy </text:span>test pilot with a count in the hundreds <text:span text:style-name="T363">(130)</text:span>. Which makes mine look feeble at 40<text:span text:style-name="T635">+</text:span> <text:span text:style-name="T358">aircraft </text:span>types and 130+ airports / airfields and 19+ countries.</text:p>
      <text:p text:style-name="P512"><text:span text:style-name="T470">See </text:span><text:span text:style-name="T470"><text:bookmark-ref text:reference-format="text" text:ref-name="__RefHeading___Toc9334_957585968">Changing settings for Aircraft or Airfield Tables</text:bookmark-ref></text:span><text:span text:style-name="T470"><text:s/>page </text:span><text:span text:style-name="T470"><text:bookmark-ref text:reference-format="page" text:ref-name="__RefHeading___Toc9334_957585968">66</text:bookmark-ref></text:span><text:span text:style-name="T470">, at the end of this section for information to allow you to change these.</text:span></text:p>
      <text:p text:style-name="P489"/>
      <text:p text:style-name="P152">FL027 Airfield table limit reached, Increase size and recompile</text:p>
      <text:p text:style-name="P152"><text:tab/><text:span text:style-name="T363">Also see FL026 for more information as answer covers this message.</text:span></text:p>
      <text:p text:style-name="P152"/>
      <text:p text:style-name="P152">FL028 ISAM Data files do not exist, but Seq does – Recreate?</text:p>
      <text:p text:style-name="P210"><text:tab/>During program start the indexed files are not present but the Sequential files are. <text:tab/>Do you want to use these to create the working indexed files ? <text:s/>Y(es) or N(o).</text:p>
      <text:p text:style-name="P212"><text:tab/>If N(o) it will create new empty files. <text:span text:style-name="T293">Here if you want to do airfield and aircraft but not</text:span></text:p>
      <text:p text:style-name="P587"><text:tab/>flitelog then say Y to this and after files are created exit Flightlog, then just delete the file</text:p>
      <text:p text:style-name="P587"><text:tab/>or files not wanted that end in .dat. Then run Flightlog again. The missing files will be</text:p>
      <text:p text:style-name="P587"><text:tab/>recreated as empty files.</text:p>
      <text:p text:style-name="P213"/>
      <text:p text:style-name="P213">This is a way to migrate one or two files,. Airfield and Aircraft to a new Flightlog directory, maybe for a stand alone flight log record set. Yes, I d<text:span text:style-name="T531">id</text:span> this for my Mil. <text:span text:style-name="T313">Log </text:span>Book.</text:p>
      <text:p text:style-name="P164"/>
      <text:p text:style-name="P211">[ The next six messages are caused by no space on disk OR if using an SSD, garbage collection process has not been run or completed.</text:p>
      <text:p text:style-name="P211"/>
      <text:p text:style-name="P152">FL029 Error on writing Flightlog Seq file</text:p>
      <text:p text:style-name="P152"><text:tab/><text:span text:style-name="T292">Received an error when creating sequential record, out of disk space? Aborting. </text:span></text:p>
      <text:p text:style-name="P156"><text:tab/><text:span text:style-name="T292">File will not have correct data so you need to rerun after fixing the problem.</text:span></text:p>
      <text:p text:style-name="P156"/>
      <text:p text:style-name="P152">FL030 Error on writing Aircraft Seq file</text:p>
      <text:p text:style-name="P156"><text:tab/><text:span text:style-name="T292">Received an error when creating sequential record, out of disk space? Aborting. </text:span></text:p>
      <text:p text:style-name="P156"><text:tab/><text:span text:style-name="T292">File will not have correct data so you need to rerun after fixing the problem.</text:span></text:p>
      <text:p text:style-name="P156"/>
      <text:p text:style-name="P156"/>
      <text:p text:style-name="P157">FL031 Error on writing Airfield Seq file</text:p>
      <text:p text:style-name="P156"><text:tab/><text:span text:style-name="T292">Received an error when creating sequential <text:s/>record, out of disk space? Aborting. </text:span></text:p>
      <text:p text:style-name="P156"><text:tab/><text:span text:style-name="T292">File will not have correct data so you need to rerun after fixing the problem.</text:span></text:p>
      <text:p text:style-name="P156"/>
      <text:p text:style-name="P156">FL032 Error on writing Flightlog Dat file</text:p>
      <text:p text:style-name="P156"><text:tab/><text:span text:style-name="T292">Received an error when creating indexed data record, out of disk space? Aborting. </text:span></text:p>
      <text:p text:style-name="P156"><text:tab/><text:span text:style-name="T292">File will not have correct data so you need to rerun after fixing the problem.</text:span></text:p>
      <text:p text:style-name="P156"/>
      <text:p text:style-name="P156">FL033 Error on writing Aircraft Dat file</text:p>
      <text:p text:style-name="P156"><text:tab/><text:span text:style-name="T292">Received an error when creating record, out of disk space? Aborting. </text:span></text:p>
      <text:p text:style-name="P156"><text:tab/><text:span text:style-name="T292">File will not have correct data so you need to rerun after fixing the problem.</text:span></text:p>
      <text:p text:style-name="P156"/>
      <text:p text:style-name="P156">FL034 Error on writing Airfield Dat file</text:p>
      <text:p text:style-name="P156"><text:tab/><text:span text:style-name="T292">Received an error when creating record, out of disk space? Aborting. </text:span></text:p>
      <text:p text:style-name="P156"><text:tab/><text:span text:style-name="T292">File will not have correct data so you need to rerun after fixing the problem.</text:span></text:p>
      <text:p text:style-name="P156"/>
      <text:p text:style-name="P152">FL035 Aircraft not found</text:p>
      <text:p text:style-name="P152"><text:tab/><text:span text:style-name="T292">Information only, will create a new record for this aircraft.</text:span></text:p>
      <text:p text:style-name="P152"/>
      <text:p text:style-name="P152">To Delete press F4</text:p>
      <text:p text:style-name="P152"><text:tab/><text:span text:style-name="T292">As shown, press the F4 function key to Delete the current record if required.</text:span></text:p>
      <text:p text:style-name="P152"/>
      <text:p text:style-name="P152">FL037 No CSV Param file present. Hit return for menu</text:p>
      <text:p text:style-name="P152"><text:tab/><text:span text:style-name="T292">CSV configuration file not found in current directory. </text:span>Aborted, <text:span text:style-name="T292">fix and re-run.</text:span></text:p>
      <text:p text:style-name="P152"/>
      <text:p text:style-name="P152">FL038 Invalid CSV record type - not = 1 – 6</text:p>
      <text:p text:style-name="P155"><text:tab/><text:span text:style-name="T291">When reading CSV configuration file, record type read is not = 1 through 6. </text:span></text:p>
      <text:p text:style-name="P464"><text:tab/>Aborted, Fix and re-run.</text:p>
      <text:p text:style-name="P152"/>
      <text:p text:style-name="P152">FL039 CSV rec type 1 not found or bad, CSV process cancelled</text:p>
      <text:p text:style-name="P155"><text:tab/><text:span text:style-name="T291">As shown there was no type 1 records present in CSV configuration file.</text:span></text:p>
      <text:p text:style-name="P464"><text:tab/>Aborted, Fix and re-run. <text:span text:style-name="T471">This does not appear if </text:span><text:span text:style-name="T68">only</text:span><text:span text:style-name="T471"> processing type 4 &amp; 5 records.</text:span></text:p>
      <text:p text:style-name="P152"/>
      <text:p text:style-name="P152">FL040 CSV import file not found - Aborting import</text:p>
      <text:p text:style-name="P155"><text:tab/><text:span text:style-name="T291">The file specified in the CSV configuration file rec</text:span><text:span text:style-name="T719">ord</text:span><text:span text:style-name="T291"> type 3 cannot be found in current</text:span></text:p>
      <text:p text:style-name="P464"><text:tab/>directory used by Flightlog. Or are you in the wrong one? Aborted, Fix and re-run.</text:p>
      <text:p text:style-name="P174"><text:tab/><text:span text:style-name="T363">If you cannot use the default CSV file name consider using rec</text:span><text:span text:style-name="T719">ord</text:span><text:span text:style-name="T363"> type 3 field 4 to give</text:span></text:p>
      <text:p text:style-name="P174"><text:span text:style-name="T719"><text:tab/></text:span><text:span text:style-name="T363">the</text:span><text:span text:style-name="T719"> </text:span><text:span text:style-name="T630">correct file name.</text:span></text:p>
      <text:p text:style-name="P152"/>
      <text:p text:style-name="P152">FL041 Flight log entry already exists</text:p>
      <text:p text:style-name="P172"><text:tab/><text:span text:style-name="T291">Usually comes with message FL042 but confirms the same CSV data file might have</text:span></text:p>
      <text:p text:style-name="P590"><text:tab/>been used more than once. More than one data record having same problem will result in</text:p>
      <text:p text:style-name="P590"><text:tab/>just this message with the next line containing a full stop for every record with the same</text:p>
      <text:p text:style-name="P590"><text:tab/>problem so 10 full stops means an extra 10 duplicate records.</text:p>
      <text:p text:style-name="P152"/>
      <text:p text:style-name="P152">FL042 Writing flitelog from CSV Error <text:s/><text:span text:style-name="T364">nn</text:span></text:p>
      <text:p text:style-name="P173"><text:tab/><text:span text:style-name="T290">An error was detected when trying to write a new flight record. Check disc space or </text:span></text:p>
      <text:p text:style-name="P578"><text:tab/>access rights to do so. Flightlog will continue but you are likely to get this for every<text:span text:style-name="T630"> </text:span>data</text:p>
      <text:p text:style-name="P578"><text:span text:style-name="T630"><text:tab/></text:span>record it is creating.</text:p>
      <text:p text:style-name="P172"><text:tab/><text:span text:style-name="T291">It can and is more likely that you are rerunning the same CSV data again, and this record</text:span></text:p>
      <text:p text:style-name="P590"><text:tab/>has already been stored in the flitelog file in which case you can ignore it but you might</text:p>
      <text:p text:style-name="P590"><text:tab/>well see this message for every CSV record being processed. In this case the value for</text:p>
      <text:p text:style-name="P172"><text:soft-page-break/><text:span text:style-name="T636"><text:tab/>nn will be the specific error, so see </text:span><text:span text:style-name="T636"><text:bookmark-ref text:reference-format="text" text:ref-name="__RefHeading___Toc12321_957585968">File handling status codes and their meaning</text:bookmark-ref></text:span><text:span text:style-name="T636"><text:s/>page </text:span><text:span text:style-name="T636"><text:bookmark-ref text:reference-format="page" text:ref-name="__RefHeading___Toc12321_957585968">68</text:bookmark-ref></text:span></text:p>
      <text:p text:style-name="P590"><text:tab/>for these.</text:p>
      <text:p text:style-name="P152"/>
      <text:p text:style-name="P152">FL043 Bad CSV Start/End time - </text:p>
      <text:p text:style-name="P171"><text:tab/><text:span text:style-name="T290">CSV data is invalid or you specified the wrong format in type 2 record. You need to check</text:span></text:p>
      <text:p text:style-name="P587"><text:tab/>this. Run aborted.</text:p>
      <text:p text:style-name="P152"/>
      <text:p text:style-name="P152">FL044 No A/c type present or no match on Aircraft file</text:p>
      <text:p text:style-name="P171"><text:tab/><text:span text:style-name="T289">As shown, a/c type in CSV <text:s/>data file not been set up using record type 5. You must do so.</text:span></text:p>
      <text:p text:style-name="P587"><text:tab/>Run aborted. Note that record types 4 &amp; 5 are processed before processing the CSV</text:p>
      <text:p text:style-name="P587"><text:tab/>data file.</text:p>
      <text:p text:style-name="P152"/>
      <text:p text:style-name="P152">FL045 No x1,2 or 3 data present/set up</text:p>
      <text:p text:style-name="P208"><text:tab/><text:span text:style-name="T290">Warning, s</text:span>ame as FL046 and often seen with it.</text:p>
      <text:p text:style-name="P152"/>
      <text:p text:style-name="P152">FL046 Computed value may not be accurate.</text:p>
      <text:p text:style-name="P208"><text:tab/>Warning that separate data for x1, x2 and x3 day and night is not provided therefore</text:p>
      <text:p text:style-name="P209"><text:tab/>accurate totals can not be produced. Require<text:span text:style-name="T361">s</text:span> amending these records after CSV<text:span text:style-name="T636"> </text:span>import</text:p>
      <text:p text:style-name="P209"><text:span text:style-name="T636"><text:tab/></text:span>process if required.</text:p>
      <text:p text:style-name="P152"/>
      <text:p text:style-name="P152">FL047 No I<text:span text:style-name="T471">FR</text:span> time data present/set up</text:p>
      <text:p text:style-name="P579"><text:tab/>Warning No <text:span text:style-name="T471">IFR/</text:span>Instrument time set up or present in CSV record. Will get this for<text:span text:style-name="T630"> </text:span>every</text:p>
      <text:p text:style-name="P579"><text:span text:style-name="T630"><text:tab/></text:span>record this applies to. You should consider amending each record this applies<text:span text:style-name="T630"> </text:span>to if<text:span text:style-name="T630"> </text:span>such</text:p>
      <text:p text:style-name="P579"><text:span text:style-name="T630"><text:tab/></text:span>time was actually logged for flight.</text:p>
      <text:p text:style-name="P152"/>
      <text:p text:style-name="P152">FL048 Flight Capacity data NOT x1, x2 or x3</text:p>
      <text:p text:style-name="P169"><text:tab/><text:span text:style-name="T352">First character of capacity is not valid type i.e., (P, E, R, N, T),</text:span></text:p>
      <text:p text:style-name="P172"><text:tab/><text:span text:style-name="T290">Error: Shown for CSV data in Capacity field, where x is P (pilots), E (engineer), R (REO)</text:span></text:p>
      <text:p text:style-name="P590"><text:tab/>[Military], N (navigator) or T (Radio operator). Could be the CSV data uses different</text:p>
      <text:p text:style-name="P590"><text:tab/>designators for this field.</text:p>
      <text:p text:style-name="P208"><text:tab/>Report as feature update and do not continue with processing CSV file data until</text:p>
      <text:p text:style-name="P208"><text:tab/>Flightlog has been updated, however check <text:span text:style-name="T471">first </text:span>that it is a valid value anyway.</text:p>
      <text:p text:style-name="P154"/>
      <text:p text:style-name="P171"><text:span text:style-name="T65">[FL049 not displayed] </text:span><text:span text:style-name="T353"><text:s/></text:span>Note that dates are checked for valid format<text:span text:style-name="T630"> Information when entering</text:span></text:p>
      <text:p text:style-name="P587"><text:tab/>dates for reports (FL050 also displayed).</text:p>
      <text:p text:style-name="P152"/>
      <text:p text:style-name="P152"><text:span text:style-name="T65">[FL050 not displayed] <text:s/></text:span>Spaces for dates gives ALL &amp; space for last, means ALL from start</text:p>
      <text:p text:style-name="P169"><text:tab/><text:span text:style-name="T353">Information when entering dates for reports (FL049 also displayed).</text:span></text:p>
      <text:p text:style-name="P169"/>
      <text:p text:style-name="P495"/>
      <text:h text:style-name="P688" text:outline-level="3"><text:bookmark-start text:name="__RefHeading___Toc22962_957585968"/><text:span text:style-name="T493">Extra guidance on specific messages which</text:span> detai<text:span text:style-name="T471">l</text:span> fixes for the source file<text:bookmark-end text:name="__RefHeading___Toc22962_957585968"/></text:h>
      <text:p text:style-name="P495"/>
      <text:p text:style-name="P492">If you only have the binary or executable Flightlog program contact <text:span text:style-name="T532">us</text:span> (see inside front cover for email, phone number etc) to ask for a larger table with an idea of just how large you need.</text:p>
      <text:p text:style-name="P492"/>
      <text:p text:style-name="P535">To change the Flightlog source file <text:span text:style-name="T532">(flightlog.cbl) </text:span>you need to use a <text:span text:style-name="T23">text editor</text:span> such as notepad for Windows or vim, kate for Linux, there are many others.</text:p>
      <text:p text:style-name="P535"/>
      <text:p text:style-name="P535">Under no circumstances use a <text:span text:style-name="T61">word processor</text:span> as it will not create a plain text file. </text:p>
      <text:p text:style-name="P535">Before making any changes make a back up of the original source file, i.e., by running</text:p>
      <text:p text:style-name="P535"/>
      <text:p text:style-name="P188">cp flightlog.cbl <text:s/>flightlog-cbl-original</text:p>
      <text:p text:style-name="P495"/>
      <text:h text:style-name="Heading_20_4" text:outline-level="4"><text:bookmark-start text:name="__RefHeading___Toc9332_957585968"/>Changing settings for CSV field limits<text:bookmark-end text:name="__RefHeading___Toc9332_957585968"/></text:h>
      <text:p text:style-name="Text_20_body"/>
      <text:p text:style-name="P206">Using a text editor, open file Flightlog.cbl and search for the following text (without the quotes) :</text:p>
      <text:p text:style-name="P207">“WS-CSV-Table-Max-Size", <text:span text:style-name="T630">and </text:span>is currently set to 96, change to the required value<text:span text:style-name="T719"> and do NOT exceed 99</text:span>.</text:p>
      <text:p text:style-name="P203">Now you have to do the same with the table, searchable as :"WS-Group" and you want the second line which starts as :</text:p>
      <text:p text:style-name="P186"><text:s text:c="2"/>04 <text:s/>filler <text:s text:c="11"/>occurs 96.</text:p>
      <text:p text:style-name="P204"/>
      <text:p text:style-name="P205">Change the 96 to the required value <text:span text:style-name="T306">(do not overwrite any other text) </text:span>which <text:span text:style-name="T659">this </text:span><text:span text:style-name="T23">must </text:span>be <text:span text:style-name="T306">the </text:span>same as changed in <text:s/><text:span text:style-name="T302">WS-CSV-Table-Max-Size</text:span><text:span text:style-name="T719"> and do NOT exceed 99</text:span><text:span text:style-name="T302">.</text:span></text:p>
      <text:p text:style-name="P205"><text:span text:style-name="T302">You now save the source file and rerun the Cobol compiler exactly the same way as you did the first time, for a reminder see <text:s/></text:span><text:span text:style-name="T302"><text:bookmark-ref text:reference-format="text" text:ref-name="__RefHeading__11530_177439401">Compiling the Source code</text:bookmark-ref></text:span><text:span text:style-name="T302"><text:s/>on page </text:span><text:span text:style-name="T302"><text:bookmark-ref text:reference-format="page" text:ref-name="__RefHeading__11530_177439401">79</text:bookmark-ref></text:span><text:span text:style-name="T302">.</text:span></text:p>
      <text:p text:style-name="P200"/>
      <text:h text:style-name="Heading_20_4" text:outline-level="4"><text:bookmark-start text:name="__RefHeading___Toc9334_957585968"/>Changing settings for Aircraft or Airfield Tables<text:bookmark-end text:name="__RefHeading___Toc9334_957585968"/></text:h>
      <text:p text:style-name="P501"/>
      <text:p text:style-name="P500">First make a back up copy of the source file, see top notes at <text:bookmark-ref text:reference-format="chapter" text:ref-name="__RefHeading___Toc22962_957585968">9.3.1</text:bookmark-ref><text:s/>above.</text:p>
      <text:p text:style-name="P358"/>
      <text:p text:style-name="P491"><text:span text:style-name="T532">U</text:span>s<text:span text:style-name="T358">e</text:span> the <text:span text:style-name="T406">your text </text:span>editor’<text:span text:style-name="T358">s</text:span> search <text:span text:style-name="T358">facility</text:span> <text:span text:style-name="T358">to find</text:span> lines starting with “WS<text:span text:style-name="T357">T</text:span>-AC-<text:span text:style-name="T357">MAX</text:span>" <text:span text:style-name="T478">(</text:span>but excluding the quotes<text:span text:style-name="T478">)</text:span>, this should be around line number <text:span text:style-name="T719">1017</text:span><text:span text:style-name="T407">.</text:span></text:p>
      <text:p text:style-name="P491">Now there are <text:span text:style-name="T357">two</text:span> tables with the first <text:span text:style-name="T357">one</text:span> for Aircraft <text:span text:style-name="T295">and the next for Airfields (there are others) </text:span>and <text:span text:style-name="T295">for Aircraft, if you </text:span><text:span text:style-name="T90">need</text:span><text:span text:style-name="T295"> to, </text:span>change the lines starting with </text:p>
      <text:p text:style-name="P491"/>
      <text:p text:style-name="P183">03 <text:s/>WST-AC-MAX <text:s text:c="8"/>PIC 9999 <text:s text:c="2"/>COMP <text:s text:c="2"/>VALUE <text:span text:style-name="T23">1000</text:span>.</text:p>
      <text:p text:style-name="P183">03 <text:s/>WST-AIRCRAFT-TABLE <text:s text:c="18"/>VALUE spaces.</text:p>
      <text:p text:style-name="P183"><text:s text:c="4"/>05 <text:s/>WST-ACFT-Groups <text:s text:c="2"/>occurs <text:span text:style-name="T23">1000</text:span> <text:s/></text:p>
      <text:p text:style-name="P183"><text:span text:style-name="T407"><text:s text:c="13"/>ascendi</text:span><text:span text:style-name="T454">ng</text:span><text:span text:style-name="T452"> </text:span><text:span text:style-name="T454">k</text:span>ey WST-Aircraft <text:s/>INDEXED BY QQ.</text:p>
      <text:p text:style-name="P183"/>
      <text:p text:style-name="P491">Here change the two instances of value 1000 as shown here in <text:span text:style-name="T23">bold,</text:span> <text:s/>(on <text:s/><text:span text:style-name="T357">the above </text:span>line<text:span text:style-name="T357">s</text:span> 1 and 3) to the number you need to, such as <text:span text:style-name="T357">1500 or </text:span>2000 <text:span text:style-name="T357">etc,</text:span> but do not make it too large.</text:p>
      <text:p text:style-name="P493">They <text:span text:style-name="T23">must</text:span> have the same <text:span text:style-name="T23">value</text:span> and do not change any other text.</text:p>
      <text:p text:style-name="P491"/>
      <text:p text:style-name="P491">Now if <text:span text:style-name="T357">the </text:span>Air<text:span text:style-name="T357">field</text:span> table is not large enough, change the next table present, <text:span text:style-name="T295">“AIRFIELD-TABLE"</text:span> <text:s/>w<text:span text:style-name="T478">hich shows </text:span>these lines:</text:p>
      <text:p text:style-name="P491"/>
      <text:p text:style-name="P183">03 <text:s/>WST-AFLD-MAX <text:s text:c="7"/>PIC 9999 <text:s text:c="2"/>COMP <text:s text:c="2"/>VALUE <text:span text:style-name="T23">2000</text:span>.</text:p>
      <text:p text:style-name="P183">03 <text:s/>WST-AIRFIELD-TABLE <text:s text:c="19"/>VALUE SPACES.</text:p>
      <text:p text:style-name="P183"><text:s text:c="7"/>05 <text:s/>WST-ICAO <text:s text:c="19"/>OCCURS <text:span text:style-name="T23">2000</text:span></text:p>
      <text:p text:style-name="P183"><text:span text:style-name="T23"><text:s text:c="15"/></text:span>Ascending key WST-AIRFIELD INDEXED BY QQQ.</text:p>
      <text:p text:style-name="P202"><text:soft-page-break/></text:p>
      <text:p text:style-name="P494">Again change the value shown here in <text:span text:style-name="T23">bold, </text:span><text:span text:style-name="T94">currently set as 2000. Do not make i</text:span><text:span text:style-name="T105">t</text:span><text:span text:style-name="T94"> large</text:span><text:span text:style-name="T106">r</text:span><text:span text:style-name="T94"> than needed but round the value up to </text:span><text:span text:style-name="T105">the next </text:span><text:span text:style-name="T94">500’s, </text:span><text:span text:style-name="T105">e.g., </text:span><text:span text:style-name="T94">make Airfields to say 2500 or 3000.</text:span></text:p>
      <text:p text:style-name="P491"/>
      <text:p text:style-name="P490">Do <text:span text:style-name="T23">NOT</text:span> enter <text:span text:style-name="T358">or change </text:span><text:span text:style-name="T23">any other text</text:span> unless you know what you are doing as the compiler will reports errors when rebuilding the Flightlog program. <text:span text:style-name="T357">Word of warning: If you make these tables very large it might slow down the running of Flightlog and/or prevent other programs from running as these tables can take up a lot of your computers memory (ram) and your system will be swapping Ram memory data back and forth from the swap partition or file but that said it should only happen on computers that a small amount of RAM such as less than 8 GB but it does depend on what other applications are running at the same time.</text:span></text:p>
      <text:p text:style-name="P493"/>
      <text:p text:style-name="P490">Having made these changes save the source of Flightlog but make sure you have a copy of the original file somewhere <text:span text:style-name="T478">before hand</text:span>. Now just compile the program as you did when installing the system see <text:bookmark-ref text:reference-format="chapter" text:ref-name="__RefHeading__11526_177439401">11</text:bookmark-ref><text:s/><text:bookmark-ref text:reference-format="text" text:ref-name="__RefHeading__11526_177439401">Appendix D - Flightlog Build and Installation</text:bookmark-ref>.</text:p>
      <text:p text:style-name="P493"/>
      <text:p text:style-name="P493"><text:span text:style-name="T23">Note</text:span> that these values for both tables are only, for your own flight records. If you are going to allow Flightlog to be used by other<text:span text:style-name="T359">s</text:span> on your computer, ensure they use their own username when logging on and not yours, <text:span text:style-name="T478">this is regardless of the operating system used.</text:span> </text:p>
      <text:p text:style-name="P493"/>
      <text:p text:style-name="P493">Apart from the security issues in <text:span text:style-name="T359">this,</text:span> you <text:span text:style-name="T23">cannot</text:span> share the same flight records / data files, <text:span text:style-name="T360">just the same as you cannot share a paper flight log book,</text:span> although you could pass to them, in their own directory a copy of your aircraft and airfield data files <text:span text:style-name="T360">but </text:span><text:span text:style-name="T23">NOT</text:span> your flitelog file as that is totally unique to you <text:span text:style-name="T359">as it records all of </text:span><text:span text:style-name="T133">your</text:span><text:span text:style-name="T359"> flights</text:span>. <text:span text:style-name="T359">We s</text:span>hould point out that pilots etc, <text:span text:style-name="T532">may</text:span> not have flown the same aircraft <text:span text:style-name="T532">types, </text:span>let alone gone to the same airfields but there is no harm in doing this.</text:p>
      <text:p text:style-name="P493"/>
      <text:p text:style-name="P493">Using this process (copying the aircraft and airfield files) you can have separate flight data files to match each paper log book although I can’t see the point but some pilots might want to keep them separate say if some flying was with the military before civilian flying. For myself paper log book wise I have got a lot of them having filled <text:span text:style-name="T360">many of </text:span>them up but for Flightlog I just a<text:span text:style-name="T360">d</text:span>d the<text:span text:style-name="T689">m</text:span> into the one set of Flightlog files in the one directory.</text:p>
      <text:p text:style-name="P490"/>
      <text:p text:style-name="P356">I will repeat this as it is important, if you wish to maintain more than one set of log book data files (flight, airfield and aircraft) you must store them in their own directory and that <text:span text:style-name="T407">also </text:span>include<text:span text:style-name="T360">s</text:span> other <text:span text:style-name="T407">user</text:span>s using the same computer.</text:p>
      <text:p text:style-name="P201"/>
      <text:p text:style-name="P351"/>
      <text:h text:style-name="P663" text:outline-level="2"><text:bookmark-start text:name="__RefHeading___Toc12321_957585968"/>File handling status codes and their meaning<text:bookmark-end text:name="__RefHeading___Toc12321_957585968"/></text:h>
      <text:p text:style-name="Text_20_body"/>
      <text:h text:style-name="Heading_20_3" text:outline-level="3"><text:bookmark-start text:name="__RefHeading___Toc22964_957585968"/>File Access Error numbers.<text:bookmark-end text:name="__RefHeading___Toc22964_957585968"/></text:h>
      <text:p text:style-name="Text_20_body">02 <text:tab/><text:span text:style-name="T94">Creating a Duplicate key on alternative key which allows duplicate keys.</text:span></text:p>
      <text:p text:style-name="P505">04<text:tab/>Success (Incomplete)</text:p>
      <text:p text:style-name="Text_20_body">05 <text:tab/>Success (Optional File Not Found)</text:p>
      <text:p text:style-name="P643">06<text:tab/>Multiple records (in LS)</text:p>
      <text:p text:style-name="Text_20_body">07 <text:tab/>Success (No Unit)</text:p>
      <text:p text:style-name="P646">09<text:tab/>LS Bad Data</text:p>
      <text:p text:style-name="Text_20_body">10 <text:tab/>End of file reached if reading forward or beginning-of-file reached if reading backward</text:p>
      <text:p text:style-name="Text_20_body">14 <text:tab/>Out of key range</text:p>
      <text:p text:style-name="Text_20_body">21 <text:tab/>Key invalid</text:p>
      <text:p text:style-name="Text_20_body">22 <text:tab/><text:span text:style-name="T94">Duplicate key condition when duplicate keys are not permitted,</text:span></text:p>
      <text:p text:style-name="P596">23 <text:tab/><text:span text:style-name="T94">Start/Read has been attempted on an optional input file that is not present</text:span><text:span text:style-name="T114"> or requested</text:span></text:p>
      <text:p text:style-name="P596"><text:span text:style-name="T114"><text:tab/>key is not present on file</text:span><text:span text:style-name="T94">.</text:span></text:p>
      <text:p text:style-name="P505">24<text:tab/>Key boundary violation</text:p>
      <text:p text:style-name="Text_20_body">30 <text:tab/>Permanent I/O error</text:p>
      <text:p text:style-name="Text_20_body">31 <text:tab/>Inconsistent filename</text:p>
      <text:p text:style-name="Text_20_body">34 <text:tab/>Boundary violation</text:p>
      <text:p text:style-name="Text_20_body">35 <text:tab/>File not found</text:p>
      <text:p text:style-name="Text_20_body">37 <text:tab/>Permission denied</text:p>
      <text:p text:style-name="Text_20_body">38 <text:tab/>Closed with lock</text:p>
      <text:p text:style-name="Text_20_body">39 <text:tab/>Conflicting attribute</text:p>
      <text:p text:style-name="Text_20_body">41 <text:tab/><text:span text:style-name="T94">Open has been attempted on an already open file.</text:span></text:p>
      <text:p text:style-name="Text_20_body">42 <text:tab/><text:span text:style-name="T94">Close has been attempted on an already closed file.</text:span></text:p>
      <text:p text:style-name="Text_20_body">43 <text:tab/>Read not done</text:p>
      <text:p text:style-name="Text_20_body">44 <text:tab/>Record overflow</text:p>
      <text:p text:style-name="Text_20_body">46 <text:tab/>Read error</text:p>
      <text:p text:style-name="Text_20_body">47 <text:tab/>"OPEN INPUT" denied (insufficient permissions to read file)</text:p>
      <text:p text:style-name="Text_20_body">48 <text:tab/>"OPEN OUTPUT" denied (insufficient permissions to write to file)</text:p>
      <text:p text:style-name="Text_20_body">49 <text:tab/>"OPEN I-O" denied (insufficient permissions to read and/or write file)</text:p>
      <text:p text:style-name="Text_20_body">51 <text:tab/>Record locked</text:p>
      <text:p text:style-name="Text_20_body">52 <text:tab/>End of page</text:p>
      <text:p text:style-name="Text_20_body">57 <text:tab/>"LINAGE" specifications invalid</text:p>
      <text:p text:style-name="Text_20_body">61 <text:tab/>File sharing failure</text:p>
      <text:p text:style-name="P643">71<text:tab/>Bad Character</text:p>
      <text:p text:style-name="Text_20_body">91 <text:tab/>File not available</text:p>
      <text:p text:style-name="Text_20_body"/>
      <text:p text:style-name="P636">This information is supplied so in the event an error is displayed with an error status number you can hopefully understand the reason but in the main<text:span text:style-name="T734">,</text:span> most are hidden and a more generic message will appear, see section <text:bookmark-ref text:reference-format="chapter" text:ref-name="__RefHeading___Toc30895_2548604501">9.3</text:bookmark-ref><text:s/><text:bookmark-ref text:reference-format="text" text:ref-name="__RefHeading___Toc30895_2548604501">Warning and Error messages produced by Flightlog</text:bookmark-ref>.</text:p>
      <text:p text:style-name="P636"/>
      <text:p text:style-name="P248">Note: There <text:span text:style-name="T491">may be</text:span> others <text:span text:style-name="T492">but most if not all are here</text:span>, see GnuCOBOL Documentation. Most if not all of these indicate a program error and you should report such, giving as much information as possible as to what you were doing at the time in an email to the support email address as shown on inside front page <text:span text:style-name="T532">but note that one’s discussing duplicate keys could be that you are trying to enter the same data or rerunning the same CSV data file and if the later</text:span><text:span text:style-name="T712">,</text:span><text:span text:style-name="T532"> such messages can be ignored.</text:span></text:p>
      <text:p text:style-name="P248"/>
      <text:p text:style-name="P637">The next section at <text:bookmark-ref text:reference-format="chapter" text:ref-name="__RefHeading___Toc22966_957585968">9.5</text:bookmark-ref><text:s/><text:bookmark-ref text:reference-format="text" text:ref-name="__RefHeading___Toc22966_957585968">RDBMS error codes</text:bookmark-ref><text:s/>shows error codes when using the MySQL (or Mariadb) data base but are not implemented for Flightlog v2.02 but are present here if this changes in a later version.</text:p>
      <text:h text:style-name="P679" text:outline-level="2"><text:bookmark-start text:name="__RefHeading___Toc22966_957585968"/><text:soft-page-break/>RDBMS error codes<text:bookmark-end text:name="__RefHeading___Toc22966_957585968"/></text:h>
      <text:p text:style-name="P243"/>
      <text:p text:style-name="P243">Here is the more common errors but there are a lot more see the RDBMS Error messages in the Mysql systems manual.</text:p>
      <text:p text:style-name="P243"/>
      <text:h text:style-name="Heading_20_3" text:outline-level="3"><text:bookmark-start text:name="__RefHeading___Toc43670_1813075902"/>MySQL SQL Status messages<text:bookmark-end text:name="__RefHeading___Toc43670_1813075902"/></text:h>
      <text:p text:style-name="P619"/>
      <text:p text:style-name="P618">This is a small selection of what could occur, for others see the Mysql SQL error documentation.</text:p>
      <text:p text:style-name="P618"><text:span text:style-name="T533">The software</text:span> tries to rely on these more than on errno (Error numbers) below.</text:p>
      <text:p text:style-name="P618"/>
      <text:p text:style-name="P619">Sql-State <text:s/><text:tab/>00000 = Operation completed successfully</text:p>
      <text:p text:style-name="P619"><text:tab/><text:tab/> <text:s text:c="5"/>01 <text:s/>= Completed successfully</text:p>
      <text:p text:style-name="P619"><text:tab/><text:tab/>0200n = No data found one way or another</text:p>
      <text:p text:style-name="P619"><text:tab/><text:tab/><text:tab/> <text:s text:c="3"/>[fs-reply/we-error] = Get random = 23 else = 10].</text:p>
      <text:p text:style-name="P619"><text:tab/><text:tab/>23000 = Dup primary key on insert <text:s/>same as fs-reply = 22.</text:p>
      <text:p text:style-name="P619">Internal Errors :</text:p>
      <text:p text:style-name="P619"><text:tab/><text:tab/>99NKS = Invalid key # used.</text:p>
      <text:p text:style-name="P619"><text:tab/><text:tab/>99NKU = No valid key used.</text:p>
      <text:p text:style-name="P619"><text:tab/><text:tab/>99NKD = No valid key used for delete</text:p>
      <text:p text:style-name="P619"><text:tab/><text:tab/>99RNP = Read next with no position (no start 1st)</text:p>
      <text:p text:style-name="P619"><text:tab/><text:tab/>99GNS = Could not generate a start.</text:p>
      <text:p text:style-name="P619"/>
      <text:p text:style-name="P618">MySQL errno (Error numbers) that can possibly appear via <text:span text:style-name="T494">Flightlog if RDBMS support is added</text:span>.</text:p>
      <text:p text:style-name="P618"/>
      <text:p text:style-name="P618">There are many others see Mysql error documentation.</text:p>
      <text:p text:style-name="P243"/>
      <text:p text:style-name="P627">This section is presented in case MySQL support is ever added to Flightlog which will only occur if users request it<text:span text:style-name="T722"> otherwise it can be ignored</text:span>.</text:p>
      <text:p text:style-name="P244"/>
      <text:h text:style-name="P655" text:outline-level="1"><text:bookmark-start text:name="__RefHeading___Toc1109_2548604501"/><text:span text:style-name="T693"><text:s/></text:span>Appendix <text:span text:style-name="T494">C – Installing the Cobol Compiler</text:span><text:bookmark-end text:name="__RefHeading___Toc1109_2548604501"/></text:h>
      <text:p text:style-name="Text_20_body"/>
      <text:p text:style-name="P447">If you require the various manuals for the <text:span text:style-name="T472">Cobol </text:span>compiler in both A4 and US letter formats and want the latest versions of each, as a PDF file go to:</text:p>
      <text:p text:style-name="P447"/>
      <text:p text:style-name="P435">https://sourceforge.net/p/<text:span text:style-name="T700">gnu</text:span>cobol/code/HEAD/tree/external-doc/guide/PDFs/</text:p>
      <text:p text:style-name="P262"/>
      <text:p text:style-name="P248"><text:span text:style-name="T409">The r</text:span>eading <text:span text:style-name="T436">of </text:span>this section is only needed if you are installing Flightlog as source code from the O/S (Open Source) area on SF (sourceforge) or direct from our servers.</text:p>
      <text:p text:style-name="P248"/>
      <text:p text:style-name="P248">If you are using the executable / binary program <text:span text:style-name="T410">(when available) </text:span>then just follow the instructions shown at under <text:bookmark-ref text:reference-format="text" text:ref-name="__RefHeading___Toc19665_2548604501">Installing the Flightlog executable or binaries</text:bookmark-ref><text:s/><text:span text:style-name="T420">page </text:span><text:span text:style-name="T420"><text:bookmark-ref text:reference-format="page" text:ref-name="__RefHeading___Toc19665_2548604501">78</text:bookmark-ref></text:span>. Otherwise continue <text:span text:style-name="T434">however also read the section Installing other optional packages under </text:span><text:span text:style-name="T434"><text:bookmark-ref text:reference-format="chapter" text:ref-name="__RefHeading___Toc11038_792484039">10.2</text:bookmark-ref></text:span><text:span text:style-name="T434"><text:s/>for converting the report file to a PDF that is ready to output to your printer.</text:span></text:p>
      <text:p text:style-name="P248"/>
      <text:h text:style-name="Heading_20_2" text:outline-level="2"><text:bookmark-start text:name="__RefHeading___Toc11539_2548604501"/>Install the Cobol compiler<text:bookmark-end text:name="__RefHeading___Toc11539_2548604501"/></text:h>
      <text:p text:style-name="P248"/>
      <text:p text:style-name="P248">Read this through first, then again if needed, and <text:span text:style-name="T690">then </text:span>follow it: </text:p>
      <text:p text:style-name="P584">The Official name for the compiler changed around the release of version 2 from Open-Cobol to GnuCOBOL so the earlier releases may be named Open-Cobol but it is the version number you are looking for.</text:p>
      <text:p text:style-name="P306"/>
      <text:p text:style-name="P637">If you are a Linux user the easiest way to install the compiler is through your distro's package software manager so just load it up and search for Cobol. If a version is present later than v1.1 you can install that one and most seem to have v3<text:span text:style-name="T719">.2</text:span> and a few even with the <text:span text:style-name="T719">(</text:span>under development<text:span text:style-name="T719">)</text:span> version v4. Both are OK to use with Flightlog. Regardless<text:span text:style-name="T722">,</text:span> install the Cobol compiler and contin<text:span text:style-name="T714">u</text:span>e at <text:bookmark-ref text:reference-format="chapter" text:ref-name="__RefHeading___Toc11692_3306186750">10.4.2</text:bookmark-ref><text:span text:style-name="T714"><text:s/></text:span><text:span text:style-name="T714"><text:bookmark-ref text:reference-format="text" text:ref-name="__RefHeading___Toc11692_3306186750">Setting the Linker</text:bookmark-ref></text:span><text:span text:style-name="T714">.</text:span></text:p>
      <text:p text:style-name="P306"/>
      <text:p text:style-name="P638">Otherwise continue:</text:p>
      <text:p text:style-name="P638"/>
      <text:p text:style-name="P639">Again a quicker way, go to this location : <text:span text:style-name="T715">https://sourceforge.net/projects/gnucobol/files/gnucobol/nightly_snapshots/</text:span></text:p>
      <text:p text:style-name="P369"><text:span text:style-name="T714">go down until you see </text:span><text:bookmark text:name="gnucobol-32-stable"/>GnuCOBOL 3.2 (stable)<text:span text:style-name="T714"> and select one of this options although I use the one ending with .tar.gz but your choice.</text:span></text:p>
      <text:p text:style-name="P259"><text:span text:style-name="T211">for the </text:span>lat<text:span text:style-name="T211">est</text:span> version <text:span text:style-name="T624">under files </text:span>and download it. </text:p>
      <text:p text:style-name="P465">Having downloaded both the compiler and Flightlog along with all required packages / dependencies, you can start to build the compiler, test it <text:span text:style-name="T472">and</text:span> then build Flightlog if all tests complete correctly.</text:p>
      <text:p text:style-name="P310"/>
      <text:p text:style-name="P644">If you are a windows user go to :</text:p>
      <text:p text:style-name="P644">https://www.arnoldtrembley.com/GnuCOBOL.htm</text:p>
      <text:p text:style-name="P644"/>
      <text:p text:style-name="P644">Select the documentation for building i.e., :</text:p>
      <text:p text:style-name="P644"><text:a xlink:type="simple" xlink:href="https://www.arnoldtrembley.com/GnuCOBOL-3.2-MinGW-Build-Guide-V1.8.pdf" text:style-name="Internet_20_link" text:visited-style-name="Visited_20_Internet_20_Link"><text:span text:style-name="T22">(NEW 2023-07-29) Build Guide for MinGW GnuCOBOL 3.2 Draft</text:span>, in .PDF format.</text:a></text:p>
      <text:p text:style-name="P644"/>
      <text:p text:style-name="P644">Then select the compiler as <text:s text:c="2"/><text:span text:style-name="T22">GnuCOBOL 3.2 BDB (13Aug2023)</text:span></text:p>
      <text:p text:style-name="P504">By the time you read this manual there might be a later version available and there are other options. <text:s/>Follow the instruction you downloaded first as a guide to install the compiler under Windows. Do not forget to download the correct version for your system such as X64<text:span text:style-name="T735">.</text:span></text:p>
      <text:p text:style-name="P504"/>
      <text:p text:style-name="P644"><text:soft-page-break/><text:span text:style-name="T94">You can also b</text:span><text:span text:style-name="T720">uild GnuCobol using a pre-installed copy of Microsoft Visual Studio with C/C++ </text:span><text:span text:style-name="T631">such as </text:span><text:span text:style-name="T720">20</text:span>22<text:span text:style-name="T720"> community edition available free of charge or the version for windows using a baby *nix environment</text:span> as given above.</text:p>
      <text:p text:style-name="P555"/>
      <text:h text:style-name="Heading_20_3" text:outline-level="3"><text:bookmark-start text:name="__RefHeading___Toc12348_1090335569"/><text:span text:style-name="T632">Compiler Install </text:span>Option 2.<text:bookmark-end text:name="__RefHeading___Toc12348_1090335569"/></text:h>
      <text:p text:style-name="P571">Another option if you are using Linux, is to go to <text:span text:style-name="T625">your Linux distributions </text:span>software repository and see if they have a version of the Cobol compiler. For this, use your Linux distribution’s software manager. If the version they have is at least v2.0 you can use this instead of getting the latest version but when you compile Flightlog, if it produces warning or error messages un<text:span text:style-name="T719">-</text:span>install the compiler and get the latest. </text:p>
      <text:p text:style-name="P584"/>
      <text:p text:style-name="P583">Now follow the procedure to build and install the latest version of the compiler.</text:p>
      <text:p text:style-name="P570"/>
      <text:p text:style-name="P284"><text:span text:style-name="T409">Continuing, assuming you have downloaded the latest Cobol compiler. If you did not install an older copy of the compiler to get the extra packages, you al</text:span>so <text:span text:style-name="T409">need to </text:span>download and install all of the dependencies that GC <text:span text:style-name="T411">(GnuCOBOL)</text:span> requires, <text:span text:style-name="T170">some if not most of which you can make use of your Linux distributions repos (repositories), however check that they are of a version equal, or better still, later than that as shown in the README and if needed, the HACKING file</text:span>. You will need to read th<text:span text:style-name="T283">ese</text:span> file<text:span text:style-name="T283">s (including HACKING as some of the packages discussed are needed if you download from the SF code area as against the file area).</text:span> <text:span text:style-name="T167">This</text:span> give<text:span text:style-name="T170">s</text:span> details of what is required, but <text:span text:style-name="T167">listed in chapter </text:span><text:span text:style-name="T167"><text:bookmark-ref text:reference-format="chapter" text:ref-name="__RefHeading___Toc11038_792484039">10.2</text:bookmark-ref></text:span><text:s/>is <text:span text:style-name="T581">a modified </text:span>one from the <text:span text:style-name="T168">current GnuCOBOL which is for v3 showing just one option for each of the needed items.</text:span> </text:p>
      <text:p text:style-name="P284"/>
      <text:p text:style-name="P556">Before building Flightlog. Note that these files show that the following packages for users of Linux, OSX, or other *nix platforms, that will also need installing if not already. For Windows, all elements needed are already supplied but check the README file for confirmation :</text:p>
      <text:h text:style-name="P663" text:outline-level="2"><text:bookmark-start text:name="__RefHeading___Toc11038_792484039"/>Cobol compiler extra required libraries packages.<text:bookmark-end text:name="__RefHeading___Toc11038_792484039"/></text:h>
      <text:p text:style-name="P434"/>
      <text:p text:style-name="P434">These are the extra packages listed in <text:span text:style-name="T582">a</text:span> <text:span text:style-name="T582">current versions </text:span><text:span text:style-name="T712">of files </text:span>README <text:span text:style-name="T716">or</text:span><text:span text:style-name="T712"> DEPENDANCIES </text:span>that you also need to <text:span text:style-name="T626">have <text:s/>i</text:span>nstall<text:span text:style-name="T626">ed</text:span> prior to building the Cobol compiler <text:span text:style-name="T414">with the ones highlighted in </text:span><text:span text:style-name="T78">bold italics</text:span><text:span text:style-name="T414"> used here with any others mentioned removed for clarity</text:span>:</text:p>
      <text:p text:style-name="P434"/>
      <text:p text:style-name="P333"><text:span text:style-name="T224">GnuCOBOL </text:span><text:span text:style-name="T226">requires</text:span><text:span text:style-name="T224"> one of the following external libraries to be installed </text:span><text:span text:style-name="T243">for implementation of decimal arithmetic: </text:span></text:p>
      <text:p text:style-name="P78"/>
      <text:p text:style-name="P79"><text:tab/>BOTH runtime <text:span text:style-name="T31">and</text:span> development components required.</text:p>
      <text:p text:style-name="P79"/>
      <text:list text:style-name="L1">
        <text:list-item>
          <text:p text:style-name="P709">GNU MP (libgmp) 4.1.2 or later</text:p>
        </text:list-item>
      </text:list>
      <text:p text:style-name="P365"><text:tab/><text:a xlink:type="simple" xlink:href="https://gmplib.org/" text:style-name="Internet_20_link" text:visited-style-name="Visited_20_Internet_20_Link">https://gmplib.org</text:a></text:p>
      <text:p text:style-name="P552">[This means <text:span text:style-name="T626">also </text:span>adding the package with a ‘-dev’<text:span text:style-name="T631"> </text:span>after the name such as gmplib-dev<text:span text:style-name="T631">].</text:span></text:p>
      <text:p text:style-name="P580">In your distro '-dev' may well be '-devel' instead.</text:p>
      <text:p text:style-name="Text_20_body"/>
      <text:p text:style-name="P572">This one is for processing Indexed files and Flightlog uses them.</text:p>
      <text:list text:style-name="L2">
        <text:list-item>
          <text:p text:style-name="P713">Berkeley DB (libdb) 4.1 or later </text:p>
        </text:list-item>
      </text:list>
      <text:p text:style-name="P80"><text:tab/>BOTH runtime <text:span text:style-name="T31">and</text:span> development components required.</text:p>
      <text:p text:style-name="P554"><text:tab/><text:span text:style-name="T473">https://www.oracle.com/technology/products/berkeley-db/db/index.html </text:span></text:p>
      <text:p text:style-name="P436"><text:tab/>Download page is : </text:p>
      <text:p text:style-name="P496">https://www.oracle.com/technetwork/database/database-technologies/berkeleydb/downloads/index.html</text:p>
      <text:p text:style-name="P248"/>
      <text:p text:style-name="P248">Berkeley DB is distributed under Oracles own open-source license. </text:p>
      <text:p text:style-name="P260">For use only on your computer, this product can be used with no problems and is the one used for development and the programmers own usage. Remember <text:span text:style-name="T412">Flightlog</text:span> will, if requested create <text:span text:style-name="T412">(line) </text:span>sequential versions of all three files that can then be used as sources to rebuild the indexed files, so changing the version or even switching to a different indexed file package is not a problem.</text:p>
      <text:p text:style-name="P248"/>
      <text:p text:style-name="P248">Note that if you link your software with Berkeley DB, you must distribute the source code of your software along with your software, or you have to pay royalty to Oracle.</text:p>
      <text:p text:style-name="P248">Flightlog complies with this as the source code is available <text:span text:style-name="T365">from</text:span> the website <text:span text:style-name="T365">or you install the package on your computer before running the Flightlog executable</text:span>. <text:span text:style-name="T412">The only other option is to use v</text:span><text:span text:style-name="T719">4</text:span><text:span text:style-name="T412"> which has no restrictions.</text:span></text:p>
      <text:p text:style-name="P248"/>
      <text:p text:style-name="P350">OR <text:span text:style-name="T583">if that creates an issue for you, install:</text:span></text:p>
      <text:p text:style-name="Text_20_body"/>
      <text:list text:style-name="L3">
        <text:list-item>
          <text:p text:style-name="P715"><text:span text:style-name="T284">V</text:span>BISAM - ISAM file handler (libvbisam) 2.0 or later <text:span text:style-name="T626">currently v2.01</text:span></text:p>
        </text:list-item>
      </text:list>
      <text:p text:style-name="Text_20_body"><text:tab/>https://sourceforge.net/projects/vbisam/ </text:p>
      <text:p text:style-name="Text_20_body"/>
      <text:p text:style-name="Text_20_body"><text:tab/><text:span text:style-name="T583">D</text:span>istributed under GNU Lesser General Public License.</text:p>
      <text:p text:style-name="P643">[ Note that I have not been able to use this on previous attempts. ]</text:p>
      <text:p text:style-name="P553"/>
      <text:p text:style-name="P437">There are a few others with C interfaces that can also be used but these are still being tested.</text:p>
      <text:p text:style-name="P248"/>
      <text:p text:style-name="Text_20_body">SCREEN SECTION and/or extended ACCEPT/DISPLAY used <text:span text:style-name="T413">(it is in Flightlog)</text:span> </text:p>
      <text:p text:style-name="Text_20_body"/>
      <text:p text:style-name="Text_20_body">BOTH runtime <text:span text:style-name="T32">and</text:span> development components required <text:span text:style-name="T285">and these are used with Flightlog</text:span>. </text:p>
      <text:p text:style-name="Text_20_body"/>
      <text:list text:style-name="L4">
        <text:list-item>
          <text:p text:style-name="P714">Ncurses (ncurses<text:span text:style-name="T626">)</text:span> 5.2 or later </text:p>
        </text:list-item>
      </text:list>
      <text:p text:style-name="Text_20_body"><text:tab/>https://www.gnu.org/software/ncurses/ncurses.html </text:p>
      <text:p text:style-name="Text_20_body"><text:soft-page-break/><text:tab/>Ncurses is distributed under a BSD style license. </text:p>
      <text:p text:style-name="Text_20_body"/>
      <text:p text:style-name="Text_20_body"/>
      <text:p text:style-name="P394">XML runtime support <text:s text:c="3"/><text:span text:style-name="T583">This is </text:span><text:span text:style-name="T40">NOT</text:span><text:span text:style-name="T583"> used with Flightlog</text:span><text:span text:style-name="T719"> likewise the Json package</text:span><text:span text:style-name="T583">.</text:span></text:p>
      <text:p text:style-name="P96"/>
      <text:p text:style-name="P75">BOTH runtime AND development components required.</text:p>
      <text:list text:style-name="L5">
        <text:list-item>
          <text:p text:style-name="P701">libxml2 - http://xmlsoft.org </text:p>
        </text:list-item>
      </text:list>
      <text:p text:style-name="P75"><text:tab/>libxml2 is distributed under MIT License.</text:p>
      <text:p text:style-name="P581"/>
      <text:p text:style-name="P582"/>
      <text:p text:style-name="P111"><text:span text:style-name="T234">The next one</text:span><text:span text:style-name="T230"> </text:span><text:span text:style-name="T215">is </text:span><text:span text:style-name="T229">NOT </text:span><text:span text:style-name="T215">needed when installing on Linux, <text:s/></text:span>SUN Solaris, MAC OS, CentOS or Windows <text:s/>(including Cygwin, MingW and native windows).</text:p>
      <text:p text:style-name="P111">It is also NOT needed with later versions of AIX and HP-UX.</text:p>
      <text:p text:style-name="P111"/>
      <text:list text:style-name="L6">
        <text:list-item>
          <text:p text:style-name="P710">GNU Libtool (libltdl)</text:p>
        </text:list-item>
      </text:list>
      <text:p text:style-name="P355"/>
      <text:p text:style-name="P355"><text:tab/>https://www.gnu.org/software/libtool/libtool.html </text:p>
      <text:p text:style-name="P355"><text:tab/>libltdl is used to implement dynamic CALL statements.</text:p>
      <text:p text:style-name="P582"/>
      <text:p text:style-name="P582"/>
      <text:p text:style-name="P645"><text:span text:style-name="T720">For building a PDF file from the output of Flightlog you need to install the packages en</text:span><text:span text:style-name="T712">s</text:span><text:span text:style-name="T720">cript and postscript see </text:span><text:span text:style-name="T720"><text:bookmark-ref text:reference-format="chapter" text:ref-name="__RefHeading___Toc47411_2548604501">11.2</text:bookmark-ref></text:span><text:span text:style-name="T720"><text:s/></text:span><text:span text:style-name="T720"><text:bookmark-ref text:reference-format="text" text:ref-name="__RefHeading___Toc47411_2548604501">Installing other optional Packages</text:bookmark-ref></text:span><text:span text:style-name="T720"><text:s/>for more information.</text:span></text:p>
      <text:p text:style-name="P585"/>
      <text:h text:style-name="P680" text:outline-level="2"><text:bookmark-start text:name="__RefHeading___Toc19977_2548604501"/><text:span text:style-name="T419">S</text:span>et up and build the Cobol compiler<text:bookmark-end text:name="__RefHeading___Toc19977_2548604501"/></text:h>
      <text:p text:style-name="P307"/>
      <text:p text:style-name="P640">If you have installed under Linux or OSX (using homebrew): </text:p>
      <text:p text:style-name="P248">With all th<text:span text:style-name="T691">is</text:span> done <text:span text:style-name="T169">you </text:span>can start with building <text:span text:style-name="T211">Flightlog</text:span> <text:span text:style-name="T169">see chapter </text:span><text:span text:style-name="T169"><text:bookmark-ref text:reference-format="chapter" text:ref-name="__RefHeading__11526_177439401">11</text:bookmark-ref></text:span>:<text:span text:style-name="T691"> but if you installed the compiler sources continue here to build it - it's easy, the computer does the hard work.</text:span></text:p>
      <text:p text:style-name="P248"/>
      <text:p text:style-name="P248"><text:bookmark-start text:name="__RefHeading___Toc43668_1813075902"/>Detailed overview for building the GC <text:span text:style-name="T414">(GnuCOBOL) </text:span>compiler<text:bookmark-end text:name="__RefHeading___Toc43668_1813075902"/></text:p>
      <text:p text:style-name="P248"><text:span text:style-name="T173">Having transferred</text:span> the <text:span text:style-name="T212">Flightlog source</text:span> archive to your home directory <text:span text:style-name="T414">in a directory say “cobolsrc/Flightlog-Source" and </text:span>here I <text:span text:style-name="T174">will </text:span>show <text:span text:style-name="T212">you </text:span>all <text:span text:style-name="T212">of </text:span>the command line instructions needed. <text:span text:style-name="T212">To</text:span> do so, you need to select <text:span text:style-name="T171">and load </text:span>a terminal program such as 'konsole' under <text:span text:style-name="T175">KDE</text:span> but any will do. After loading, you will be placed in your home directory, <text:s/><text:span text:style-name="T242">This is the terminal program (but can be almost any other) you will also use for running Flightlog.</text:span></text:p>
      <text:p text:style-name="P248"/>
      <text:p text:style-name="P248"><text:span text:style-name="T174">In the following instructions n</text:span>ote that names and version number<text:span text:style-name="T174">s</text:span> might change. <text:span text:style-name="T172">These instructions start with the basics for the build and installation of the Cobol compiler: </text:span></text:p>
      <text:p text:style-name="P248"/>
      <text:p text:style-name="Text_20_body">First <text:span text:style-name="T212">off having started in your home directory </text:span>.</text:p>
      <text:p text:style-name="P573">mkdir -<text:span text:style-name="T415">p </text:span>cobolsrc/<text:span text:style-name="T415">Flightlog</text:span><text:tab/><text:tab/>Create new directory called cobolsrc <text:span text:style-name="T415">and Flightlog </text:span>to hold the</text:p>
      <text:p text:style-name="P573"><text:tab/><text:tab/><text:tab/><text:tab/><text:tab/>Flightlog source.</text:p>
      <text:p text:style-name="Text_20_body">mkdir cobolcompilers<text:tab/><text:tab/>Create new directory <text:span text:style-name="T415">for</text:span> the compilers source directory</text:p>
      <text:p text:style-name="Text_20_body">cd cobolcompilers<text:tab/><text:tab/><text:tab/>Change to the top level directory for the compiler/s.</text:p>
      <text:p text:style-name="Text_20_body">unzip ../<text:span text:style-name="T700">gnu</text:span>cobol-code.zip<text:tab/><text:span text:style-name="T700"><text:tab/></text:span>Change the file name <text:span text:style-name="T415">containing the compiler </text:span>if needed.</text:p>
      <text:p text:style-name="P573"><text:tab/><text:tab/><text:tab/><text:tab/><text:tab/><text:span text:style-name="T415">Assumes the file is in the higher level directory. This is the</text:span></text:p>
      <text:p text:style-name="P575"><text:tab/><text:tab/><text:tab/><text:tab/><text:tab/>source file that you obtained from the sourceforge website.</text:p>
      <text:p text:style-name="P248"/>
      <text:p text:style-name="P248">Build the GnuCOBOL compiler according to the README instructions including the test procedures but once in the directory holding the sources you can run (having noted the preceding . (full stop) :</text:p>
      <text:p text:style-name="P248">cd <text:span text:style-name="T700">gnu</text:span>cobol-code<text:tab/><text:tab/><text:tab/>Change if name is different.</text:p>
      <text:p text:style-name="Text_20_body">./configure<text:tab/><text:tab/><text:tab/><text:tab/>Runs to end without error<text:span text:style-name="T691">, </text:span><text:s/><text:span text:style-name="T212">note the leading ‘./’</text:span></text:p>
      <text:p text:style-name="P573"><text:span text:style-name="T176">m</text:span>ake &gt; build.log 2&gt;build.err<text:tab/><text:span text:style-name="T176">W</text:span>ill build the compiler. <text:span text:style-name="T176">Check build.err by doing </text:span></text:p>
      <text:p text:style-name="P573"><text:tab/><text:tab/><text:tab/><text:tab/><text:tab/>(‘less build.err’) for errors but warnings regarding translations</text:p>
      <text:p text:style-name="P573"><text:tab/><text:tab/><text:tab/><text:tab/><text:tab/>is OK. Don’t enter the quote symbols. <text:span text:style-name="T416">This will take around </text:span></text:p>
      <text:p text:style-name="P576"><text:tab/><text:tab/><text:tab/><text:tab/><text:tab/>3 – 6 minutes. If you have a 4 core or more CPU you can add</text:p>
      <text:p text:style-name="P576"><text:tab/><text:tab/><text:tab/><text:tab/><text:tab/>after ‘make ‘ -j3 and this will speed the process up <text:span text:style-name="T633">somewhat</text:span>.</text:p>
      <text:p text:style-name="P438"/>
      <text:h text:style-name="P681" text:outline-level="2"><text:bookmark-start text:name="__RefHeading___Toc19979_2548604501"/><text:span text:style-name="T419">Test</text:span> the Cobol compiler<text:bookmark-end text:name="__RefHeading___Toc19979_2548604501"/></text:h>
      <text:p text:style-name="P635"/>
      <text:h text:style-name="Heading_20_3" text:outline-level="3"><text:bookmark-start text:name="__RefHeading___Toc12011_3306186750"/>Compiler Testing<text:bookmark-end text:name="__RefHeading___Toc12011_3306186750"/></text:h>
      <text:p text:style-name="P307"/>
      <text:p text:style-name="Text_20_body">Make checkall &gt; checks.log 2&gt;checks.err</text:p>
      <text:p text:style-name="P573"><text:tab/><text:tab/><text:tab/><text:tab/><text:tab/><text:span text:style-name="T176">This </text:span>runs two sets of tests and both <text:span text:style-name="T212">must </text:span>complet<text:span text:style-name="T415">e </text:span>without</text:p>
      <text:p text:style-name="P573"><text:tab/><text:tab/><text:tab/><text:tab/><text:tab/>errors although you might get some warnings (see the</text:p>
      <text:p text:style-name="P573"><text:tab/><text:tab/><text:tab/><text:tab/><text:tab/>README for more information). <text:span text:style-name="T627">This will take 3 – 10 minutes</text:span></text:p>
      <text:p text:style-name="P440"><text:tab/><text:tab/><text:tab/><text:tab/><text:tab/>depending on system speed – be patient. </text:p>
      <text:p text:style-name="P440"><text:tab/><text:tab/><text:tab/><text:tab/><text:tab/>Don’t use the -j3 option.</text:p>
      <text:p text:style-name="P439"/>
      <text:p text:style-name="P441">Note for the above processing the screen will not show any output until each is finished.</text:p>
      <text:p text:style-name="Text_20_body">To do this :</text:p>
      <text:list text:style-name="L7">
        <text:list-item>
          <text:p text:style-name="P716">Look at the <text:span text:style-name="T176">checks</text:span>.err file <text:span text:style-name="T176">( </text:span>‘less <text:span text:style-name="T176">checks</text:span>.err’ <text:span text:style-name="T176">)</text:span> and <text:span text:style-name="T176">this should be empty other than a message similar to :</text:span></text:p>
          <text:p text:style-name="P711">Total executed programs : 426 - Total performed tests : 9748</text:p>
          <text:p text:style-name="P717"><text:soft-page-break/><text:span text:style-name="T176">but with no error messages. Ignore any messages that are showing :-</text:span><text:span text:style-name="T273"> </text:span></text:p>
          <text:p text:style-name="P717"><text:span text:style-name="T224">Saving to: ‘newcob.val.Z’</text:span><text:span text:style-name="T225"> with various counts</text:span></text:p>
          <text:p text:style-name="P720"><text:line-break/></text:p>
        </text:list-item>
        <text:list-item>
          <text:p text:style-name="P718"><text:span text:style-name="T417">Now l</text:span>ook at checks.log (‘less checks.log’) and c<text:span text:style-name="T172">heck that is does not have error messages (but could have a few warnings of skipped tests </text:span>at the beg<text:span text:style-name="T212">inning</text:span> for test<text:span text:style-name="T212">s</text:span> shown by number 1 – <text:span text:style-name="T691">1050</text:span> or so)<text:span text:style-name="T172">. At the end of this first block of tests it should show a message like this:</text:span></text:p>
          <text:p text:style-name="P712">989 tests behaved as expected. </text:p>
          <text:p text:style-name="P721">2 tests were skipped.</text:p>
        </text:list-item>
      </text:list>
      <text:p text:style-name="P107"/>
      <text:p text:style-name="P113">The number<text:span text:style-name="T634">s</text:span> shown above may well not be the same.</text:p>
      <text:list text:continue-numbering="true" text:style-name="L7">
        <text:list-header>
          <text:p text:style-name="P702">Once past that block of messages you will then see the NIST tests that runs <text:span text:style-name="T416">many </text:span>test program<text:span text:style-name="T212">s</text:span> against GC and very near the end will show the differences of the summary file which must be zero. <text:span text:style-name="T177">e.g., </text:span></text:p>
        </text:list-header>
      </text:list>
      <text:p text:style-name="P248"/>
      <text:p text:style-name="P350">Comparing total test results</text:p>
      <text:p text:style-name="P350">diff ./summary.txt summary.log</text:p>
      <text:p text:style-name="P350"/>
      <text:p text:style-name="Text_20_body">i.e., nothing shown – blank line. <text:span text:style-name="T418">Followed by a few lines saying leaving directory etc.</text:span></text:p>
      <text:p text:style-name="Text_20_body"/>
      <text:p text:style-name="Text_20_body"><text:span text:style-name="T178">I</text:span>f all is good, <text:span text:style-name="T178">lets continue, with installing the Cobol compiler and building Flightlog.</text:span></text:p>
      <text:p text:style-name="Text_20_body"/>
      <text:p text:style-name="P586"><text:span text:style-name="T178">sudo make install<text:tab/><text:tab/><text:tab/>You need to know the admin password and if sudo </text:span>is not set</text:p>
      <text:p text:style-name="P586"><text:span text:style-name="T634"><text:tab/><text:tab/><text:tab/><text:tab/><text:tab/></text:span>up for you can run su -c “make install"</text:p>
      <text:p text:style-name="P573"><text:tab/><text:tab/><text:tab/><text:tab/><text:tab/><text:span text:style-name="T178">Again you need to know the admin password </text:span>which you<text:span text:style-name="T634"> </text:span></text:p>
      <text:p text:style-name="P573"><text:tab/><text:tab/><text:tab/><text:tab/><text:tab/>created when installing Linux.</text:p>
      <text:p text:style-name="P248"/>
      <text:h text:style-name="Heading_20_3" text:outline-level="3"><text:bookmark-start text:name="__RefHeading___Toc11692_3306186750"/>Setting the Linker<text:bookmark-end text:name="__RefHeading___Toc11692_3306186750"/></text:h>
      <text:p text:style-name="P248"/>
      <text:p text:style-name="P248">With the compiler now fully installed, one more little job before moving on to <text:span text:style-name="T212">Flightlog</text:span>.</text:p>
      <text:p text:style-name="P248"><text:span text:style-name="T212">You need to create file <text:s/></text:span><text:span text:style-name="T213">/etc/ld.so.conf.d/gnu-cobol.conf</text:span><text:span text:style-name="T214"> if not already created. Note the name could be slightly different.</text:span></text:p>
      <text:p text:style-name="Text_20_body"/>
      <text:p text:style-name="Text_20_body"/>
      <text:p text:style-name="Text_20_body"><text:span text:style-name="T23">(This file is important)</text:span>.</text:p>
      <text:p text:style-name="Text_20_body"/>
      <text:p text:style-name="Text_20_body"/>
      <text:p text:style-name="P248"><text:span text:style-name="T241">Note to do this, you will have to be root or run as sudo, see above notes. </text:span>So create it using a text editor with the following content (ignoring the lines of – which indicates start and end of the data to be keyed in):</text:p>
      <text:p text:style-name="P248"/>
      <text:p text:style-name="Text_20_body">--</text:p>
      <text:p text:style-name="Text_20_body">/usr/local/lib/gnu-cobol </text:p>
      <text:p text:style-name="Text_20_body">/usr/local/lib </text:p>
      <text:p text:style-name="Text_20_body">/usr/lib</text:p>
      <text:p text:style-name="Text_20_body">--</text:p>
      <text:p text:style-name="Text_20_body"/>
      <text:p text:style-name="Text_20_body">If you are going to use the RDB MySQL <text:span text:style-name="T418">system</text:span> (not needed for Flightlog) also add this line <text:span text:style-name="T418">at the end but before the '--'</text:span>:</text:p>
      <text:p text:style-name="Text_20_body"/>
      <text:p text:style-name="P438">/usr/local/mysql/lib</text:p>
      <text:p text:style-name="P438"><text:soft-page-break/></text:p>
      <text:p text:style-name="Text_20_body"><text:span text:style-name="T634">Having saved the file and exited the editor, now </text:span>run :</text:p>
      <text:p text:style-name="Text_20_body">sudo ldconfig<text:tab/><text:tab/><text:tab/><text:tab/>(Or su -c ldconfig) admin password needed.</text:p>
      <text:p text:style-name="P573"><text:tab/><text:tab/><text:tab/><text:tab/><text:tab/>With the above, we have told the system where to find the new</text:p>
      <text:p text:style-name="P573"><text:tab/><text:tab/><text:tab/><text:tab/><text:tab/>GC libraries. I<text:span text:style-name="T203">f</text:span> you re-install the compiler you should do this</text:p>
      <text:p text:style-name="P573"><text:tab/><text:tab/><text:tab/><text:tab/><text:tab/>each time <text:span text:style-name="T203">as a safeguard</text:span>.</text:p>
      <text:p text:style-name="P573"/>
      <text:p text:style-name="Text_20_body">cd ../cobolsrc<text:tab/>/<text:span text:style-name="T416">Flightlog</text:span><text:tab/><text:tab/><text:span text:style-name="T691">Now c</text:span>hange to the <text:span text:style-name="T241">Flightlog</text:span> sources.</text:p>
      <text:p text:style-name="Text_20_body"/>
      <text:p text:style-name="Text_20_body">tar xfvz ../<text:span text:style-name="T241">Flightlog</text:span>-<text:span text:style-name="T241">2</text:span>.0<text:span text:style-name="T634">2</text:span>.<text:span text:style-name="T719">12</text:span>.tar.gz</text:p>
      <text:p text:style-name="Text_20_body"><text:span text:style-name="T204"><text:tab/><text:tab/><text:tab/><text:tab/>C</text:span>hange name to the archive name supplied &amp; unpack).</text:p>
      <text:p text:style-name="Text_20_body"><text:tab/><text:tab/><text:tab/><text:tab/>This will unpack the source <text:span text:style-name="T419">and other files including manual.</text:span></text:p>
      <text:p text:style-name="Text_20_body"/>
      <text:p text:style-name="P248">At this point, you <text:span text:style-name="T74">must</text:span> have installed all the GC dependencies (see above) unless you have installed a .RPM or .DEB GC <text:span text:style-name="T171">v2 or later </text:span>package <text:span text:style-name="T419">from your distro’s repo’s (repositories), </text:span>in which case, all should have been done for you, but if you get error messages during the GC <text:span text:style-name="T419">package </text:span>install, this may not be the case.</text:p>
      <text:p text:style-name="P248"/>
      <text:p text:style-name="P295">Using version<text:span text:style-name="T204">s</text:span> of the GC compiler before v2.<text:span text:style-name="T634">2</text:span> is not recommended as they are <text:span text:style-name="T242">considered </text:span>too old <text:span text:style-name="T242">but might still work but if v1.1 or v1.0 do not use</text:span><text:span text:style-name="T719">,</text:span><text:span text:style-name="T242"> as these will not work as they are over 10 years old.</text:span></text:p>
      <text:p text:style-name="P588"/>
      <text:p text:style-name="P588">During the build of Flightlog error messages will give a good indication that the version is too old!</text:p>
      <text:p text:style-name="P248"/>
      <text:p text:style-name="Text_20_body">Now lets have a short reminder and recap<text:span text:style-name="T634"> on the compiler tests:</text:span></text:p>
      <text:h text:style-name="P663" text:outline-level="2"><text:bookmark-start text:name="__RefHeading__11524_177439401"/>Validating the Cobol compiler<text:bookmark-end text:name="__RefHeading__11524_177439401"/></text:h>
      <text:p text:style-name="P248"/>
      <text:p text:style-name="P248">Yes, I know I am repeating <text:span text:style-name="T203">this</text:span>, because it is important !</text:p>
      <text:p text:style-name="P248"/>
      <text:p text:style-name="P261">At this point, you have installed <text:span text:style-name="T205">GC</text:span> <text:span text:style-name="T205">(</text:span>GnuCOBOL<text:span text:style-name="T205">)</text:span> by following the instructions <text:span text:style-name="T420">in section </text:span><text:bookmark-ref text:reference-format="chapter" text:ref-name="__RefHeading___Toc11539_2548604501">10.1</text:bookmark-ref><text:s text:c="2"/><text:bookmark-ref text:reference-format="text" text:ref-name="__RefHeading___Toc11539_2548604501">Install the Cobol compiler</text:bookmark-ref><text:s/><text:span text:style-name="T420">and onwards.</text:span></text:p>
      <text:p text:style-name="P261"/>
      <text:p text:style-name="P640">Note that you should try and do these tests even if you installed a Linux package<text:span text:style-name="T722"> assuming you can do so</text:span>.</text:p>
      <text:p text:style-name="P261"/>
      <text:p text:style-name="P305">You must do both sets of tests <text:span text:style-name="T205">using make checkall </text:span>and <text:span text:style-name="T420">verify</text:span> that all is well before moving on to the next step. Running these tests can take some time depending on the speed of your computer. It is <text:span text:style-name="T74">vital</text:span> <text:span text:style-name="T692"><text:s/></text:span>that these tests are successful. <text:span text:style-name="T420">This must be done even if you installed GC from the distro’s repos as it validates the compiler. Note that during these tests there will be no output to the screen – that is to be expected as it is going to files.</text:span><text:span text:style-name="T713"> </text:span></text:p>
      <text:p text:style-name="P305"/>
      <text:p text:style-name="P634">Some of these tests will produce skipped and expected failure messages and these can be ignored.</text:p>
      <text:p text:style-name="P253"/>
      <text:p text:style-name="P253">After doing <text:span text:style-name="T420">the tests</text:span>, you can then complete the installation of <text:s/>GnuCOBOL by running </text:p>
      <text:p text:style-name="P253">'<text:span text:style-name="T137">sudo make install</text:span>' <text:span text:style-name="T713"><text:s/></text:span>after which, you are now ready to compile the <text:span text:style-name="T242">Flightlog program</text:span>.</text:p>
      <text:p text:style-name="P248"/>
      <text:p text:style-name="P248">So now lets show you the steps involved <text:span text:style-name="T420">and this is the easy and quick bit</text:span>:</text:p>
      <text:p text:style-name="P248"/>
      <text:h text:style-name="P655" text:outline-level="1"><text:bookmark-start text:name="__RefHeading__11526_177439401"/><text:span text:style-name="T494">Appendix D - Flightlog</text:span> <text:span text:style-name="T549">Build and I</text:span>nstallation<text:bookmark-end text:name="__RefHeading__11526_177439401"/></text:h>
      <text:p text:style-name="P609"/>
      <text:h text:style-name="P682" text:outline-level="2"><text:bookmark-start text:name="__RefHeading___Toc19665_2548604501"/>Installing the Flightlog executable or binaries<text:bookmark-end text:name="__RefHeading___Toc19665_2548604501"/></text:h>
      <text:p text:style-name="P261"/>
      <text:p text:style-name="P261">If you have received the executables or binaries <text:span text:style-name="T534">(if available)</text:span>, you just have to extract the archive using ZIP, RAR or for *nix platforms TAR into your newly created directory <text:span text:style-name="T409">for running Flightlog</text:span> in your home directory <text:span text:style-name="T410">using a terminal program</text:span> and this will be the directory you will run <text:span text:style-name="T410">Flightlog, see section </text:span><text:span text:style-name="T410"><text:bookmark-ref text:reference-format="text" text:ref-name="__RefHeading__11532_177439401">Installing Flightlog</text:bookmark-ref></text:span><text:span text:style-name="T410"><text:s/>page </text:span><text:span text:style-name="T410"><text:bookmark-ref text:reference-format="page" text:ref-name="__RefHeading__11532_177439401">80</text:bookmark-ref></text:span><text:span text:style-name="T410">.</text:span> <text:span text:style-name="T211">H</text:span>ere, Flightlog will create and use all of the data files it requires. Likewise, if you will be using <text:span text:style-name="T283">a company </text:span>supplied CSV flight log data, this is the directory where you will be copying the data file to<text:span text:style-name="T211">,</text:span> having renamed the file to the name you defined in the CSV configuration file. <text:span text:style-name="T211">See the section </text:span><text:span text:style-name="T211"><text:bookmark-ref text:reference-format="text" text:ref-name="__RefHeading___Toc1039_2548604501">CSV Parameter Structure</text:bookmark-ref></text:span><text:span text:style-name="T211"><text:s/>page </text:span><text:span text:style-name="T211"><text:bookmark-ref text:reference-format="page" text:ref-name="__RefHeading___Toc1039_2548604501">36</text:bookmark-ref></text:span><text:span text:style-name="T211"><text:s/>on how to create this. The archive contains the program Flightlog, this manual and possibly a README for any need to read notes regarding installation or usage, etc. You can then start using Flightlog but see section </text:span><text:span text:style-name="T211"><text:bookmark-ref text:reference-format="chapter" text:ref-name="__RefHeading___Toc19015_2548604501">12</text:bookmark-ref></text:span><text:span text:style-name="T211"><text:s/></text:span><text:span text:style-name="T211"><text:bookmark-ref text:reference-format="text" text:ref-name="__RefHeading___Toc19015_2548604501">Appendix R -  Registering Flightlog</text:bookmark-ref></text:span><text:span text:style-name="T211"><text:s/>first on registering your usage of the program</text:span><text:span text:style-name="T722"> as it help me understand how many are using it</text:span><text:span text:style-name="T211">.</text:span></text:p>
      <text:p text:style-name="P536"/>
      <text:p text:style-name="P536">If you have downloaded the <text:span text:style-name="T535">open source version of </text:span>Flightlog, these are the files <text:span text:style-name="T436">included within the source archive:</text:span></text:p>
      <text:p text:style-name="P453"/>
      <text:p text:style-name="P453">–</text:p>
      <text:p text:style-name="P567">Changelog<text:tab/><text:tab/><text:tab/><text:tab/><text:tab/><text:tab/><text:span text:style-name="T611">C</text:span>hanges made to Flightlog including bug fixes</text:p>
      <text:p text:style-name="P567"><text:tab/><text:tab/><text:tab/><text:tab/><text:tab/><text:tab/><text:tab/>and new features. <text:span text:style-name="T610">Can be very detailed.</text:span></text:p>
      <text:p text:style-name="P397">comp-Flightlog.sh<text:tab/><text:tab/><text:tab/><text:tab/><text:tab/><text:span text:style-name="T610">Optional s</text:span>cript to compile Flightlog</text:p>
      <text:p text:style-name="P399">Copying.pdf<text:tab/><text:tab/><text:tab/><text:tab/><text:tab/><text:tab/>The software licence.</text:p>
      <text:p text:style-name="P400">Flightlog.cbl <text:tab/><text:tab/><text:tab/><text:tab/><text:tab/><text:tab/>Flightlog source file.</text:p>
      <text:p text:style-name="P400">Flightlog.pdf <text:tab/><text:tab/><text:tab/><text:tab/><text:tab/><text:tab/>Flightlog Manual – this document.</text:p>
      <text:p text:style-name="P397">prtpdf<text:tab/><text:tab/><text:tab/><text:tab/><text:tab/><text:tab/><text:tab/>Linux script file for printing without the ext<text:span text:style-name="T610">ension</text:span>.</text:p>
      <text:p text:style-name="P397">prtpdf.sh <text:tab/><text:tab/><text:tab/><text:tab/><text:tab/><text:tab/>Linux script file for printing <text:span text:style-name="T533">on A4 paper</text:span>.</text:p>
      <text:p text:style-name="P398">prtpdf-sh-A4<text:tab/><text:tab/><text:tab/><text:tab/><text:tab/><text:tab/>As above master for A4 paper.</text:p>
      <text:p text:style-name="P398">prtpdf.sh-Letter<text:tab/><text:tab/><text:tab/><text:tab/><text:tab/>As above master for Letter paper.</text:p>
      <text:p text:style-name="P397">run-Flightlog.sh<text:tab/><text:tab/><text:tab/><text:tab/><text:tab/>Script to run Flightlog using UK dates.</text:p>
      <text:p text:style-name="P397">run-Flightlog-unix.sh<text:tab/><text:tab/><text:tab/><text:tab/>Script to run Flightlog using Unix dates.</text:p>
      <text:p text:style-name="P397">run-Flightlog-usa.sh<text:tab/><text:tab/><text:tab/><text:tab/><text:tab/>Script to run Flightlog using USA dates.</text:p>
      <text:p text:style-name="P453">README<text:tab/><text:tab/><text:tab/><text:tab/><text:tab/><text:tab/>Last minute notes <text:span text:style-name="T610">but see README.1ST</text:span>.</text:p>
      <text:p text:style-name="P605">readme<text:tab/><text:tab/><text:tab/><text:tab/><text:tab/><text:tab/>Same as the file above.</text:p>
      <text:p text:style-name="P109">UPDATE<text:tab/><text:tab/><text:tab/><text:tab/><text:tab/><text:tab/>Instructions for updating an existing version.</text:p>
      <text:p text:style-name="P401">Airfields/<text:tab/><text:tab/><text:tab/><text:tab/><text:tab/><text:tab/><text:span text:style-name="T634">Directory and f</text:span>iles in this directory :</text:p>
      <text:p text:style-name="P400"><text:span text:style-name="T634"><text:s text:c="2"/></text:span>List_of_airports_by_ICAO_code__C.pdf<text:tab/>World Airfields starting with C as pdf file.</text:p>
      <text:p text:style-name="P400"><text:span text:style-name="T634"><text:s text:c="2"/></text:span>List_of_airports_by_ICAO_code__C.txt <text:tab/>World Airfields starting with C as txt file.</text:p>
      <text:p text:style-name="P400"><text:span text:style-name="T634"><text:s text:c="2"/></text:span>List_of_airports_by_ICAO_code__E.pdf<text:tab/>World Airfields starting with E as pdf file.</text:p>
      <text:p text:style-name="P400"><text:span text:style-name="T634"><text:s text:c="2"/></text:span>List_of_airports_by_ICAO_code__E.txt <text:tab/>World Airfields starting with E as txt file.</text:p>
      <text:p text:style-name="P400"><text:span text:style-name="T634"><text:s text:c="2"/></text:span>List_of_airports_by_ICAO_code__G.pdf<text:span text:style-name="T634"><text:tab/></text:span>World Airfields starting with G as pdf file.</text:p>
      <text:p text:style-name="P400"><text:span text:style-name="T634"><text:s text:c="2"/></text:span>List_of_airports_by_ICAO_code__G.txt <text:tab/>World Airfields starting with G as txt file.</text:p>
      <text:p text:style-name="P400"><text:span text:style-name="T634"><text:s text:c="2"/></text:span>List_of_airports_by_ICAO_code__K.pdf<text:tab/>World Airfields starting with K as pdf file.</text:p>
      <text:p text:style-name="P400"><text:span text:style-name="T634"><text:s text:c="2"/></text:span>List_of_airports_by_ICAO_code__K.txt <text:tab/>World Airfields starting with K as txt file.</text:p>
      <text:p text:style-name="P400"><text:span text:style-name="T634"><text:s text:c="2"/></text:span>List_of_airports_by_ICAO_code__L.pdf<text:tab/>World Airfields starting with L as pdf file.</text:p>
      <text:p text:style-name="P400"><text:span text:style-name="T634"><text:s text:c="2"/></text:span>List_of_airports_by_ICAO_code__L.txt <text:tab/>World Airfields starting with L as txt file.</text:p>
      <text:p text:style-name="P397">--</text:p>
      <text:p text:style-name="P368"/>
      <text:h text:style-name="P663" text:outline-level="2"><text:bookmark-start text:name="__RefHeading___Toc47411_2548604501"/>Installing other optional <text:span text:style-name="T563">P</text:span>ackages<text:bookmark-end text:name="__RefHeading___Toc47411_2548604501"/></text:h>
      <text:p text:style-name="P449"/>
      <text:p text:style-name="P449">These optional packages are needed if you want to automatically convert the print file logbook.rpt <text:span text:style-name="T612">as produced by Flightlog, </text:span>to a printable PDF file for A4 or Letter paper.</text:p>
      <text:p text:style-name="P449"/>
      <text:p text:style-name="P449">For Linux or other *nix, you need to install the following from your distributions software repo’s (repositories) <text:span text:style-name="T535">using your software manager</text:span> : </text:p>
      <text:p text:style-name="P449"/>
      <text:p text:style-name="P452">enscript<text:tab/><text:tab/><text:tab/>This is the primary tool that converts logbook.prt to a postscript file</text:p>
      <text:p text:style-name="P452"><text:tab/><text:tab/><text:tab/><text:tab/>but this would assume you have a printer that can process it <text:span text:style-name="T612">correctly</text:span></text:p>
      <text:p text:style-name="P451"><text:tab/><text:tab/><text:tab/><text:tab/>so the next package is also needed.</text:p>
      <text:p text:style-name="P450"><text:span text:style-name="T637">ghost</text:span>script<text:tab/><text:tab/><text:tab/><text:span text:style-name="T613">Converts from postscript to pdf.</text:span></text:p>
      <text:p text:style-name="P451">That’s it, and these will work in conjunction with the supplied script prtpdf.sh.</text:p>
      <text:p text:style-name="P451"/>
      <text:p text:style-name="P451">If however you have another way of <text:span text:style-name="T613">d</text:span>oing the same thing then use <text:span text:style-name="T613">i</text:span>t and modify the script prtpdf.sh <text:span text:style-name="T613">which is </text:span>run after Flightlog if you want printed output<text:span text:style-name="T719"> <text:s/>but you can send the file to your printer in other ways even if only using lpr (for Linux)</text:span>.</text:p>
      <text:p text:style-name="P451"/>
      <text:p text:style-name="P451">It is not automatic as you may well not require a fresh report just for a few flights so you <text:span text:style-name="T692">can </text:span>control <text:span text:style-name="T535">when </text:span>doing so.</text:p>
      <text:p text:style-name="P451"/>
      <text:p text:style-name="P640">For Windows users write your own based on these supplied scripts but creating a .cmd or .bat batch file but if not the created report file can be passed to a print spool for printing.</text:p>
      <text:h text:style-name="P683" text:outline-level="2"><text:bookmark-start text:name="__RefHeading__11530_177439401"/>Compiling the <text:span text:style-name="T563">S</text:span>ource <text:span text:style-name="T563">c</text:span>ode<text:bookmark-end text:name="__RefHeading__11530_177439401"/></text:h>
      <text:p text:style-name="P608"/>
      <text:p text:style-name="P14">Only needed if you have the OS (Open Source) version with the source code file <text:span text:style-name="T535">flightlog.cbl</text:span>.</text:p>
      <text:p text:style-name="P14"/>
      <text:p text:style-name="P14">First ensure that :</text:p>
      <text:p text:style-name="P14"/>
      <text:p text:style-name="P14"><text:span text:style-name="T283">C</text:span>ompiler is fully built, tested and installed and that you have run ldconfig, <text:span text:style-name="T421">see </text:span><text:span text:style-name="T421"><text:bookmark-ref text:reference-format="text" text:ref-name="__RefHeading___Toc1109_2548604501"> Appendix C – Installing the Cobol Compiler</text:bookmark-ref></text:span><text:span text:style-name="T421"><text:s/>on page </text:span><text:span text:style-name="T421"><text:bookmark-ref text:reference-format="page" text:ref-name="__RefHeading___Toc11539_2548604501">70</text:bookmark-ref></text:span><text:span text:style-name="T421">.</text:span></text:p>
      <text:p text:style-name="P14"/>
      <text:p text:style-name="P14">Compile <text:span text:style-name="T242">Flightlog</text:span> using <text:span text:style-name="T206">the</text:span> GnuCOBOL <text:span text:style-name="T206">compiler</text:span> by running the script comp-<text:span text:style-name="T242">Flightlog</text:span>.sh<text:span text:style-name="T207">. </text:span></text:p>
      <text:p text:style-name="P14"/>
      <text:p text:style-name="P14"><text:span text:style-name="T137">cd </text:span><text:span text:style-name="T142">flightlog</text:span><text:tab/><text:tab/><text:tab/><text:tab/>(change to the <text:span text:style-name="T614">flightlog</text:span> source code directory</text:p>
      <text:p text:style-name="P14"><text:span text:style-name="T137">bash comp-</text:span><text:span text:style-name="T142">flightlog</text:span><text:span text:style-name="T137">.sh</text:span><text:tab/><text:tab/>(compile<text:span text:style-name="T242">s</text:span> the <text:span text:style-name="T614">flightlog program and any others</text:span>)</text:p>
      <text:p text:style-name="P14"/>
      <text:p text:style-name="P14">The output of this step must not show any errors.</text:p>
      <text:p text:style-name="P14"/>
      <text:p text:style-name="P14">Assuming no errors occurred (but if so, fix and rerun) now <text:span text:style-name="T208">continue with </text:span><text:span text:style-name="T208"><text:bookmark-ref text:reference-format="text" text:ref-name="__RefHeading__11532_177439401">Installing Flightlog</text:bookmark-ref></text:span></text:p>
      <text:p text:style-name="P14"/>
      <text:p text:style-name="P14">Instead of running the compile script you can just enter :</text:p>
      <text:p text:style-name="P14"/>
      <text:p text:style-name="P180">cobc -x Flightlog.cbl</text:p>
      <text:p text:style-name="P14"/>
      <text:p text:style-name="P610"/>
      <text:h text:style-name="P684" text:outline-level="2"><text:bookmark-start text:name="__RefHeading__11532_177439401"/>Installing <text:span text:style-name="T242">Flightlog</text:span><text:bookmark-end text:name="__RefHeading__11532_177439401"/></text:h>
      <text:p text:style-name="P219"/>
      <text:p text:style-name="P220">Assuming no errors occurred <text:span text:style-name="T424">during building the program if you did not get executables, </text:span>(but if so, fix and re<text:span text:style-name="T425">build</text:span>) <text:span text:style-name="T208">you can now run</text:span> </text:p>
      <text:p text:style-name="P219"/>
      <text:p text:style-name="P179">chmod +x flightlog<text:tab/><text:tab/><text:tab/><text:span text:style-name="T243">Marks it as an executable</text:span></text:p>
      <text:p text:style-name="P180"/>
      <text:p text:style-name="P219"><text:span text:style-name="T137">cp </text:span><text:span text:style-name="T144">f</text:span><text:span text:style-name="T137">lightlog ~/</text:span><text:span text:style-name="T144">f</text:span><text:span text:style-name="T137">lightlog</text:span> <text:tab/><text:tab/>Assuming that is the directory you will be running the program from, <text:span text:style-name="T311">and is at the level above that for the source directory</text:span>.</text:p>
      <text:p text:style-name="P228">You can if you have a directory called bin in your home directory, copy the program there <text:s/>instead <text:span text:style-name="T615">by</text:span> typing : <text:s/></text:p>
      <text:p text:style-name="P228"/>
      <text:p text:style-name="P228"><text:span text:style-name="T137">cp -vp </text:span><text:span text:style-name="T143">f</text:span><text:span text:style-name="T137">lightlog ~/bin</text:span></text:p>
      <text:p text:style-name="P228"/>
      <text:p text:style-name="P235">If other <text:span text:style-name="T615">user</text:span>s will use your computer to run <text:span text:style-name="T615">f</text:span>lightlog then instead of the above, copy flightlog to /<text:span text:style-name="T61">usr/</text:span><text:span text:style-name="T179">local/bin and to do so use : <text:s/></text:span><text:span text:style-name="T145">sudo cp flightlog /</text:span><text:span text:style-name="T146">usr/</text:span><text:span text:style-name="T145">local/bin</text:span></text:p>
      <text:p text:style-name="P246">You may need to know the password for doing so depending on <text:span text:style-name="T615">your l</text:span>inux distro used.</text:p>
      <text:p text:style-name="P227"/>
      <text:p text:style-name="P227">Now you can run <text:span text:style-name="T615">f</text:span>lightlog from any directory under your user name.</text:p>
      <text:p text:style-name="P227"/>
      <text:h text:style-name="Heading_20_3" text:outline-level="3"><text:bookmark-start text:name="__RefHeading___Toc14210_2442113812"/>Setting the path to find executable programs<text:bookmark-end text:name="__RefHeading___Toc14210_2442113812"/></text:h>
      <text:p text:style-name="P227"><text:span text:style-name="T535">The first option of using ~/bin </text:span>assumes that your local bin directory is set up to be in your search path for programs.</text:p>
      <text:p text:style-name="P227">Here is an example :</text:p>
      <text:p text:style-name="P227"/>
      <text:p text:style-name="P229">PATH=/home/vince/bin:/usr/local/bin:/usr/local/sbin</text:p>
      <text:p text:style-name="P229"/>
      <text:p text:style-name="P230">To see your path set up, run this:</text:p>
      <text:p text:style-name="P230"/>
      <text:p text:style-name="P230">set | grep PATH</text:p>
      <text:p text:style-name="P229"/>
      <text:p text:style-name="P231">You could have a lot of lines from this but the one you want to look at starts a line with:</text:p>
      <text:p text:style-name="P231">PATH=/home</text:p>
      <text:p text:style-name="P231"/>
      <text:p text:style-name="P229">This is set up in my <text:span text:style-name="T616">home directory in the </text:span>bashrc file and this is set up <text:span text:style-name="T535">at</text:span> some point by <text:span text:style-name="T535">the </text:span>Linux installation scripts with a few changes by myself. Note that this could also be set up in <text:span text:style-name="T616">the </text:span>file bash_profile that also sits in your home directory.</text:p>
      <text:p text:style-name="P229">Note that as these two files start with a period (full stop) you can only see them if you use ‘ls -la’ as against the alias ‘ll’ when browsing directories. Yes, this is for Linux so Windows will be a little different.</text:p>
      <text:p text:style-name="P229"/>
      <text:p text:style-name="P231">My .bashrc files amongst other information shows:</text:p>
      <text:p text:style-name="P231"/>
      <text:p text:style-name="P391">export PATH=~/bin:.:/usr/local/bin:/usr/local/sbin:/usr/bin</text:p>
      <text:p text:style-name="P178"/>
      <text:p text:style-name="P231">I have removed <text:span text:style-name="T616">the </text:span>excess extras, so just showing the basic path.</text:p>
      <text:p text:style-name="P227"/>
      <text:h text:style-name="P686" text:outline-level="3"/>
      <text:h text:style-name="P688" text:outline-level="3"><text:bookmark-start text:name="__RefHeading___Toc14212_2442113812"/>Setting the terminal (konsole) program<text:bookmark-end text:name="__RefHeading___Toc14212_2442113812"/></text:h>
      <text:p text:style-name="P219"><text:span text:style-name="T208">When running Flightlog you </text:span><text:span text:style-name="T26">must</text:span><text:span text:style-name="T208"> ensure that the konsole or terminal program you are using has been correctly set up, namely set width to 106 columns, length of at least 24 lines and as long as you like, as some of the display processes can make use of it when displaying lists of Aircraft or Airfield within the Data Entry or Amend options via the function keys F1 or F3.</text:span></text:p>
      <text:p text:style-name="P219">You <text:span text:style-name="T23">must</text:span> have set the width correctly<text:span text:style-name="T209">.</text:span></text:p>
      <text:p text:style-name="P219">The program will check that these settings have been done and will <text:span text:style-name="T422">produce an error message (with you needing to press the enter key having adjusted the screen width and depth settings) and then checking again</text:span>.<text:span text:style-name="T719"> Warning some terminal programs will not do this retry of setting as they will not pass to Flightlog the changed value so you need to quit and after fixing the size program reload Flightlog.</text:span></text:p>
      <text:p text:style-name="P219">While changing these settings look for the <text:span text:style-name="T617">terminal</text:span> program “Edit profile" and <text:span text:style-name="T307">also </text:span>set “scrolling" <text:span text:style-name="T307">to</text:span> Unlimited <text:span text:style-name="T210">S</text:span>crolling <text:span text:style-name="T210">and </text:span>although not needed for <text:span text:style-name="T242">Flightlog,</text:span> can be handy.</text:p>
      <text:p text:style-name="P231"/>
      <text:h text:style-name="Heading_20_3" text:outline-level="3"><text:bookmark-start text:name="__RefHeading___Toc14214_2442113812"/>Screen<text:bookmark-end text:name="__RefHeading___Toc14214_2442113812"/></text:h>
      <text:p text:style-name="P231">For users running Mageia v<text:span text:style-name="T722">8, 9 or later</text:span><text:span text:style-name="T693"> </text:span><text:span text:style-name="T719">and possibly others</text:span>, I ha<text:span text:style-name="T693">d</text:span> to also run (<text:span text:style-name="T616">within</text:span> terminal) a program called screen as the terminal program messes up some display areas <text:span text:style-name="T425">and doing so before running Flightlog</text:span>.</text:p>
      <text:p text:style-name="P231">Just run it with no parameters and you can install this from your distro’s repo’s.</text:p>
      <text:p text:style-name="P219"/>
      <text:h text:style-name="Heading_20_3" text:outline-level="3"><text:bookmark-start text:name="__RefHeading___Toc13668_2442113812"/>Script for running flightlog<text:bookmark-end text:name="__RefHeading___Toc13668_2442113812"/></text:h>
      <text:p text:style-name="P568">There are three version of the normal script for running flightlog and these are for the three format types of dates <text:span text:style-name="T621">used</text:span>, namely UK, USA and international/unix which are the formats dd/yy/yyyy, mm/dd/yyyy and YYYY/MM/DD respectively. <text:span text:style-name="T621">The separators between, shown here as ‘/’ can be comma, full stop, or anything else, as it is not checked when validating the date entered.</text:span></text:p>
      <text:p text:style-name="P568"/>
      <text:p text:style-name="P568">These scripts are run-flightlog-uk.sh, <text:s/>run-flightlog-usa.sh and run-flightlog-unix.sh.</text:p>
      <text:p text:style-name="P568">The one for your chosen formal should be copied to <text:span text:style-name="T621">file </text:span>run-flightlog.sh and left in the directory used to run flightlog. Here is <text:span text:style-name="T621">the content of </text:span>run-flightlog-uk.sh:</text:p>
      <text:p text:style-name="P287">–</text:p>
      <text:p text:style-name="P389">#!/bin/bash</text:p>
      <text:p text:style-name="P195"><text:span text:style-name="T215"># 18/12/2018 vbc - v1.01 Added backup directory if not exists. </text:span><text:line-break/>#                        and do backup at end. <text:line-break/># <text:line-break/>if [ ! -d backups ]; then</text:p>
      <text:p text:style-name="P195">  mkdir backups </text:p>
      <text:p text:style-name="P195">fi</text:p>
      <text:p text:style-name="P195">#</text:p>
      <text:p text:style-name="P195"/>
      <text:p text:style-name="P195">export LC_TIME=en_GB</text:p>
      <text:p text:style-name="P195">../Flightlog</text:p>
      <text:p text:style-name="P196">zip -9 backups/backup-<text:span text:style-name="T368">$</text:span>1.zip *.dat *.seq</text:p>
      <text:p text:style-name="P195">exit 0</text:p>
      <text:p text:style-name="P366">–</text:p>
      <text:p text:style-name="P287"/>
      <text:p text:style-name="P568">The only line that differs <text:span text:style-name="T618">between them </text:span>starts with <text:span text:style-name="T621">EXPORT </text:span>LC_TIME. <text:span text:style-name="T266">So f</text:span><text:span text:style-name="T267">or</text:span><text:span text:style-name="T268"> the USA, </text:span><text:span text:style-name="T269">its</text:span><text:span text:style-name="T268"> LC_TIME=en_USA </text:span><text:span text:style-name="T269">(</text:span><text:span text:style-name="T268">for mm/dd/yyyy</text:span><text:span text:style-name="T269">), LC_TIME=</text:span><text:span text:style-name="T268">en_UK </text:span><text:span text:style-name="T269">(for dd/mm/yyyy) and</text:span><text:span text:style-name="T268"> </text:span><text:span text:style-name="T270">blank</text:span><text:span text:style-name="T268"> for the yyyy/mm/dd </text:span><text:span text:style-name="T271">date </text:span><text:span text:style-name="T268">format </text:span><text:span text:style-name="T269">(LC_TIME= <text:s/>) here note the spaces after the = symbol. </text:span><text:span text:style-name="T272">Also see </text:span><text:span text:style-name="T272"><text:bookmark-ref text:reference-format="chapter" text:ref-name="__RefHeading___Toc10977_2975102684">11.6.4</text:bookmark-ref></text:span><text:span text:style-name="T272"><text:s/></text:span><text:span text:style-name="T272"><text:bookmark-ref text:reference-format="text" text:ref-name="__RefHeading___Toc10977_2975102684">Setting of LC_TIME for your preferred date format.</text:bookmark-ref></text:span><text:span text:style-name="T272"><text:s/>page </text:span><text:span text:style-name="T272"><text:bookmark-ref text:reference-format="page" text:ref-name="__RefHeading___Toc10977_2975102684">85</text:bookmark-ref></text:span><text:span text:style-name="T272">.</text:span></text:p>
      <text:p text:style-name="P67"/>
      <text:p text:style-name="P566"><text:soft-page-break/>If <text:span text:style-name="T621">you are based in the UK or USA this setting should already be set up in Linux otherwise </text:span>you need to <text:span text:style-name="T621">use the best script for your preferred date format.</text:span></text:p>
      <text:p text:style-name="P105"/>
      <text:p text:style-name="P110">[The changes will NOT effect your systems settings as it will only be in effect while Flightlog is running and as soon as you come out of the terminal <text:s/>/ <text:s/>konsole program it will revert back to the original system settings.]</text:p>
      <text:p text:style-name="P105"/>
      <text:p text:style-name="P564"><text:span text:style-name="T608">L</text:span>ets check if you have a setting for this environment variable, so in a terminal type the following :</text:p>
      <text:p text:style-name="P564"/>
      <text:p text:style-name="P390">set | grep LC_TIME</text:p>
      <text:p text:style-name="P106"/>
      <text:p text:style-name="P106">You will see something along the line<text:span text:style-name="T608">s</text:span> of :</text:p>
      <text:p text:style-name="P106"/>
      <text:p text:style-name="P198"><text:span text:style-name="T369">LC_TIME</text:span><text:span text:style-name="T215">=en_GB.UTF-8</text:span></text:p>
      <text:p text:style-name="P106"/>
      <text:p text:style-name="P106">Here is the setting for the UK and will use a date format of : dd/mm/yyyy</text:p>
      <text:p text:style-name="P106"/>
      <text:p text:style-name="P105">If this is not set at all, the result<text:span text:style-name="T442">s</text:span> from the set command will be blank and you will need to set up your locale but most if not all Linux distributions do set this up having asked for your location <text:span text:style-name="T608">as a country</text:span>. <text:span text:style-name="T622">If it says blank then Flightlog will use the Unix / International format of yyyy/mm/dd.</text:span></text:p>
      <text:p text:style-name="P69"/>
      <text:h text:style-name="Heading_20_3" text:outline-level="3"><text:bookmark-start text:name="__RefHeading___Toc14216_2442113812"/>Backup archive created by run-flightlog.sh<text:bookmark-end text:name="__RefHeading___Toc14216_2442113812"/></text:h>
      <text:p text:style-name="P98"><text:span text:style-name="T619">You can add a parameter when using the run-flightlog.sh script and it is used as th</text:span>e date <text:span text:style-name="T618">when creating an archive of your data files where the date should be the date of your last flight</text:span> <text:span text:style-name="T619">entered, </text:span>in the <text:span text:style-name="T619">suggested </text:span>form of yyyy-mm-dd <text:s/><text:span text:style-name="T619">(</text:span>or if you wish dd-mm-yyyy or any other variation<text:span text:style-name="T619">)</text:span>. <text:span text:style-name="T368">Here, it is run as:</text:span></text:p>
      <text:p text:style-name="P395">run-Flightlog.sh 1998-09-21 <text:span text:style-name="T476">(but could be say run-Flightlog.sh 19980921).</text:span></text:p>
      <text:p text:style-name="P395"/>
      <text:p text:style-name="P67"><text:span text:style-name="T217">This p</text:span><text:span text:style-name="T216">roduces a backup </text:span><text:span text:style-name="T222">archive </text:span><text:span text:style-name="T216">with the name : </text:span><text:span text:style-name="T369">backup-1998-09-21.zip </text:span><text:span text:style-name="T231">in the backups directory. </text:span><text:span text:style-name="T232">The reason for this format </text:span><text:span text:style-name="T233">i</text:span><text:span text:style-name="T232">s that a directory listing will show them in date order.</text:span></text:p>
      <text:p text:style-name="P99">If the parameter is not included when running Flightlog using the supplied script, the back up file name will be backup-.zip. I<text:span text:style-name="T544">f</text:span> there is <text:span text:style-name="T544">not </text:span>a back up directory called backups in the directory where Flightlog runs from, <text:span text:style-name="T544">it is created</text:span>.</text:p>
      <text:p text:style-name="P99"/>
      <text:p text:style-name="P67">Remember the rule that there are two types of users – One that has lost data and <text:span text:style-name="T348">one</text:span> <text:span text:style-name="T348">that </text:span><text:s/>that will <text:span text:style-name="T438">(at some point)</text:span>.</text:p>
      <text:p text:style-name="P67"/>
      <text:p text:style-name="P67">It cannot be stressed enough to <text:span text:style-name="T23">always</text:span> make these back ups in case of power, or hardware problems and these do happen let alone just typing issues <text:span text:style-name="T49">or in the rare case of program bugs (defects)</text:span>. <text:span text:style-name="T54">Program defects will always exist in one form or another despite heavy testing as all combinations tested does not always match what a user does. However that said, testing has been conducted in functional (including use-cases), system and UAT (user acceptance testing) to help ensure bugs are minimised but there is no such thing as bug free software even if used by many and over very many years as many mainframe users can testify.</text:span></text:p>
      <text:p text:style-name="P71"/>
      <text:p text:style-name="P141">A copy of these backup files should be made to a removable device such as a USB stick and stored away from the computer and better still in another building and of course you can use a cloud service to store them - they are not large files even for a 30,000 hour pilot.</text:p>
      <text:h text:style-name="P663" text:outline-level="2"><text:bookmark-start text:name="__RefHeading___Toc19843_2548604501"/><text:span text:style-name="T425">Preparation for r</text:span>unning Flightlog<text:bookmark-end text:name="__RefHeading___Toc19843_2548604501"/></text:h>
      <text:p text:style-name="P232"/>
      <text:h text:style-name="Heading_20_3" text:outline-level="3"><text:bookmark-start text:name="__RefHeading___Toc12350_1090335569"/>Actual Steps <text:span text:style-name="T375">for Linux</text:span>.<text:bookmark-end text:name="__RefHeading___Toc12350_1090335569"/></text:h>
      <text:p text:style-name="P378"/>
      <text:p text:style-name="P380">This will create a permanent set up for konsole, the terminal program, and providing it is done correctly only needs to be done once for a user as <text:span text:style-name="T382">it </text:span>assumes you are using the KDE graphic interface as against Gnome which may be a <text:span text:style-name="T382">slightly </text:span>different procedure.</text:p>
      <text:p text:style-name="P380"/>
      <text:p text:style-name="P380">Using the mouse move the cursor to a<text:span text:style-name="T382">n</text:span> empty area on screen and <text:span text:style-name="T376">right click, a box has appeared, select to the entry “Create new" by moving cursor to the area with &gt; and here you have some choices but select “Link to Application" by left click.</text:span></text:p>
      <text:p text:style-name="P381">Another box appears, so let set this up, first change to the Application tab (at the top) and change the description currently “Link to Application" to “Flightlog" (without the quotes).</text:p>
      <text:p text:style-name="P381">In Advanced Options, <text:s/>Select top option “Run in terminal" using left click then again with <text:s/>left click for OK at bottom. Now to fill in the required areas, click Name and change to Flightlog, then Description do the same, Comment what ever you like or ignore it, and in Command select browse and you will get a new box that specifies at the top “Open File" so find the directory you created for running Flightlog and left click, so that the screen shows <text:span text:style-name="T377">c</text:span>ontents of directory Flightlog which <text:span text:style-name="T377">has one file Flightlog, <text:s/>now select Flightlog (left click) the name appears next to lower tab “Name" now select Open on the bottom of the box. If done correctly within the Command tap you now have the path and filename of Flightlog. Now select OK (left click).</text:span></text:p>
      <text:p text:style-name="P381"/>
      <text:p text:style-name="P382">Start the Terminal program konsole as we have to set up the Profile for it with the width and length needed for Flightlog. Along to top of konsole select Settings and manage profile.</text:p>
      <text:p text:style-name="P382">New box appears set to Profiles so now click on New Profile and for Profile name make it Flightlog then lower down change Columns to 106 and Rows to any <text:span text:style-name="T378">larger than 24 and here </text:span>does depend a bit on how big your monitor is but assuming a 21 inch or bigger, set to 50. <text:span text:style-name="T378">Now select Apply then OK. Now to make sure it remembers the settings exit then restart a konsole session, now using the cursor drag the right hand edge to the right until the number 106 appears – Stop. <text:s/>Now do the same but on the bottom edge until 50 (or what ever length you have decided on) appears. That is it, so exit <text:s/>konsole and restart it and when it does it should now be set to the width and length you previously did.</text:span></text:p>
      <text:p text:style-name="P382"/>
      <text:p text:style-name="P384">Now we have an icon that when selected (double click) will run Flightlog <text:span text:style-name="T379">and the Flightlog menu will appear</text:span>.</text:p>
      <text:p text:style-name="P383"/>
      <text:p text:style-name="P385">So now you are ready to enter your flight log book data by selecting menu option A.</text:p>
      <text:p text:style-name="P385"/>
      <text:p text:style-name="P385">Now for some tweets to the settings we created for running Flightlog via the screen Icon that runs <text:span text:style-name="T382">the</text:span> application.</text:p>
      <text:p text:style-name="P385">You should not do this now but it is a feature that you might need to add. By the way, there is no reason why you cannot set up other icons that run application for Flightlog but with different parameters to it just remember to name them to reflect what it will do, maybe the parameter list within the application description or name or both.</text:p>
      <text:p text:style-name="P385"/>
      <text:h text:style-name="P666" text:outline-level="2"/>
      <text:h text:style-name="P663" text:outline-level="2"><text:bookmark-start text:name="__RefHeading___Toc20390_2548604501"/>Running Flightlog <text:span text:style-name="T426">Manually</text:span><text:bookmark-end text:name="__RefHeading___Toc20390_2548604501"/></text:h>
      <text:p text:style-name="P385"/>
      <text:p text:style-name="P385">Here are the Flightlog optional parameter options and are shown as if running from within a konsole window <text:span text:style-name="T426">and the format is :</text:span></text:p>
      <text:p text:style-name="P385"/>
      <text:p text:style-name="P443">Flightlog P1 P2 P3 P4 or <text:span text:style-name="T536">(</text:span>HELP | help | -h | -H<text:span text:style-name="T536">)</text:span></text:p>
      <text:p text:style-name="P634">Normal usage is without any parameters.</text:p>
      <text:p text:style-name="P634"/>
      <text:p text:style-name="P222"><text:span text:style-name="T74">Note</text:span> <text:s/><text:span text:style-name="T427">T</text:span>hat a space must be included between the words/parameters and likewise after the program name.</text:p>
      <text:p text:style-name="P225"/>
      <text:p text:style-name="P443">First <text:span text:style-name="T427">option is </text:span>Flightlog HELP :</text:p>
      <text:p text:style-name="P386"><text:span text:style-name="T425">F</text:span>or help with the parameters, you can run:</text:p>
      <text:p text:style-name="P386">Flightlog help | HELP | -h | -H <text:s/>- <text:s/><text:span text:style-name="T383">(the “|" means or, so multiple options for the same function) and this will produce a screen showing:</text:span></text:p>
      <text:p text:style-name="P386"/>
      <text:p text:style-name="P386">--</text:p>
      <text:p text:style-name="P388">Parameter Help <text:span text:style-name="T383">for LOG BOOK (2.xx.yy)</text:span></text:p>
      <text:p text:style-name="P388"/>
      <text:p text:style-name="P388">P1 = NONIGHT or NONITE for no night time calcs against table</text:p>
      <text:p text:style-name="P388">P2 = CSV<text:span text:style-name="T566">= CSV</text:span> path and file name for Config file if not default<text:span text:style-name="T713"> name</text:span></text:p>
      <text:p text:style-name="P388">P3 = ACFT-DATE for report excludes unused Aircraft</text:p>
      <text:p text:style-name="P388">P4 = EBCDIC conversion of CSV data [NOT CURRENTLY IN USE] </text:p>
      <text:p text:style-name="P388"/>
      <text:p text:style-name="P388">Hit return to abort Correctly</text:p>
      <text:p text:style-name="P393">--</text:p>
      <text:p text:style-name="P393"/>
      <text:p text:style-name="P396"><text:span text:style-name="T23">Note </text:span><text:span text:style-name="T427">T</text:span>hat the <text:span text:style-name="T426">above </text:span>char<text:span text:style-name="T385">acter</text:span>s “--" show the start <text:span text:style-name="T385">and</text:span> end of <text:span text:style-name="T426">displayed </text:span>data <text:span text:style-name="T384">(that is </text:span>in another type font<text:span text:style-name="T384">) and xx is minor version and yy is build numbers of Flightlog</text:span>.</text:p>
      <text:p text:style-name="P233"/>
      <text:p text:style-name="P221">The following optional parameters can be <text:span text:style-name="T422">added in any order </text:span>:</text:p>
      <text:p text:style-name="P221"/>
      <text:h text:style-name="P692" text:outline-level="3"><text:bookmark-start text:name="__RefHeading___Toc19981_2548604501"/>Parameter 1 <text:s/>(P1):<text:bookmark-end text:name="__RefHeading___Toc19981_2548604501"/></text:h>
      <text:p text:style-name="P549"/>
      <text:p text:style-name="P224"><text:span text:style-name="T568">Value </text:span>NONIGHT<text:span text:style-name="T568"> | NONITE</text:span></text:p>
      <text:p text:style-name="P224">Do not attempt to calculate start of night <text:span text:style-name="T308">time </text:span>when accepting x1, x2, x3 day and night entries, <text:span text:style-name="T308">where x can be P, E, N, R, T.</text:span> This will force Flightlog to accept the xn field based on the entered <text:span text:style-name="T309">capacity</text:span> value both for day then night <text:span text:style-name="T308">(</text:span>if any time is still unaccounted for<text:span text:style-name="T308">)</text:span>.</text:p>
      <text:p text:style-name="P239">Entering the misspelling NONITE also works just in case you are feeling lazy.</text:p>
      <text:p text:style-name="P221"/>
      <text:p text:style-name="P221"><text:span text:style-name="T537">Why use this? </text:span>This usually causes a problem if time is close to or after twilight. Note that the predefined values for night time is set in a table at “Night-In-Month" showing the month from January to December in order, so the current one set for the UK is "161718192021212019181716" <text:span text:style-name="T309">and here the value for August is 20 <text:s/>for 20:00 hours. The program deducts one from these values to arrive at a ‘safe’ time when night falls. It does not recalibrate the table after any data is entered. <text:s/>It is just a basic calculation that seems to work best when time is clear of twilight, i.e., fully dark. <text:s/>If you have the OS version of Flightlog you can change these values in the source code file and then recompile the program, but do not forget an hour is deducted in the final calculation for the start of night so can always be up to an hour out, especially if it is the start of the hour. The deduction of 1 tries to help a calculation at the start of the hour but is not always right.</text:span></text:p>
      <text:p text:style-name="P221"/>
      <text:p text:style-name="P221"><text:soft-page-break/>Correct, the program does not check for the flight start minute time as it would only change value by a maximum of 30 minutes and even that is not accurate.</text:p>
      <text:p text:style-name="P221"/>
      <text:p text:style-name="P221"/>
      <text:h text:style-name="P692" text:outline-level="3"><text:bookmark-start text:name="__RefHeading___Toc19983_2548604501"/>Parameter 2 (P2):<text:bookmark-end text:name="__RefHeading___Toc19983_2548604501"/></text:h>
      <text:p text:style-name="P549"/>
      <text:p text:style-name="P221"><text:span text:style-name="T568">Value 'CSV=' </text:span>CSV <text:span text:style-name="T566">path and </text:span>configuration file name<text:span text:style-name="T566">,</text:span> if not the default which is <text:span text:style-name="T485">csv</text:span>-conf.txt.</text:p>
      <text:p text:style-name="P221">You can include the path if needed with the file name but must be less than 12<text:span text:style-name="T566">8</text:span> characters. <text:s/>Example = <text:s/>“<text:span text:style-name="T566">CSV=</text:span>/home/<text:span text:style-name="T310">username</text:span>/Flightlog/<text:span text:style-name="T485">csv</text:span>-data/<text:span text:style-name="T485">csv</text:span>-config.txt"<text:span text:style-name="T566"> but without the quotes</text:span>.</text:p>
      <text:p text:style-name="P234"/>
      <text:p text:style-name="P234">[Without the path it will only look in the current directory.]</text:p>
      <text:p text:style-name="P221"/>
      <text:p text:style-name="P221">Where username is <text:span text:style-name="T537">normally </text:span>your platforms <text:span text:style-name="T537">user </text:span>name <text:span text:style-name="T537">that you</text:span> login with<text:span text:style-name="T566"> and you have read access</text:span>.</text:p>
      <text:p text:style-name="P221"/>
      <text:p text:style-name="P221">That said, you would normally keep this file in the same directory as the Flightlog data files.</text:p>
      <text:p text:style-name="P221">However this <text:span text:style-name="T566">parameter </text:span>allows <text:span text:style-name="T426">you </text:span>to change this.</text:p>
      <text:p text:style-name="P278"/>
      <text:p text:style-name="P278"/>
      <text:h text:style-name="Heading_20_3" text:outline-level="3"><text:bookmark-start text:name="__RefHeading___Toc20392_2548604501"/><text:span text:style-name="T427">Parameter </text:span>3 <text:span text:style-name="T427">(P3)</text:span><text:bookmark-end text:name="__RefHeading___Toc20392_2548604501"/></text:h>
      <text:p text:style-name="Text_20_body"/>
      <text:p text:style-name="P387"><text:span text:style-name="T427">Value </text:span>ACFT-DATE.</text:p>
      <text:p text:style-name="P387"/>
      <text:p text:style-name="P444">Using this option will change the way Aircraft lists are produced in that instead of a full list of all <text:span text:style-name="T567">recorded, you will get the list ordered by last flight date and only those that have been flown.</text:span></text:p>
      <text:p text:style-name="P445">Useful if you have added a lot say from a different users directory than you have flown.</text:p>
      <text:p text:style-name="P444"/>
      <text:p text:style-name="P547">Example of calling Flightlog with all parameters :</text:p>
      <text:p text:style-name="P547"/>
      <text:p text:style-name="P547">flightlog NONIGHT CSV=/home/fred/flightlog/csv-config.txt ACFT-DATE</text:p>
      <text:p text:style-name="P547"/>
      <text:p text:style-name="P547">Note that the case of these parameters are very specific - they must all be in upper case (Capitals letters) other than the path and filename of the CSV configuration file.</text:p>
      <text:p text:style-name="P387"/>
      <text:p text:style-name="P387"/>
      <text:h text:style-name="Heading_20_3" text:outline-level="3"><text:bookmark-start text:name="__RefHeading___Toc10977_2975102684"/>Setting of LC_TIME for you<text:span text:style-name="T567">r</text:span> preferred date format.<text:bookmark-end text:name="__RefHeading___Toc10977_2975102684"/></text:h>
      <text:p text:style-name="P546"/>
      <text:p text:style-name="P546">Before you run Flightlog, the environment variable LC_TIME must be set up so that your locale date format is known:</text:p>
      <text:p text:style-name="P546"/>
      <text:p text:style-name="P223"><text:span text:style-name="T567">Flightlog a</text:span>ssum<text:span text:style-name="T567">es</text:span> you have the environment variable LC_TIME set<text:span text:style-name="T569">,</text:span> in your system setup script (bashrc) to one of, </text:p>
      <text:p text:style-name="P223"/>
      <text:p text:style-name="P223">en_<text:span text:style-name="T310">GB (date format is dd/mm/yyyy), </text:span>or </text:p>
      <text:p text:style-name="P223">en_<text:span text:style-name="T310">USA (date format is mm/dd/yyyy). </text:span></text:p>
      <text:p text:style-name="P236">Or any other <text:span text:style-name="T537">including blank</text:span></text:p>
      <text:p text:style-name="P223"/>
      <text:p text:style-name="P237">If these <text:span text:style-name="T566">two </text:span>are not found<text:span text:style-name="T567">,</text:span> <text:span text:style-name="T566">the </text:span>date format is set to UNIX which is yyyy/mm/dd. </text:p>
      <text:p text:style-name="P237">If your system default is NOT one of these but you wish to <text:span text:style-name="T566">make </text:span>use of <text:span text:style-name="T567">the </text:span>UK or USA <text:span text:style-name="T567">date </text:span>formats just set the value of LC_TIME before calling Flightlog (or in the run script file) as :</text:p>
      <text:p text:style-name="P237"/>
      <text:p text:style-name="P226">export LC_TIME=en_UK<text:span text:style-name="T567"><text:tab/><text:tab/><text:tab/>For date format dd/mm/yyyy</text:span></text:p>
      <text:p text:style-name="P226"><text:soft-page-break/></text:p>
      <text:p text:style-name="P247">or</text:p>
      <text:p text:style-name="P226"/>
      <text:p text:style-name="P226">export LC_TIME=en_USA<text:span text:style-name="T567"><text:tab/><text:tab/><text:tab/>For date format mm/dd/yyyy</text:span></text:p>
      <text:p text:style-name="P226"/>
      <text:p text:style-name="P238">or</text:p>
      <text:p text:style-name="P238"/>
      <text:p text:style-name="P238">export LC_TIME=<text:tab/><text:tab/><text:tab/><text:tab/>For Unix format <text:span text:style-name="T567"><text:s/>yyyy/mm/dd</text:span></text:p>
      <text:p text:style-name="P238"/>
      <text:p text:style-name="P238"/>
      <text:p text:style-name="P226">This setting will only last while running Flightlog and will be <text:span text:style-name="T537">forgotten</text:span> after you exit the terminal program.<text:span text:style-name="T567"> </text:span></text:p>
      <text:p text:style-name="P226"/>
      <text:p text:style-name="P240">In the three supplied scripts that will run Flightlog, there is one version for each of the above settings so just copy the right one for you to run-flightlog.sh.</text:p>
      <text:p text:style-name="P279"/>
      <text:p text:style-name="P546">These scripts are :</text:p>
      <text:p text:style-name="P546"/>
      <text:p text:style-name="P547">run-flightlog-uk.sh</text:p>
      <text:p text:style-name="P546">run-flightlog-u<text:span text:style-name="T568">sa</text:span>.sh</text:p>
      <text:p text:style-name="P547">run-flightlog-unix.sh</text:p>
      <text:p text:style-name="P387"/>
      <text:p text:style-name="P547">You might well have one called run-flightlog.sh and that is the UK one.</text:p>
      <text:p text:style-name="P547"/>
      <text:h text:style-name="Heading_20_3" text:outline-level="3"><text:bookmark-start text:name="__RefHeading___Toc15052_2735134579"/>Running <text:span text:style-name="T538">F</text:span>light<text:span text:style-name="T538">log</text:span><text:bookmark-end text:name="__RefHeading___Toc15052_2735134579"/></text:h>
      <text:p text:style-name="P537"/>
      <text:p text:style-name="P611"><text:span text:style-name="T179">Th</text:span><text:span text:style-name="T191">e</text:span><text:span text:style-name="T179"> script</text:span><text:span text:style-name="T191"> run-flightlog.sh</text:span><text:span text:style-name="T179"> should be placed in the Flightlog directory if you need it and of course you can rename it. </text:span><text:span text:style-name="T180">You must set it executable by running command:</text:span></text:p>
      <text:p text:style-name="P469"/>
      <text:p text:style-name="P446"><text:span text:style-name="T179">chmod +x run-</text:span><text:span text:style-name="T192">f</text:span><text:span text:style-name="T179">lightlog.sh</text:span></text:p>
      <text:p text:style-name="P467"/>
      <text:p text:style-name="P472">There is one optional parameter to this script which is the date to use of the backup file created at the end of running Flightlog and to make it easy to spot the latest we recommend that you use this format <text:s/>yyyy-mm-dd which will create a backup of backup-yyyy-mm-dd.zip. You can change the archiver used and the extension used such as rar so file is backup-2019-05-30.rar or tar so could be backup-20190530.tar</text:p>
      <text:p text:style-name="P611"><text:span text:style-name="T179">This script is </text:span><text:span text:style-name="T180">also </text:span><text:span text:style-name="T179">supplied in the Flightlog SVN code tree </text:span><text:span text:style-name="T189">along with all other files</text:span><text:span text:style-name="T179">.</text:span></text:p>
      <text:p text:style-name="P548"/>
      <text:p text:style-name="P548">Assuming the above has been done, l<text:span text:style-name="T428">ets get going by entering :</text:span></text:p>
      <text:p text:style-name="P385"/>
      <text:p text:style-name="P340"><text:span text:style-name="T568">run-</text:span>Flightlog<text:span text:style-name="T568">.sh</text:span></text:p>
      <text:p text:style-name="P466"/>
      <text:p text:style-name="P445"><text:span text:style-name="T179">Now continue with section </text:span><text:span text:style-name="T179"><text:bookmark-ref text:reference-format="text" text:ref-name="__RefHeading___Toc1037_2548604501">Work Flow Overview</text:bookmark-ref></text:span><text:span text:style-name="T179"><text:s/>on page </text:span><text:span text:style-name="T179"><text:bookmark-ref text:reference-format="page" text:ref-name="__RefHeading___Toc1037_2548604501">15</text:bookmark-ref></text:span><text:span text:style-name="T179"><text:s/></text:span><text:span text:style-name="T181">for a test work through of the various options in Flightlog. </text:span><text:span text:style-name="T189">Don’t worry if you just use test data as you can delete the three data files that have the extension of .dat and start again</text:span><text:span text:style-name="T193"> when ready with real flight log records.</text:span></text:p>
      <text:p text:style-name="P468"/>
      <text:p text:style-name="P468"/>
      <text:h text:style-name="P655" text:outline-level="1"><text:bookmark-start text:name="__RefHeading___Toc19015_2548604501"/>Appendix R - <text:s/>Registering Flightlog<text:bookmark-end text:name="__RefHeading___Toc19015_2548604501"/></text:h>
      <text:p text:style-name="P473"/>
      <text:p text:style-name="P473">There is no legal requirement to do this but it helps me knowing who uses it and where in the world and on what platform (Linux, Windows, Android etc).</text:p>
      <text:p text:style-name="P473"/>
      <text:p text:style-name="P302"><text:span text:style-name="T185">There are </text:span><text:span text:style-name="T194">four</text:span><text:span text:style-name="T185"> types of registration:</text:span></text:p>
      <text:p text:style-name="P471"/>
      <text:p text:style-name="P470"><text:span text:style-name="T33">1.</text:span><text:span text:style-name="T479"> </text:span>To register your usage <text:span text:style-name="T69">only</text:span><text:span text:style-name="T474">, </text:span>of Flightlog please send an email to the address shown on the inside front cover of this manual. <text:span text:style-name="T539">This helps </text:span><text:span text:style-name="T701">me</text:span><text:span text:style-name="T539"> know how many people are using Flightlog, with what operating system &amp; version and who to contact if an important update becomes available including sending an updated archive</text:span><text:span text:style-name="T723"> via email</text:span><text:span text:style-name="T539">.</text:span></text:p>
      <text:p text:style-name="P52"/>
      <text:p text:style-name="P617"><text:span text:style-name="T244">Use “Flightlog </text:span><text:span text:style-name="T251">Registration" </text:span><text:span text:style-name="T244">in subject line </text:span><text:span text:style-name="T251">(without the quotes)</text:span><text:span text:style-name="T244">.</text:span></text:p>
      <text:p text:style-name="P16"/>
      <text:p text:style-name="P44">Registrations <text:span text:style-name="T479">details should</text:span> include: User<text:span text:style-name="T429">s</text:span> name <text:span text:style-name="T479">First and Last</text:span>, <text:span text:style-name="T479">Home </text:span>Town and Country, <text:span text:style-name="T429">platform used (</text:span><text:span text:style-name="T701">W</text:span><text:span text:style-name="T429">indows, Linux (with distro and version and if x64 etc)</text:span> <text:span text:style-name="T689">along with the Cobol compiler version used </text:span>as well as your email address that can receive updates as email archived attachments <text:span text:style-name="T403">and these will be around 10Mb in size</text:span>. <text:span text:style-name="T719">This information is for me to understand who is using it on what platforms and in what countries.</text:span></text:p>
      <text:p text:style-name="P44"><text:span text:style-name="T479">This information will </text:span><text:span text:style-name="T33">not</text:span><text:span text:style-name="T479"> be shared with anyone</text:span><text:span text:style-name="T702">,</text:span><text:span text:style-name="T479"> for </text:span><text:span text:style-name="T85">any</text:span><text:span text:style-name="T479"> reason</text:span><text:span text:style-name="T713">, period</text:span><text:span text:style-name="T479">.</text:span></text:p>
      <text:p text:style-name="P53"/>
      <text:p text:style-name="P54">Support is only offered on a<text:span text:style-name="T701">n</text:span> “as time is available" basis where all bug reports, forums and any updates are served via the Sourceforge website at:</text:p>
      <text:p text:style-name="P36"><text:a xlink:type="simple" xlink:href="http://www.sourceforge.net/projects/flightlog" text:style-name="Internet_20_link" text:visited-style-name="Visited_20_Internet_20_Link"><text:span text:style-name="T179">www.sourceforge.net/projects/</text:span><text:span text:style-name="T195">f</text:span><text:span text:style-name="T179">lightlog</text:span></text:a><text:span text:style-name="T202">C</text:span></text:p>
      <text:p text:style-name="P54"/>
      <text:p text:style-name="P56">ALL users are encouraged to use the tracker / bug reporting tool on the SF Flightlog website so that all users are aware of any issues and also the <text:span text:style-name="T694">f</text:span>orum / <text:span text:style-name="T480">discussion boards</text:span> for anyone to help resolve an issue. <text:span text:style-name="T540">When reporting a problem always specify the version of Flightlog that you are using as well as your platform details (Linux,</text:span><text:span text:style-name="T702">OSX,</text:span><text:span text:style-name="T540"> Windows etc). </text:span>It is also a good place to see if any one else has reported a similar problem. <text:span text:style-name="T723">I</text:span><text:span text:style-name="T480"> use them to report any updates or issues to Flightlog outside of the tracker service such as when there is a new version released.</text:span></text:p>
      <text:p text:style-name="P54"/>
      <text:p text:style-name="P54"/>
      <text:p text:style-name="P36"><text:span text:style-name="T201">2.</text:span><text:span text:style-name="T185"> </text:span><text:span text:style-name="T179">For those user</text:span><text:span text:style-name="T183">s</text:span><text:span text:style-name="T179"> who require more conventional support </text:span><text:span text:style-name="T183">(</text:span><text:span text:style-name="T179">via email</text:span><text:span text:style-name="T183">)</text:span><text:span text:style-name="T179"> </text:span><text:span text:style-name="T183">you </text:span><text:span text:style-name="T179">can again register </text:span><text:span text:style-name="T185">providing the same information as in (1.), </text:span><text:span text:style-name="T74">and</text:span><text:span text:style-name="T179"> via paypal </text:span><text:span text:style-name="T189">sent </text:span><text:span text:style-name="T179">to </text:span><text:a xlink:type="simple" xlink:href="mailto:vbcoen@gmail.com" text:style-name="Internet_20_link" text:visited-style-name="Visited_20_Internet_20_Link"><text:span text:style-name="T179">vbcoen@gmail.com</text:span></text:a><text:span text:style-name="T179">, </text:span><text:span text:style-name="T183">pay</text:span><text:span text:style-name="T199">ing</text:span><text:span text:style-name="T183"> </text:span><text:span text:style-name="T179">a </text:span><text:span text:style-name="T183">small </text:span><text:span text:style-name="T179">fee :</text:span></text:p>
      <text:p text:style-name="P54"/>
      <text:p text:style-name="P54">UK <text:span text:style-name="T701">or any where else </text:span>£<text:span text:style-name="T701">15</text:span> (pounds Sterling).</text:p>
      <text:p text:style-name="P57">Th<text:span text:style-name="T701">is</text:span> <text:span text:style-name="T701">is</text:span> <text:span text:style-name="T701">a </text:span>one off payment <text:span text:style-name="T540">for all updates within a major release, (currently v2) and within two years of registering</text:span>.<text:span text:style-name="T661"> <text:s/>It is unlikely that I will request any additional payments</text:span><text:span text:style-name="T701">,</text:span><text:span text:style-name="T661"> even outside this </text:span><text:span text:style-name="T719">time </text:span><text:span text:style-name="T661">period.</text:span></text:p>
      <text:p text:style-name="P57"/>
      <text:p text:style-name="P37"><text:span text:style-name="T182">Note that </text:span><text:span text:style-name="T197">contributions</text:span><text:span text:style-name="T182"> </text:span><text:span text:style-name="T196">are </text:span><text:span text:style-name="T182">in Pounds Sterling,. Paypal may, make a small charge if your currency is not Sterling.</text:span></text:p>
      <text:p text:style-name="P54"/>
      <text:p text:style-name="P36"><text:span text:style-name="T179">Below assumes that Flightlog is in use and any support is for Flightlog </text:span><text:span text:style-name="T61">itself</text:span><text:span text:style-name="T179"> </text:span><text:span text:style-name="T182">and its operations,</text:span><text:span text:style-name="T179"> </text:span><text:span text:style-name="T197">as well as</text:span><text:span text:style-name="T179"> the manual </text:span><text:span text:style-name="T182">or other </text:span><text:span text:style-name="T190">supplied </text:span><text:span text:style-name="T182">documentation</text:span><text:span text:style-name="T179">.</text:span></text:p>
      <text:p text:style-name="P55"/>
      <text:p text:style-name="P55">For this you will get:</text:p>
      <text:p text:style-name="P55"/>
      <text:p text:style-name="P54">Support in a timely basis within level of issue priority of:</text:p>
      <text:p text:style-name="P36"><text:span text:style-name="T200">Critical</text:span><text:span text:style-name="T179"> <text:tab/>Software in use but cannot be used due to a bug.</text:span></text:p>
      <text:p text:style-name="P39"><text:soft-page-break/><text:span text:style-name="T200">Normal</text:span><text:span text:style-name="T179"> <text:tab/>Software in use but some aspects or function have a bug present but can still</text:span><text:span text:style-name="T195"> </text:span><text:span text:style-name="T179">use</text:span></text:p>
      <text:p text:style-name="P39"><text:span text:style-name="T195"><text:tab/><text:tab/></text:span><text:span text:style-name="T179">it.</text:span></text:p>
      <text:p text:style-name="P39"><text:span text:style-name="T200">Cosmetic</text:span><text:span text:style-name="T179"> <text:tab/>Software or manual errors but cosmetic (non urgent) in nature. </text:span><text:span text:style-name="T182">Does not prevent</text:span></text:p>
      <text:p text:style-name="P39"><text:span text:style-name="T195"><text:tab/><text:tab/></text:span><text:span text:style-name="T182">use of Flightlog in any way.</text:span></text:p>
      <text:p text:style-name="P54"/>
      <text:p text:style-name="P36"><text:span text:style-name="T179">*Estimated response times, fro</text:span><text:span text:style-name="T182">m</text:span><text:span text:style-name="T179"> </text:span><text:span text:style-name="T197">the </text:span><text:span text:style-name="T179">time</text:span><text:span text:style-name="T197"> the</text:span><text:span text:style-name="T179"> email arrives:</text:span></text:p>
      <text:p text:style-name="P54"/>
      <text:p text:style-name="P54">Critical<text:tab/>4 to 24 hours*.</text:p>
      <text:p text:style-name="P54">Normal<text:tab/>1 – 5 days* subject to <text:span text:style-name="T539">any</text:span> reported critical issues.</text:p>
      <text:p text:style-name="P36"><text:span text:style-name="T179">Cosmetic<text:tab/></text:span><text:span text:style-name="T199">1</text:span><text:span text:style-name="T182"> days</text:span><text:span text:style-name="T179"> – 4 weeks*.</text:span></text:p>
      <text:p text:style-name="P54"/>
      <text:p text:style-name="P38"><text:span text:style-name="T179">* Holidays or illnesses omitted, </text:span><text:span text:style-name="T182">and remember that UK time is Zulu or GMT and </text:span><text:span text:style-name="T198">my </text:span><text:span text:style-name="T182">work </text:span><text:span text:style-name="T186">period is </text:span><text:span text:style-name="T182">between </text:span><text:span text:style-name="T186">the </text:span><text:span text:style-name="T182">hours 1</text:span><text:span text:style-name="T184">2</text:span><text:span text:style-name="T182">:00 and 20:00 per day, Monday through Friday usually, </text:span><text:span text:style-name="T184">and even sometimes at the weekend</text:span><text:span text:style-name="T179">.</text:span></text:p>
      <text:p text:style-name="P59">The response times take<text:span text:style-name="T540">s</text:span> into account your and <text:span text:style-name="T701">my</text:span> time zones and these times reflect worse case scenarios.</text:p>
      <text:p text:style-name="P59">For example during a week day with a fault reported by mid day a fix should be dealt with same day <text:span text:style-name="T540">at Critical level and hopefully Normal level as well. </text:span><text:span text:style-name="T719"><text:s/>This does assume that my internet connection is working :)</text:span></text:p>
      <text:p text:style-name="P59"/>
      <text:p text:style-name="P61">This mean an updated copy of Flightlog will be sent directly to you, to test and use within the above response times.<text:span text:style-name="T661"> [Of course</text:span><text:span text:style-name="T701">,</text:span><text:span text:style-name="T661"> if it is supplied as source, you will have to rebuild the executable by compiling flightlog using the </text:span><text:span text:style-name="T701">free Gnu </text:span><text:span text:style-name="T661">Cobol compiler</text:span><text:span text:style-name="T701"> so once installed</text:span><text:span text:style-name="T726">,</text:span><text:span text:style-name="T701"> keep it</text:span><text:span text:style-name="T661">.]</text:span></text:p>
      <text:p text:style-name="P54"/>
      <text:p text:style-name="P58">Registration types 1 and 2 are for you, using the software on your own controlled computer for your use or that where there is no charge for any one else to use it. You may install Flightlog o<text:span text:style-name="T539">n</text:span> other computers under your control or ownership. Remember to ensure that there are back up procedures in place both, on the system being used and away from it, such as using a cloud service as many do not change or it will be nominal for such a small amount of data.</text:p>
      <text:p text:style-name="P58"/>
      <text:p text:style-name="P60">While Flightlog could be run on a mobile device such as a tablet or even a mobile phone <text:span text:style-name="T541">(yes, the Cobol compiler has been installed on both), </text:span>it is not a recommended practice as such devices can be lost or damaged and as such, create a security risk for your data as users tend not to do back ups<text:span text:style-name="T662"> - yep, myself included</text:span><text:span text:style-name="T723"> although that said, there are positives for updating your log book before leaving after a flight - there again I do travel with a small AOPA diary with a section at the back for log entries.</text:span></text:p>
      <text:p text:style-name="P58"/>
      <text:p text:style-name="P58"/>
      <text:p text:style-name="P60"><text:span text:style-name="T23">3</text:span>. <text:s/><text:span text:style-name="T480">Commercial </text:span>op<text:span text:style-name="T480">erations where Flightlog will be used by more than one person </text:span>at no<text:span text:style-name="T480"> cost to them for doing so. <text:s/>Treated same as in </text:span><text:span text:style-name="T37">2.</text:span></text:p>
      <text:p text:style-name="P58"/>
      <text:p text:style-name="P58"/>
      <text:p text:style-name="P58"><text:span text:style-name="T36">4</text:span><text:span text:style-name="T23">.</text:span> <text:s/>Commercial <text:span text:style-name="T539">op</text:span>erations where Flightlog will be used by more than one person for a <text:span text:style-name="T74">cost</text:span> to them for doing so.</text:p>
      <text:p text:style-name="P58"/>
      <text:p text:style-name="P58">Contact <text:span text:style-name="T723">me</text:span> via email to discus your requirements.</text:p>
      <text:p text:style-name="P58"/>
      <text:p text:style-name="P58"><text:span text:style-name="T662">For </text:span><text:span text:style-name="T44">3</text:span><text:span text:style-name="T662"> and </text:span><text:span text:style-name="T44">4</text:span><text:span text:style-name="T662">., </text:span>Flightlog “as is" is not really suitable for this type of operation without modifications <text:span text:style-name="T539">unless each user has their own login and user name for the computer/s used</text:span><text:span text:style-name="T701"> but some have done so</text:span><text:span text:style-name="T702">,</text:span><text:span text:style-name="T701"> although </text:span><text:span text:style-name="T702">normally</text:span><text:span text:style-name="T701"> using a *nix operating system </text:span><text:span text:style-name="T702">such as</text:span><text:span text:style-name="T701"> Linux or Apple's OSX</text:span><text:span text:style-name="T702"> / BSD</text:span><text:span text:style-name="T539">.</text:span></text:p>
      <text:p text:style-name="P6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text-indent="0cm" style:auto-text-indent="false" style:page-number="auto"/>
      <style:text-properties style:font-name="Arial3" fo:font-family="Arial" style:font-style-name="Regular" style:font-family-generic="swiss" style:font-pitch="variable" officeooo:rsid="001718b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Regular"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00%" fo:text-align="start" style:justify-single-word="false" style:page-number="auto"/>
      <style:text-properties style:font-name="Arial3"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ntents_20_1" style:display-name="Contents 1" style:family="paragraph" style:parent-style-name="Index" style:class="index">
      <style:paragraph-properties fo:margin-left="0cm" fo:margin-right="0cm" fo:text-align="start" style:justify-single-word="false" fo:text-indent="0cm" style:auto-text-indent="false">
        <style:tab-stops>
          <style:tab-stop style:position="16.999cm" style:type="right" style:leader-style="dotted" style:leader-text="."/>
        </style:tab-stops>
      </style:paragraph-properties>
      <style:text-properties style:font-name="Arial3" fo:font-family="Arial"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cm" fo:margin-bottom="0cm" style:contextual-spacing="false" fo:text-align="start" style:justify-single-word="false" fo:text-indent="0cm" style:auto-text-indent="false" style:page-number="auto" fo:background-color="transparent" style:shadow="none" style:writing-mode="page">
        <style:tab-stops/>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_20_1" style:next-style-name="Text_20_body" style:auto-update="true" style:default-outline-level="2" style:class="text" style:master-page-name="">
      <style:paragraph-properties fo:margin-left="0cm" fo:margin-right="0cm" fo:margin-top="0cm" fo:margin-bottom="0cm" style:contextual-spacing="false" fo:text-align="justify" style:justify-single-word="false" fo:text-indent="0cm" style:auto-text-indent="false" style:page-number="auto">
        <style:tab-stops/>
      </style:paragraph-properties>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default-outline-level="1" style:list-style-name="Numbering_20_123" style:class="chapter">
      <style:paragraph-properties fo:margin-top="0cm" fo:margin-bottom="0cm" style:contextual-spacing="false" fo:text-align="start" style:justify-single-word="false"/>
      <style:text-properties fo:font-size="14pt" fo:font-weight="bold" style:font-size-asian="18pt" style:font-size-complex="18pt"/>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cm" fo:margin-bottom="0cm" style:contextual-spacing="false" fo:text-indent="0cm" style:auto-text-indent="false"/>
      <style:text-properties fo:font-size="86%"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style:contextual-spacing="false" fo:text-indent="0cm" style:auto-text-indent="false"/>
      <style:text-properties fo:font-size="8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Untitled1" style:family="paragraph" style:parent-style-name="Illustration">
      <style:paragraph-properties fo:text-align="center" style:justify-single-word="false"/>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User_20_Index_20_Heading" style:display-name="User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list-style-name="Numbering_20_123" style:class="index" style:master-page-name="">
      <style:paragraph-properties fo:margin-left="0cm" fo:margin-right="0cm" fo:text-align="center" style:justify-single-word="false" fo:text-indent="0cm" style:auto-text-indent="false" style:page-number="auto">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17c7372" officeooo:paragraph-rsid="017c737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2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Page <text:page-number text:select-page="current">2</text:page-number></text:p>
      </style:footer>
    </style:master-page>
    <style:master-page style:name="First_20_Page" style:display-name="First Page" style:page-layout-name="Mpm2" draw:style-name="Mdp2" style:next-style-name="Standard"/>
    <style:master-page style:name="Endnote"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06T21:34:42.229000000</meta:creation-date>
    <dc:date>2026-02-22T18:54:14.007081828</dc:date>
    <meta:editing-duration>P5DT12H17M38S</meta:editing-duration>
    <meta:editing-cycles>142</meta:editing-cycles>
    <meta:generator>LibreOffice/24.2.7.2$Linux_X86_64 LibreOffice_project/420$Build-2</meta:generator>
    <meta:keyword>Flightlog software Linux Windows Cobol</meta:keyword>
    <dc:subject>Flightlog Installation and Operations</dc:subject>
    <dc:title>Flightlog Manual</dc:title>
    <dc:creator>Vincent B Coen</dc:creator>
    <meta:document-statistic meta:table-count="1" meta:image-count="10" meta:object-count="0" meta:page-count="88" meta:paragraph-count="1653" meta:word-count="32329" meta:character-count="182846" meta:non-whitespace-character-count="149066"/>
  </office:meta>
</office:document-meta>
</file>